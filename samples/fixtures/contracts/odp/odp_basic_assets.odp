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presentation"/>
  <manifest:file-entry manifest:full-path="content.xml" manifest:media-type="text/xml"/>
  <manifest:file-entry manifest:full-path="meta.xml" manifest:media-type="text/xml"/>
  <manifest:file-entry manifest:full-path="Pictures/red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draw="urn:oasis:names:tc:opendocument:xmlns:drawing:1.0" xmlns:presentation="urn:oasis:names:tc:opendocument:xmlns:presentation:1.0" xmlns:xlink="http://www.w3.org/1999/xlink" office:version="1.2">
  <office:body>
    <office:presentation>
      <draw:page draw:name="Intro">
        <draw:frame>
          <draw:text-box>
            <text:h>ODP Sample</text:h>
            <text:p>Slide paragraph with *markdown* chars.</text:p>
            <text:list>
              <text:list-item>
                <text:p>First bullet</text:p>
              </text:list-item>
            </text:list>
          </draw:text-box>
        </draw:frame>
        <draw:frame>
          <table:table>
            <table:table-row>
              <table:table-cell>
                <text:p>Name</text:p>
              </table:table-cell>
              <table:table-cell>
                <text:p>Value</text:p>
              </table:table-cell>
            </table:table-row>
            <table:table-row>
              <table:table-cell>
                <text:p>Alpha</text:p>
              </table:table-cell>
              <table:table-cell>
                <text:p>42</text:p>
              </table:table-cell>
            </table:table-row>
          </table:table>
        </draw:frame>
        <draw:frame draw:name="red-dot">
          <draw:image xlink:href="Pictures/red.png" xlink:type="simple" xlink:show="embed" xlink:actuate="onLoad"/>
        </draw:frame>
        <presentation:notes>
          <text:p>Speaker note</text:p>
        </presentation:notes>
      </draw:page>
    </office:presentation>
  </office:body>
</office:document-content>
</file>

<file path=meta.xml><?xml version="1.0" encoding="utf-8"?>
<office:document-meta xmlns:office="urn:oasis:names:tc:opendocument:xmlns:office:1.0" xmlns:dc="http://purl.org/dc/elements/1.1/" office:version="1.2">
  <office:meta>
    <dc:title>ODP Sample</dc:title>
    <dc:subject>Regression Fixture</dc:subject>
    <dc:language>en</dc:language>
  </office:meta>
</office:document-meta>
</file>