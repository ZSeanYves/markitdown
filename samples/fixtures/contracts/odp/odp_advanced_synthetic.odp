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Pictures/red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presentation="urn:oasis:names:tc:opendocument:xmlns:presentation:1.0" xmlns:text="urn:oasis:names:tc:opendocument:xmlns:text:1.0" xmlns:table="urn:oasis:names:tc:opendocument:xmlns:table:1.0" xmlns:xlink="http://www.w3.org/1999/xlink" office:version="1.3">
  <office:body>
    <office:presentation>
      <draw:page draw:name="Overview">
        <draw:frame presentation:class="title">
          <draw:text-box>
            <text:h text:outline-level="1">Quarterly review</text:h>
          </draw:text-box>
        </draw:frame>
        <draw:g>
          <draw:frame>
            <draw:text-box>
              <text:p>Grouped paragraph</text:p>
              <text:list>
                <text:list-item>
                  <text:p>First point</text:p>
                </text:list-item>
              </text:list>
            </draw:text-box>
          </draw:frame>
          <draw:g>
            <draw:custom-shape>
              <text:p>Nested shape text</text:p>
            </draw:custom-shape>
          </draw:g>
        </draw:g>
        <draw:frame draw:name="Metrics table">
          <table:table>
            <table:table-row>
              <table:table-cell>
                <text:p>Metric</text:p>
              </table:table-cell>
              <table:table-cell>
                <text:p>Value</text:p>
              </table:table-cell>
            </table:table-row>
            <table:table-row>
              <table:table-cell>
                <text:p>Revenue</text:p>
              </table:table-cell>
              <table:table-cell>
                <text:p>42</text:p>
              </table:table-cell>
            </table:table-row>
          </table:table>
        </draw:frame>
        <draw:frame draw:name="Red pixel">
          <draw:image xlink:href="Pictures/red.png" xlink:type="simple"/>
        </draw:frame>
        <presentation:notes>
          <draw:page>
            <draw:frame>
              <draw:text-box>
                <text:p>Speaker notes</text:p>
              </draw:text-box>
            </draw:frame>
          </draw:page>
        </presentation:notes>
        <draw:custom-shape>
          <text:p>Unframed shape</text:p>
        </draw:custom-shape>
      </draw:page>
      <draw:page draw:name="Second">
        <draw:frame>
          <draw:text-box>
            <text:p>Second slide</text:p>
          </draw:text-box>
        </draw:frame>
        <draw:frame draw:name="Missing">
          <draw:image xlink:href="Pictures/missing.png"/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 office:version="1.3">
  <office:meta>
    <dc:title>Advanced ODP</dc:title>
    <dc:creator>Project fixture</dc:creator>
  </office:meta>
</office:document-meta>
</file>