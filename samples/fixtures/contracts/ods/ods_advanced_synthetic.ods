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red.png" manifest:media-type="image/png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draw="urn:oasis:names:tc:opendocument:xmlns:drawing:1.0" xmlns:xlink="http://www.w3.org/1999/xlink" office:version="1.3">
  <office:body>
    <office:spreadsheet>
      <table:table table:name="Metrics">
        <table:table-row>
          <table:table-cell office:value-type="string">
            <text:p>Kind</text:p>
          </table:table-cell>
          <table:table-cell office:value-type="string">
            <text:p>Value</text:p>
          </table:table-cell>
        </table:table-row>
        <table:table-row table:number-rows-repeated="2">
          <table:table-cell>
            <text:p>Revenue</text:p>
          </table:table-cell>
          <table:table-cell office:value-type="float" office:value="42.5" table:formula="of:=SUM([.B2:.B2])">
            <text:p>42.5</text:p>
          </table:table-cell>
        </table:table-row>
        <table:table-row>
          <table:table-cell table:number-columns-spanned="2">
            <text:p>Merged summary</text:p>
          </table:table-cell>
          <table:covered-table-cell/>
        </table:table-row>
        <table:table-row table:visibility="collapse">
          <table:table-cell>
            <text:p>Hidden row</text:p>
          </table:table-cell>
        </table:table-row>
        <table:table-row>
          <table:table-cell table:number-columns-repeated="2">
            <text:p>Repeated</text:p>
          </table:table-cell>
        </table:table-row>
        <draw:frame draw:name="Red pixel">
          <draw:image xlink:href="Pictures/red.png" xlink:type="simple"/>
        </draw:frame>
      </table:table>
      <table:table table:name="Hidden" table:display="false">
        <table:table-row>
          <table:table-cell>
            <text:p>Hidden she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3">
  <office:styles>
    <style:style style:name="Default" style:family="table-cell"/>
  </office:styles>
</office:document-styles>
</file>

<file path=meta.xml><?xml version="1.0" encoding="utf-8"?>
<office:document-meta xmlns:office="urn:oasis:names:tc:opendocument:xmlns:office:1.0" xmlns:dc="http://purl.org/dc/elements/1.1/" office:version="1.3">
  <office:meta>
    <dc:title>Advanced ODS</dc:title>
    <dc:subject>Contract fixture</dc:subject>
    <dc:language>en</dc:language>
  </office:meta>
</office:document-meta>
</file>