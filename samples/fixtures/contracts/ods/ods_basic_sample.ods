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Budget">
        <table:table-row>
          <table:table-cell>
            <text:p>Item</text:p>
          </table:table-cell>
          <table:table-cell>
            <text:p>Value</text:p>
          </table:table-cell>
        </table:table-row>
        <table:table-row>
          <table:table-cell>
            <text:p>Alpha</text:p>
          </table:table-cell>
          <table:table-cell table:formula="of:=21+21">
            <text:p>42</text:p>
          </table:table-cell>
        </table:table-row>
      </table:table>
      <table:table table:name="Hidden" table:display="false">
        <table:table-row>
          <table:table-cell>
            <text:p>Secret</text:p>
          </table:table-cell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dc="http://purl.org/dc/elements/1.1/" office:version="1.2">
  <office:meta>
    <dc:title>ODS Sample</dc:title>
    <dc:subject>Regression Fixture</dc:subject>
    <dc:language>en</dc:language>
  </office:meta>
</office:document-meta>
</file>