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red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draw="urn:oasis:names:tc:opendocument:xmlns:drawing:1.0" xmlns:xlink="http://www.w3.org/1999/xlink" xmlns:dc="http://purl.org/dc/elements/1.1/" office:version="1.3">
  <office:body>
    <office:text>
      <text:h text:outline-level="2">Advanced section</text:h>
      <text:p>Visit <text:a xlink:href="https://example.test">documentation</text:a><text:line-break/>next line <text:note text:note-class="footnote" text:id="ftn1"><text:note-citation>1</text:note-citation><text:note-body><text:p>Footnote body</text:p></text:note-body></text:note>.</text:p>
      <office:annotation>
        <dc:creator>Ada</dc:creator>
        <dc:date>2026-01-01T00:00:00</dc:date>
        <text:p>Review annotation</text:p>
      </office:annotation>
      <text:list>
        <text:list-item>
          <text:p>First item</text:p>
          <text:list>
            <text:list-item>
              <text:p>Nested item</text:p>
            </text:list-item>
          </text:list>
        </text:list-item>
        <text:list-item>
          <text:p>Second item</text:p>
        </text:list-item>
      </text:list>
      <table:table table:name="Data">
        <table:table-row>
          <table:table-cell>
            <text:p>Name</text:p>
          </table:table-cell>
          <table:table-cell>
            <text:p>Value</text:p>
          </table:table-cell>
        </table:table-row>
        <table:table-row table:number-rows-repeated="2">
          <table:table-cell>
            <text:p>Ada</text:p>
          </table:table-cell>
          <table:table-cell>
            <text:p>42</text:p>
          </table:table-cell>
        </table:table-row>
        <table:table-row>
          <table:table-cell table:number-columns-spanned="2">
            <text:p>Merged</text:p>
          </table:table-cell>
          <table:covered-table-cell/>
        </table:table-row>
      </table:table>
      <text:p><draw:frame draw:name="Red pixel" text:anchor-type="as-char"><draw:image xlink:href="Pictures/red.png" xlink:type="simple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3">
  <office:styles>
    <style:style style:name="Heading_20_2" style:family="paragraph"/>
  </office: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3">
  <office:meta>
    <dc:title>Advanced ODT</dc:title>
    <dc:creator>Project fixture</dc:creator>
    <meta:keyword>contract</meta:keyword>
  </office:meta>
</office:document-meta>
</file>