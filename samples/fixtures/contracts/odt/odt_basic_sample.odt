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red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xlink="http://www.w3.org/1999/xlink" office:version="1.2">
  <office:body>
    <office:text>
      <text:h text:outline-level="1">ODT Sample</text:h>
      <text:p>Paragraph with markdown *chars* and [link] text.</text:p>
      <text:list>
        <text:list-item>
          <text:p>First item</text:p>
        </text:list-item>
        <text:list-item>
          <text:p>Second item</text:p>
        </text:list-item>
      </text:list>
      <table:table>
        <table:table-row>
          <table:table-cell>
            <text:p>Name</text:p>
          </table:table-cell>
          <table:table-cell>
            <text:p>Value</text:p>
          </table:table-cell>
        </table:table-row>
        <table:table-row>
          <table:table-cell>
            <text:p>Alpha</text:p>
          </table:table-cell>
          <table:table-cell>
            <text:p>42</text:p>
          </table:table-cell>
        </table:table-row>
      </table:table>
      <draw:frame draw:name="red-dot">
        <draw:image xlink:href="Pictures/red.png" xlink:type="simple" xlink:show="embed" xlink:actuate="onLoad"/>
      </draw:frame>
    </office:text>
  </office:body>
</office:document-content>
</file>

<file path=meta.xml><?xml version="1.0" encoding="utf-8"?>
<office:document-meta xmlns:office="urn:oasis:names:tc:opendocument:xmlns:office:1.0" xmlns:dc="http://purl.org/dc/elements/1.1/" office:version="1.2">
  <office:meta>
    <dc:title>ODT Sample</dc:title>
    <dc:subject>Regression Fixture</dc:subject>
    <dc:language>en</dc:language>
  </office:meta>
</office:document-meta>
</file>