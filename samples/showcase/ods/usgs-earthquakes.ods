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3">
  <office:body>
    <office:spreadsheet>
      <table:table table:name="About">
        <table:table-row>
          <table:table-cell office:value-type="string">
            <text:p>Dataset</text:p>
          </table:table-cell>
          <table:table-cell office:value-type="string">
            <text:p>USGS all-day earthquakes</text:p>
          </table:table-cell>
        </table:table-row>
        <table:table-row>
          <table:table-cell office:value-type="string">
            <text:p>Source</text:p>
          </table:table-cell>
          <table:table-cell office:value-type="string">
            <text:p>USGS Earthquake Hazards Program</text:p>
          </table:table-cell>
        </table:table-row>
        <table:table-row>
          <table:table-cell office:value-type="string">
            <text:p>Records</text:p>
          </table:table-cell>
          <table:table-cell office:value-type="string">
            <text:p>239</text:p>
          </table:table-cell>
        </table:table-row>
      </table:table>
      <table:table table:name="Earthquakes">
        <table:table-row>
          <table:table-cell office:value-type="string">
            <text:p>tim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depth</text:p>
          </table:table-cell>
          <table:table-cell office:value-type="string">
            <text:p>mag</text:p>
          </table:table-cell>
          <table:table-cell office:value-type="string">
            <text:p>magType</text:p>
          </table:table-cell>
          <table:table-cell office:value-type="string">
            <text:p>nst</text:p>
          </table:table-cell>
          <table:table-cell office:value-type="string">
            <text:p>gap</text:p>
          </table:table-cell>
          <table:table-cell office:value-type="string">
            <text:p>dmin</text:p>
          </table:table-cell>
          <table:table-cell office:value-type="string">
            <text:p>rms</text:p>
          </table:table-cell>
          <table:table-cell office:value-type="string">
            <text:p>net</text:p>
          </table:table-cell>
          <table:table-cell office:value-type="string">
            <text:p>id</text:p>
          </table:table-cell>
          <table:table-cell office:value-type="string">
            <text:p>updated</text:p>
          </table:table-cell>
          <table:table-cell office:value-type="string">
            <text:p>place</text:p>
          </table:table-cell>
          <table:table-cell office:value-type="string">
            <text:p>type</text:p>
          </table:table-cell>
          <table:table-cell office:value-type="string">
            <text:p>horizontalError</text:p>
          </table:table-cell>
          <table:table-cell office:value-type="string">
            <text:p>depthError</text:p>
          </table:table-cell>
          <table:table-cell office:value-type="string">
            <text:p>magError</text:p>
          </table:table-cell>
          <table:table-cell office:value-type="string">
            <text:p>magNst</text:p>
          </table:table-cell>
          <table:table-cell office:value-type="string">
            <text:p>status</text:p>
          </table:table-cell>
          <table:table-cell office:value-type="string">
            <text:p>locationSource</text:p>
          </table:table-cell>
          <table:table-cell office:value-type="string">
            <text:p>magSource</text:p>
          </table:table-cell>
        </table:table-row>
        <table:table-row>
          <table:table-cell office:value-type="string">
            <text:p>2026-07-12T11:51:34.260Z</text:p>
          </table:table-cell>
          <table:table-cell office:value-type="string">
            <text:p>33.485333333333</text:p>
          </table:table-cell>
          <table:table-cell office:value-type="string">
            <text:p>-116.38783333333</text:p>
          </table:table-cell>
          <table:table-cell office:value-type="string">
            <text:p>9.14</text:p>
          </table:table-cell>
          <table:table-cell office:value-type="string">
            <text:p>0.55</text:p>
          </table:table-cell>
          <table:table-cell office:value-type="string">
            <text:p>ml</text:p>
          </table:table-cell>
          <table:table-cell office:value-type="string">
            <text:p>31</text:p>
          </table:table-cell>
          <table:table-cell office:value-type="string">
            <text:p>45</text:p>
          </table:table-cell>
          <table:table-cell office:value-type="string">
            <text:p>0.139</text:p>
          </table:table-cell>
          <table:table-cell office:value-type="string">
            <text:p>0.18</text:p>
          </table:table-cell>
          <table:table-cell office:value-type="string">
            <text:p>ci</text:p>
          </table:table-cell>
          <table:table-cell office:value-type="string">
            <text:p>ci41291991</text:p>
          </table:table-cell>
          <table:table-cell office:value-type="string">
            <text:p>2026-07-12T11:54:59.381Z</text:p>
          </table:table-cell>
          <table:table-cell office:value-type="string">
            <text:p>21 km SSW of La Quinta, CA</text:p>
          </table:table-cell>
          <table:table-cell office:value-type="string">
            <text:p>earthquake</text:p>
          </table:table-cell>
          <table:table-cell office:value-type="string">
            <text:p>0.21</text:p>
          </table:table-cell>
          <table:table-cell office:value-type="string">
            <text:p>0.87</text:p>
          </table:table-cell>
          <table:table-cell office:value-type="string">
            <text:p>0.047271343996267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48:41.230Z</text:p>
          </table:table-cell>
          <table:table-cell office:value-type="string">
            <text:p>34.806666666667</text:p>
          </table:table-cell>
          <table:table-cell office:value-type="string">
            <text:p>-118.9165</text:p>
          </table:table-cell>
          <table:table-cell office:value-type="string">
            <text:p>13.31</text:p>
          </table:table-cell>
          <table:table-cell office:value-type="string">
            <text:p>0.62</text:p>
          </table:table-cell>
          <table:table-cell office:value-type="string">
            <text:p>ml</text:p>
          </table:table-cell>
          <table:table-cell office:value-type="string">
            <text:p>24</text:p>
          </table:table-cell>
          <table:table-cell office:value-type="string">
            <text:p>71</text:p>
          </table:table-cell>
          <table:table-cell office:value-type="string">
            <text:p>0.04013</text:p>
          </table:table-cell>
          <table:table-cell office:value-type="string">
            <text:p>0.2</text:p>
          </table:table-cell>
          <table:table-cell office:value-type="string">
            <text:p>ci</text:p>
          </table:table-cell>
          <table:table-cell office:value-type="string">
            <text:p>ci41291983</text:p>
          </table:table-cell>
          <table:table-cell office:value-type="string">
            <text:p>2026-07-12T11:52:13.723Z</text:p>
          </table:table-cell>
          <table:table-cell office:value-type="string">
            <text:p>3 km SE of Frazier Park, CA</text:p>
          </table:table-cell>
          <table:table-cell office:value-type="string">
            <text:p>earthquake</text:p>
          </table:table-cell>
          <table:table-cell office:value-type="string">
            <text:p>0.32</text:p>
          </table:table-cell>
          <table:table-cell office:value-type="string">
            <text:p>0.53</text:p>
          </table:table-cell>
          <table:table-cell office:value-type="string">
            <text:p>0.20055166704312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46:46.530Z</text:p>
          </table:table-cell>
          <table:table-cell office:value-type="string">
            <text:p>34.813333333333</text:p>
          </table:table-cell>
          <table:table-cell office:value-type="string">
            <text:p>-118.90933333333</text:p>
          </table:table-cell>
          <table:table-cell office:value-type="string">
            <text:p>12.77</text:p>
          </table:table-cell>
          <table:table-cell office:value-type="string">
            <text:p>1.01</text:p>
          </table:table-cell>
          <table:table-cell office:value-type="string">
            <text:p>ml</text:p>
          </table:table-cell>
          <table:table-cell office:value-type="string">
            <text:p>30</text:p>
          </table:table-cell>
          <table:table-cell office:value-type="string">
            <text:p>67</text:p>
          </table:table-cell>
          <table:table-cell office:value-type="string">
            <text:p>0.03469</text:p>
          </table:table-cell>
          <table:table-cell office:value-type="string">
            <text:p>0.22</text:p>
          </table:table-cell>
          <table:table-cell office:value-type="string">
            <text:p>ci</text:p>
          </table:table-cell>
          <table:table-cell office:value-type="string">
            <text:p>ci41291975</text:p>
          </table:table-cell>
          <table:table-cell office:value-type="string">
            <text:p>2026-07-12T11:50:11.542Z</text:p>
          </table:table-cell>
          <table:table-cell office:value-type="string">
            <text:p>3 km ESE of Frazier Park, CA</text:p>
          </table:table-cell>
          <table:table-cell office:value-type="string">
            <text:p>earthquake</text:p>
          </table:table-cell>
          <table:table-cell office:value-type="string">
            <text:p>0.32</text:p>
          </table:table-cell>
          <table:table-cell office:value-type="string">
            <text:p>0.47</text:p>
          </table:table-cell>
          <table:table-cell office:value-type="string">
            <text:p>0.40026166549092</text:p>
          </table:table-cell>
          <table:table-cell office:value-type="string">
            <text:p>21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43:49.820Z</text:p>
          </table:table-cell>
          <table:table-cell office:value-type="string">
            <text:p>18.849500656128</text:p>
          </table:table-cell>
          <table:table-cell office:value-type="string">
            <text:p>-155.08483886719</text:p>
          </table:table-cell>
          <table:table-cell office:value-type="string">
            <text:p>16.579999923706</text:p>
          </table:table-cell>
          <table:table-cell office:value-type="string">
            <text:p>3.25</text:p>
          </table:table-cell>
          <table:table-cell office:value-type="string">
            <text:p>ml</text:p>
          </table:table-cell>
          <table:table-cell office:value-type="string">
            <text:p>55</text:p>
          </table:table-cell>
          <table:table-cell office:value-type="string">
            <text:p>268</text:p>
          </table:table-cell>
          <table:table-cell office:value-type="string">
            <text:p>0.4361</text:p>
          </table:table-cell>
          <table:table-cell office:value-type="string">
            <text:p>0.219999999</text:p>
          </table:table-cell>
          <table:table-cell office:value-type="string">
            <text:p>hv</text:p>
          </table:table-cell>
          <table:table-cell office:value-type="string">
            <text:p>hv75001316</text:p>
          </table:table-cell>
          <table:table-cell office:value-type="string">
            <text:p>2026-07-12T11:53:20.040Z</text:p>
          </table:table-cell>
          <table:table-cell office:value-type="string">
            <text:p>57 km SE of Pāhala, Hawaii</text:p>
          </table:table-cell>
          <table:table-cell office:value-type="string">
            <text:p>earthquake</text:p>
          </table:table-cell>
          <table:table-cell office:value-type="string">
            <text:p>1.11</text:p>
          </table:table-cell>
          <table:table-cell office:value-type="string">
            <text:p>17.9300003</text:p>
          </table:table-cell>
          <table:table-cell office:value-type="string">
            <text:p>0.28</text:p>
          </table:table-cell>
          <table:table-cell office:value-type="string">
            <text:p>38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2T11:38:53.559Z</text:p>
          </table:table-cell>
          <table:table-cell office:value-type="string">
            <text:p>57.64</text:p>
          </table:table-cell>
          <table:table-cell office:value-type="string">
            <text:p>-155.404</text:p>
          </table:table-cell>
          <table:table-cell office:value-type="string">
            <text:p>19.5</text:p>
          </table:table-cell>
          <table:table-cell office:value-type="string">
            <text:p>1.4</text:p>
          </table:table-cell>
          <table:table-cell office:value-type="string">
            <text:p>ml</text:p>
          </table:table-cell>
          <table:table-cell office:value-type="string">
            <text:p>10</text:p>
          </table:table-cell>
          <table:table-cell office:value-type="string">
            <text:p>179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ak</text:p>
          </table:table-cell>
          <table:table-cell office:value-type="string">
            <text:p>aka2026nrnncq</text:p>
          </table:table-cell>
          <table:table-cell office:value-type="string">
            <text:p>2026-07-12T11:40:14.734Z</text:p>
          </table:table-cell>
          <table:table-cell office:value-type="string">
            <text:p>57 km W of Karluk, Alaska</text:p>
          </table:table-cell>
          <table:table-cell office:value-type="string">
            <text:p>earthquake</text:p>
          </table:table-cell>
          <table:table-cell office:value-type="string">
            <text:p>7.3</text:p>
          </table:table-cell>
          <table:table-cell office:value-type="string">
            <text:p>8.0042</text:p>
          </table:table-cell>
          <table:table-cell office:value-type="string">
            <text:p>0.1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11:37:05.080Z</text:p>
          </table:table-cell>
          <table:table-cell office:value-type="string">
            <text:p>19.312000274658</text:p>
          </table:table-cell>
          <table:table-cell office:value-type="string">
            <text:p>-155.37516784668</text:p>
          </table:table-cell>
          <table:table-cell office:value-type="string">
            <text:p>27.159999847412</text:p>
          </table:table-cell>
          <table:table-cell office:value-type="string">
            <text:p>2.06</text:p>
          </table:table-cell>
          <table:table-cell office:value-type="string">
            <text:p>md</text:p>
          </table:table-cell>
          <table:table-cell office:value-type="string">
            <text:p>34</text:p>
          </table:table-cell>
          <table:table-cell office:value-type="string">
            <text:p>93</text:p>
          </table:table-cell>
          <table:table-cell office:value-type="string">
            <text:p>0.02347</text:p>
          </table:table-cell>
          <table:table-cell office:value-type="string">
            <text:p>0.129999995</text:p>
          </table:table-cell>
          <table:table-cell office:value-type="string">
            <text:p>hv</text:p>
          </table:table-cell>
          <table:table-cell office:value-type="string">
            <text:p>hv75001311</text:p>
          </table:table-cell>
          <table:table-cell office:value-type="string">
            <text:p>2026-07-12T11:41:49.530Z</text:p>
          </table:table-cell>
          <table:table-cell office:value-type="string">
            <text:p>16 km NE of Pāhala, Hawaii</text:p>
          </table:table-cell>
          <table:table-cell office:value-type="string">
            <text:p>earthquake</text:p>
          </table:table-cell>
          <table:table-cell office:value-type="string">
            <text:p>0.52</text:p>
          </table:table-cell>
          <table:table-cell office:value-type="string">
            <text:p>0.529999971</text:p>
          </table:table-cell>
          <table:table-cell office:value-type="string">
            <text:p>0.049499115864003</text:p>
          </table:table-cell>
          <table:table-cell office:value-type="string">
            <text:p>7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2T11:34:37.435Z</text:p>
          </table:table-cell>
          <table:table-cell office:value-type="string">
            <text:p>31.575</text:p>
          </table:table-cell>
          <table:table-cell office:value-type="string">
            <text:p>-104.192</text:p>
          </table:table-cell>
          <table:table-cell office:value-type="string">
            <text:p>4.3412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30</text:p>
          </table:table-cell>
          <table:table-cell office:value-type="string">
            <text:p>7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tx</text:p>
          </table:table-cell>
          <table:table-cell office:value-type="string">
            <text:p>tx2026npikly</text:p>
          </table:table-cell>
          <table:table-cell office:value-type="string">
            <text:p>2026-07-12T11:40:06.381Z</text:p>
          </table:table-cell>
          <table:table-cell office:value-type="string">
            <text:p>47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768918991089</text:p>
          </table:table-cell>
          <table:table-cell office:value-type="string">
            <text:p>0.2</text:p>
          </table:table-cell>
          <table:table-cell office:value-type="string">
            <text:p>22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11:31:11.650Z</text:p>
          </table:table-cell>
          <table:table-cell office:value-type="string">
            <text:p>38.817501068115</text:p>
          </table:table-cell>
          <table:table-cell office:value-type="string">
            <text:p>-122.79582977295</text:p>
          </table:table-cell>
          <table:table-cell office:value-type="string">
            <text:p>2.7999999523163</text:p>
          </table:table-cell>
          <table:table-cell office:value-type="string">
            <text:p>1.06</text:p>
          </table:table-cell>
          <table:table-cell office:value-type="string">
            <text:p>md</text:p>
          </table:table-cell>
          <table:table-cell office:value-type="string">
            <text:p>14</text:p>
          </table:table-cell>
          <table:table-cell office:value-type="string">
            <text:p>73</text:p>
          </table:table-cell>
          <table:table-cell office:value-type="string">
            <text:p>0.009528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416</text:p>
          </table:table-cell>
          <table:table-cell office:value-type="string">
            <text:p>2026-07-12T11:32:49.326Z</text:p>
          </table:table-cell>
          <table:table-cell office:value-type="string">
            <text:p>6 km NW of The Geysers, CA</text:p>
          </table:table-cell>
          <table:table-cell office:value-type="string">
            <text:p>earthquake</text:p>
          </table:table-cell>
          <table:table-cell office:value-type="string">
            <text:p>0.29</text:p>
          </table:table-cell>
          <table:table-cell office:value-type="string">
            <text:p>0.75</text:p>
          </table:table-cell>
          <table:table-cell office:value-type="string">
            <text:p>0.17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11:25:04.050Z</text:p>
          </table:table-cell>
          <table:table-cell office:value-type="string">
            <text:p>33.363</text:p>
          </table:table-cell>
          <table:table-cell office:value-type="string">
            <text:p>-116.96216666667</text:p>
          </table:table-cell>
          <table:table-cell office:value-type="string">
            <text:p>8.58</text:p>
          </table:table-cell>
          <table:table-cell office:value-type="string">
            <text:p>0.45</text:p>
          </table:table-cell>
          <table:table-cell office:value-type="string">
            <text:p>ml</text:p>
          </table:table-cell>
          <table:table-cell office:value-type="string">
            <text:p>31</text:p>
          </table:table-cell>
          <table:table-cell office:value-type="string">
            <text:p>43</text:p>
          </table:table-cell>
          <table:table-cell office:value-type="string">
            <text:p>0.06381</text:p>
          </table:table-cell>
          <table:table-cell office:value-type="string">
            <text:p>0.18</text:p>
          </table:table-cell>
          <table:table-cell office:value-type="string">
            <text:p>ci</text:p>
          </table:table-cell>
          <table:table-cell office:value-type="string">
            <text:p>ci41291967</text:p>
          </table:table-cell>
          <table:table-cell office:value-type="string">
            <text:p>2026-07-12T11:28:33.629Z</text:p>
          </table:table-cell>
          <table:table-cell office:value-type="string">
            <text:p>9 km W of Palomar Observatory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6</text:p>
          </table:table-cell>
          <table:table-cell office:value-type="string">
            <text:p>0.082992743201583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24:48.946Z</text:p>
          </table:table-cell>
          <table:table-cell office:value-type="string">
            <text:p>56.134</text:p>
          </table:table-cell>
          <table:table-cell office:value-type="string">
            <text:p>-159.805</text:p>
          </table:table-cell>
          <table:table-cell office:value-type="string">
            <text:p>197</text:p>
          </table:table-cell>
          <table:table-cell office:value-type="string">
            <text:p>3</text:p>
          </table:table-cell>
          <table:table-cell office:value-type="string">
            <text:p>ml</text:p>
          </table:table-cell>
          <table:table-cell office:value-type="string">
            <text:p>63</text:p>
          </table:table-cell>
          <table:table-cell office:value-type="string">
            <text:p>325</text:p>
          </table:table-cell>
          <table:table-cell office:value-type="string">
            <text:p>3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rnayk</text:p>
          </table:table-cell>
          <table:table-cell office:value-type="string">
            <text:p>2026-07-12T11:28:31.070Z</text:p>
          </table:table-cell>
          <table:table-cell office:value-type="string">
            <text:p>32 km NW of Ivanof Bay, Alaska</text:p>
          </table:table-cell>
          <table:table-cell office:value-type="string">
            <text:p>earthquake</text:p>
          </table:table-cell>
          <table:table-cell office:value-type="string">
            <text:p>60.6</text:p>
          </table:table-cell>
          <table:table-cell office:value-type="string">
            <text:p>7.0609</text:p>
          </table:table-cell>
          <table:table-cell office:value-type="string">
            <text:p>0.1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11:23:48.880Z</text:p>
          </table:table-cell>
          <table:table-cell office:value-type="string">
            <text:p>53.6497</text:p>
          </table:table-cell>
          <table:table-cell office:value-type="string">
            <text:p>-166.7155</text:p>
          </table:table-cell>
          <table:table-cell office:value-type="string">
            <text:p>95.216</text:p>
          </table:table-cell>
          <table:table-cell office:value-type="string">
            <text:p>4.5</text:p>
          </table:table-cell>
          <table:table-cell office:value-type="string">
            <text:p>mb</text:p>
          </table:table-cell>
          <table:table-cell office:value-type="string">
            <text:p>87</text:p>
          </table:table-cell>
          <table:table-cell office:value-type="string">
            <text:p>143</text:p>
          </table:table-cell>
          <table:table-cell office:value-type="string">
            <text:p>0.161</text:p>
          </table:table-cell>
          <table:table-cell office:value-type="string">
            <text:p>0.54</text:p>
          </table:table-cell>
          <table:table-cell office:value-type="string">
            <text:p>us</text:p>
          </table:table-cell>
          <table:table-cell office:value-type="string">
            <text:p>us7000szv2</text:p>
          </table:table-cell>
          <table:table-cell office:value-type="string">
            <text:p>2026-07-12T11:53:46.909Z</text:p>
          </table:table-cell>
          <table:table-cell office:value-type="string">
            <text:p>27 km SSW of Unalaska, Alaska</text:p>
          </table:table-cell>
          <table:table-cell office:value-type="string">
            <text:p>earthquake</text:p>
          </table:table-cell>
          <table:table-cell office:value-type="string">
            <text:p>3.9</text:p>
          </table:table-cell>
          <table:table-cell office:value-type="string">
            <text:p>3.86</text:p>
          </table:table-cell>
          <table:table-cell office:value-type="string">
            <text:p>0.04</text:p>
          </table:table-cell>
          <table:table-cell office:value-type="string">
            <text:p>185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11:22:22.300Z</text:p>
          </table:table-cell>
          <table:table-cell office:value-type="string">
            <text:p>33.808666666667</text:p>
          </table:table-cell>
          <table:table-cell office:value-type="string">
            <text:p>-117.65266666667</text:p>
          </table:table-cell>
          <table:table-cell office:value-type="string">
            <text:p>4.06</text:p>
          </table:table-cell>
          <table:table-cell office:value-type="string">
            <text:p>0.74</text:p>
          </table:table-cell>
          <table:table-cell office:value-type="string">
            <text:p>ml</text:p>
          </table:table-cell>
          <table:table-cell office:value-type="string">
            <text:p>25</text:p>
          </table:table-cell>
          <table:table-cell office:value-type="string">
            <text:p>64</text:p>
          </table:table-cell>
          <table:table-cell office:value-type="string">
            <text:p>0.03868</text:p>
          </table:table-cell>
          <table:table-cell office:value-type="string">
            <text:p>0.17</text:p>
          </table:table-cell>
          <table:table-cell office:value-type="string">
            <text:p>ci</text:p>
          </table:table-cell>
          <table:table-cell office:value-type="string">
            <text:p>ci41291959</text:p>
          </table:table-cell>
          <table:table-cell office:value-type="string">
            <text:p>2026-07-12T11:25:49.051Z</text:p>
          </table:table-cell>
          <table:table-cell office:value-type="string">
            <text:p>10 km SW of Corona, CA</text:p>
          </table:table-cell>
          <table:table-cell office:value-type="string">
            <text:p>earthquake</text:p>
          </table:table-cell>
          <table:table-cell office:value-type="string">
            <text:p>0.23</text:p>
          </table:table-cell>
          <table:table-cell office:value-type="string">
            <text:p>0.45</text:p>
          </table:table-cell>
          <table:table-cell office:value-type="string">
            <text:p>0.16843547252581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22:14.240Z</text:p>
          </table:table-cell>
          <table:table-cell office:value-type="string">
            <text:p>34.805</text:p>
          </table:table-cell>
          <table:table-cell office:value-type="string">
            <text:p>-118.927</text:p>
          </table:table-cell>
          <table:table-cell office:value-type="string">
            <text:p>12.98</text:p>
          </table:table-cell>
          <table:table-cell office:value-type="string">
            <text:p>1.38</text:p>
          </table:table-cell>
          <table:table-cell office:value-type="string">
            <text:p>ml</text:p>
          </table:table-cell>
          <table:table-cell office:value-type="string">
            <text:p>48</text:p>
          </table:table-cell>
          <table:table-cell office:value-type="string">
            <text:p>36</text:p>
          </table:table-cell>
          <table:table-cell office:value-type="string">
            <text:p>0.04583</text:p>
          </table:table-cell>
          <table:table-cell office:value-type="string">
            <text:p>0.23</text:p>
          </table:table-cell>
          <table:table-cell office:value-type="string">
            <text:p>ci</text:p>
          </table:table-cell>
          <table:table-cell office:value-type="string">
            <text:p>ci41291951</text:p>
          </table:table-cell>
          <table:table-cell office:value-type="string">
            <text:p>2026-07-12T11:35:49.470Z</text:p>
          </table:table-cell>
          <table:table-cell office:value-type="string">
            <text:p>3 km SE of Frazier Park, CA</text:p>
          </table:table-cell>
          <table:table-cell office:value-type="string">
            <text:p>earthquake</text:p>
          </table:table-cell>
          <table:table-cell office:value-type="string">
            <text:p>0.26</text:p>
          </table:table-cell>
          <table:table-cell office:value-type="string">
            <text:p>0.42</text:p>
          </table:table-cell>
          <table:table-cell office:value-type="string">
            <text:p>0.26465944269547</text:p>
          </table:table-cell>
          <table:table-cell office:value-type="string">
            <text:p>28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21:08.800Z</text:p>
          </table:table-cell>
          <table:table-cell office:value-type="string">
            <text:p>17.986</text:p>
          </table:table-cell>
          <table:table-cell office:value-type="string">
            <text:p>-66.840333333333</text:p>
          </table:table-cell>
          <table:table-cell office:value-type="string">
            <text:p>14.88</text:p>
          </table:table-cell>
          <table:table-cell office:value-type="string">
            <text:p>2.12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169</text:p>
          </table:table-cell>
          <table:table-cell office:value-type="string">
            <text:p>0.03861</text:p>
          </table:table-cell>
          <table:table-cell office:value-type="string">
            <text:p>0.19</text:p>
          </table:table-cell>
          <table:table-cell office:value-type="string">
            <text:p>pr</text:p>
          </table:table-cell>
          <table:table-cell office:value-type="string">
            <text:p>pr71523478</text:p>
          </table:table-cell>
          <table:table-cell office:value-type="string">
            <text:p>2026-07-12T11:39:07.400Z</text:p>
          </table:table-cell>
          <table:table-cell office:value-type="string">
            <text:p>2 km WSW of Indios, Puerto Rico</text:p>
          </table:table-cell>
          <table:table-cell office:value-type="string">
            <text:p>earthquake</text:p>
          </table:table-cell>
          <table:table-cell office:value-type="string">
            <text:p>0.72</text:p>
          </table:table-cell>
          <table:table-cell office:value-type="string">
            <text:p>0.93</text:p>
          </table:table-cell>
          <table:table-cell office:value-type="string">
            <text:p>0.11713536926326</text:p>
          </table:table-cell>
          <table:table-cell office:value-type="string">
            <text:p>5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2T11:11:33.520Z</text:p>
          </table:table-cell>
          <table:table-cell office:value-type="string">
            <text:p>33.720833333333</text:p>
          </table:table-cell>
          <table:table-cell office:value-type="string">
            <text:p>-116.84666666667</text:p>
          </table:table-cell>
          <table:table-cell office:value-type="string">
            <text:p>15.83</text:p>
          </table:table-cell>
          <table:table-cell office:value-type="string">
            <text:p>0.66</text:p>
          </table:table-cell>
          <table:table-cell office:value-type="string">
            <text:p>ml</text:p>
          </table:table-cell>
          <table:table-cell office:value-type="string">
            <text:p>43</text:p>
          </table:table-cell>
          <table:table-cell office:value-type="string">
            <text:p>47</text:p>
          </table:table-cell>
          <table:table-cell office:value-type="string">
            <text:p>0.0726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943</text:p>
          </table:table-cell>
          <table:table-cell office:value-type="string">
            <text:p>2026-07-12T11:14:58.884Z</text:p>
          </table:table-cell>
          <table:table-cell office:value-type="string">
            <text:p>5 km SE of Valle Vista, CA</text:p>
          </table:table-cell>
          <table:table-cell office:value-type="string">
            <text:p>earthquake</text:p>
          </table:table-cell>
          <table:table-cell office:value-type="string">
            <text:p>0.17</text:p>
          </table:table-cell>
          <table:table-cell office:value-type="string">
            <text:p>0.38</text:p>
          </table:table-cell>
          <table:table-cell office:value-type="string">
            <text:p>0.1387527475097</text:p>
          </table:table-cell>
          <table:table-cell office:value-type="string">
            <text:p>1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11:29.630Z</text:p>
          </table:table-cell>
          <table:table-cell office:value-type="string">
            <text:p>34.807833333333</text:p>
          </table:table-cell>
          <table:table-cell office:value-type="string">
            <text:p>-118.91683333333</text:p>
          </table:table-cell>
          <table:table-cell office:value-type="string">
            <text:p>13.45</text:p>
          </table:table-cell>
          <table:table-cell office:value-type="string">
            <text:p>1.46</text:p>
          </table:table-cell>
          <table:table-cell office:value-type="string">
            <text:p>ml</text:p>
          </table:table-cell>
          <table:table-cell office:value-type="string">
            <text:p>55</text:p>
          </table:table-cell>
          <table:table-cell office:value-type="string">
            <text:p>28</text:p>
          </table:table-cell>
          <table:table-cell office:value-type="string">
            <text:p>0.04039</text:p>
          </table:table-cell>
          <table:table-cell office:value-type="string">
            <text:p>0.22</text:p>
          </table:table-cell>
          <table:table-cell office:value-type="string">
            <text:p>ci</text:p>
          </table:table-cell>
          <table:table-cell office:value-type="string">
            <text:p>ci41291935</text:p>
          </table:table-cell>
          <table:table-cell office:value-type="string">
            <text:p>2026-07-12T11:22:42.020Z</text:p>
          </table:table-cell>
          <table:table-cell office:value-type="string">
            <text:p>3 km ESE of Frazier Park, CA</text:p>
          </table:table-cell>
          <table:table-cell office:value-type="string">
            <text:p>earthquake</text:p>
          </table:table-cell>
          <table:table-cell office:value-type="string">
            <text:p>0.22</text:p>
          </table:table-cell>
          <table:table-cell office:value-type="string">
            <text:p>0.36</text:p>
          </table:table-cell>
          <table:table-cell office:value-type="string">
            <text:p>0.25680782253579</text:p>
          </table:table-cell>
          <table:table-cell office:value-type="string">
            <text:p>2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10:28.400Z</text:p>
          </table:table-cell>
          <table:table-cell office:value-type="string">
            <text:p>35.8595</text:p>
          </table:table-cell>
          <table:table-cell office:value-type="string">
            <text:p>-117.66983333333</text:p>
          </table:table-cell>
          <table:table-cell office:value-type="string">
            <text:p>9.27</text:p>
          </table:table-cell>
          <table:table-cell office:value-type="string">
            <text:p>0.27</text:p>
          </table:table-cell>
          <table:table-cell office:value-type="string">
            <text:p>ml</text:p>
          </table:table-cell>
          <table:table-cell office:value-type="string">
            <text:p>16</text:p>
          </table:table-cell>
          <table:table-cell office:value-type="string">
            <text:p>90</text:p>
          </table:table-cell>
          <table:table-cell office:value-type="string">
            <text:p>0.07321</text:p>
          </table:table-cell>
          <table:table-cell office:value-type="string">
            <text:p>0.11</text:p>
          </table:table-cell>
          <table:table-cell office:value-type="string">
            <text:p>ci</text:p>
          </table:table-cell>
          <table:table-cell office:value-type="string">
            <text:p>ci41291927</text:p>
          </table:table-cell>
          <table:table-cell office:value-type="string">
            <text:p>2026-07-12T11:13:53.824Z</text:p>
          </table:table-cell>
          <table:table-cell office:value-type="string">
            <text:p>23 km ESE of Little Lake, CA</text:p>
          </table:table-cell>
          <table:table-cell office:value-type="string">
            <text:p>earthquake</text:p>
          </table:table-cell>
          <table:table-cell office:value-type="string">
            <text:p>0.21</text:p>
          </table:table-cell>
          <table:table-cell office:value-type="string">
            <text:p>0.44</text:p>
          </table:table-cell>
          <table:table-cell office:value-type="string">
            <text:p>0.16491509281423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09:45.067Z</text:p>
          </table:table-cell>
          <table:table-cell office:value-type="string">
            <text:p>-22.6035</text:p>
          </table:table-cell>
          <table:table-cell office:value-type="string">
            <text:p>-174.917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b</text:p>
          </table:table-cell>
          <table:table-cell office:value-type="string">
            <text:p>113</text:p>
          </table:table-cell>
          <table:table-cell office:value-type="string">
            <text:p>138</text:p>
          </table:table-cell>
          <table:table-cell office:value-type="string">
            <text:p>5.838</text:p>
          </table:table-cell>
          <table:table-cell office:value-type="string">
            <text:p>1.06</text:p>
          </table:table-cell>
          <table:table-cell office:value-type="string">
            <text:p>us</text:p>
          </table:table-cell>
          <table:table-cell office:value-type="string">
            <text:p>us7000szuz</text:p>
          </table:table-cell>
          <table:table-cell office:value-type="string">
            <text:p>2026-07-12T11:33:54.040Z</text:p>
          </table:table-cell>
          <table:table-cell office:value-type="string">
            <text:p>139 km S of ‘Ohonua, Tonga</text:p>
          </table:table-cell>
          <table:table-cell office:value-type="string">
            <text:p>earthquake</text:p>
          </table:table-cell>
          <table:table-cell office:value-type="string">
            <text:p>10.47</text:p>
          </table:table-cell>
          <table:table-cell office:value-type="string">
            <text:p>1.797</text:p>
          </table:table-cell>
          <table:table-cell office:value-type="string">
            <text:p>0.055</text:p>
          </table:table-cell>
          <table:table-cell office:value-type="string">
            <text:p>108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11:02:56.860Z</text:p>
          </table:table-cell>
          <table:table-cell office:value-type="string">
            <text:p>34.834833333333</text:p>
          </table:table-cell>
          <table:table-cell office:value-type="string">
            <text:p>-118.9055</text:p>
          </table:table-cell>
          <table:table-cell office:value-type="string">
            <text:p>10.23</text:p>
          </table:table-cell>
          <table:table-cell office:value-type="string">
            <text:p>1.15</text:p>
          </table:table-cell>
          <table:table-cell office:value-type="string">
            <text:p>ml</text:p>
          </table:table-cell>
          <table:table-cell office:value-type="string">
            <text:p>30</text:p>
          </table:table-cell>
          <table:table-cell office:value-type="string">
            <text:p>67</text:p>
          </table:table-cell>
          <table:table-cell office:value-type="string">
            <text:p>0.04125</text:p>
          </table:table-cell>
          <table:table-cell office:value-type="string">
            <text:p>0.2</text:p>
          </table:table-cell>
          <table:table-cell office:value-type="string">
            <text:p>ci</text:p>
          </table:table-cell>
          <table:table-cell office:value-type="string">
            <text:p>ci41291919</text:p>
          </table:table-cell>
          <table:table-cell office:value-type="string">
            <text:p>2026-07-12T11:06:19.727Z</text:p>
          </table:table-cell>
          <table:table-cell office:value-type="string">
            <text:p>4 km WSW of Lebec, CA</text:p>
          </table:table-cell>
          <table:table-cell office:value-type="string">
            <text:p>earthquake</text:p>
          </table:table-cell>
          <table:table-cell office:value-type="string">
            <text:p>0.25</text:p>
          </table:table-cell>
          <table:table-cell office:value-type="string">
            <text:p>0.45</text:p>
          </table:table-cell>
          <table:table-cell office:value-type="string">
            <text:p>0.36757240178636</text:p>
          </table:table-cell>
          <table:table-cell office:value-type="string">
            <text:p>2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02:41.218Z</text:p>
          </table:table-cell>
          <table:table-cell office:value-type="string">
            <text:p>62.244</text:p>
          </table:table-cell>
          <table:table-cell office:value-type="string">
            <text:p>-151.06</text:p>
          </table:table-cell>
          <table:table-cell office:value-type="string">
            <text:p>76.4</text:p>
          </table:table-cell>
          <table:table-cell office:value-type="string">
            <text:p>2.3</text:p>
          </table:table-cell>
          <table:table-cell office:value-type="string">
            <text:p>ml</text:p>
          </table:table-cell>
          <table:table-cell office:value-type="string">
            <text:p>68</text:p>
          </table:table-cell>
          <table:table-cell office:value-type="string">
            <text:p>74</text:p>
          </table:table-cell>
          <table:table-cell office:value-type="string">
            <text:p>0.3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rmhru</text:p>
          </table:table-cell>
          <table:table-cell office:value-type="string">
            <text:p>2026-07-12T11:04:14.928Z</text:p>
          </table:table-cell>
          <table:table-cell office:value-type="string">
            <text:p>31 km SSW of Petersville, Alaska</text:p>
          </table:table-cell>
          <table:table-cell office:value-type="string">
            <text:p>earthquake</text:p>
          </table:table-cell>
          <table:table-cell office:value-type="string">
            <text:p>2.9</text:p>
          </table:table-cell>
          <table:table-cell office:value-type="string">
            <text:p>2.6176</text:p>
          </table:table-cell>
          <table:table-cell office:value-type="string">
            <text:p>0.3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11:02:13.710Z</text:p>
          </table:table-cell>
          <table:table-cell office:value-type="string">
            <text:p>34.826833333333</text:p>
          </table:table-cell>
          <table:table-cell office:value-type="string">
            <text:p>-118.90233333333</text:p>
          </table:table-cell>
          <table:table-cell office:value-type="string">
            <text:p>10.39</text:p>
          </table:table-cell>
          <table:table-cell office:value-type="string">
            <text:p>1.46</text:p>
          </table:table-cell>
          <table:table-cell office:value-type="string">
            <text:p>ml</text:p>
          </table:table-cell>
          <table:table-cell office:value-type="string">
            <text:p>52</text:p>
          </table:table-cell>
          <table:table-cell office:value-type="string">
            <text:p>28</text:p>
          </table:table-cell>
          <table:table-cell office:value-type="string">
            <text:p>0.03431</text:p>
          </table:table-cell>
          <table:table-cell office:value-type="string">
            <text:p>0.26</text:p>
          </table:table-cell>
          <table:table-cell office:value-type="string">
            <text:p>ci</text:p>
          </table:table-cell>
          <table:table-cell office:value-type="string">
            <text:p>ci41291911</text:p>
          </table:table-cell>
          <table:table-cell office:value-type="string">
            <text:p>2026-07-12T11:05:40.026Z</text:p>
          </table:table-cell>
          <table:table-cell office:value-type="string">
            <text:p>4 km WSW of Lebec, CA</text:p>
          </table:table-cell>
          <table:table-cell office:value-type="string">
            <text:p>earthquake</text:p>
          </table:table-cell>
          <table:table-cell office:value-type="string">
            <text:p>0.25</text:p>
          </table:table-cell>
          <table:table-cell office:value-type="string">
            <text:p>0.41</text:p>
          </table:table-cell>
          <table:table-cell office:value-type="string">
            <text:p>0.17895889808263</text:p>
          </table:table-cell>
          <table:table-cell office:value-type="string">
            <text:p>28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1:02:10.880Z</text:p>
          </table:table-cell>
          <table:table-cell office:value-type="string">
            <text:p>34.836666107178</text:p>
          </table:table-cell>
          <table:table-cell office:value-type="string">
            <text:p>-118.90950012207</text:p>
          </table:table-cell>
          <table:table-cell office:value-type="string">
            <text:p>12.14999961853</text:p>
          </table:table-cell>
          <table:table-cell office:value-type="string">
            <text:p>1.3099892442828</text:p>
          </table:table-cell>
          <table:table-cell office:value-type="string">
            <text:p>ml</text:p>
          </table:table-cell>
          <table:table-cell office:value-type="string">
            <text:p>14</text:p>
          </table:table-cell>
          <table:table-cell office:value-type="string">
            <text:p>77</text:p>
          </table:table-cell>
          <table:table-cell office:value-type="string">
            <text:p>0.04494</text:p>
          </table:table-cell>
          <table:table-cell office:value-type="string">
            <text:p>0.200000003</text:p>
          </table:table-cell>
          <table:table-cell office:value-type="string">
            <text:p>ci</text:p>
          </table:table-cell>
          <table:table-cell office:value-type="string">
            <text:p>ci41291903</text:p>
          </table:table-cell>
          <table:table-cell office:value-type="string">
            <text:p>2026-07-12T11:04:13.406Z</text:p>
          </table:table-cell>
          <table:table-cell office:value-type="string">
            <text:p>4 km ENE of Frazier Park, CA</text:p>
          </table:table-cell>
          <table:table-cell office:value-type="string">
            <text:p>earthquake</text:p>
          </table:table-cell>
          <table:table-cell office:value-type="string">
            <text:p>0.61</text:p>
          </table:table-cell>
          <table:table-cell office:value-type="string">
            <text:p>1.05999994</text:p>
          </table:table-cell>
          <table:table-cell office:value-type="string">
            <text:p>0.36953482031822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56:56.250Z</text:p>
          </table:table-cell>
          <table:table-cell office:value-type="string">
            <text:p>39.291999816895</text:p>
          </table:table-cell>
          <table:table-cell office:value-type="string">
            <text:p>-123.23899841309</text:p>
          </table:table-cell>
          <table:table-cell office:value-type="string">
            <text:p>4.4899997711182</text:p>
          </table:table-cell>
          <table:table-cell office:value-type="string">
            <text:p>1.34</text:p>
          </table:table-cell>
          <table:table-cell office:value-type="string">
            <text:p>md</text:p>
          </table:table-cell>
          <table:table-cell office:value-type="string">
            <text:p>9</text:p>
          </table:table-cell>
          <table:table-cell office:value-type="string">
            <text:p>73</text:p>
          </table:table-cell>
          <table:table-cell office:value-type="string">
            <text:p>0.03465</text:p>
          </table:table-cell>
          <table:table-cell office:value-type="string">
            <text:p>0.04</text:p>
          </table:table-cell>
          <table:table-cell office:value-type="string">
            <text:p>nc</text:p>
          </table:table-cell>
          <table:table-cell office:value-type="string">
            <text:p>nc75394406</text:p>
          </table:table-cell>
          <table:table-cell office:value-type="string">
            <text:p>2026-07-12T11:32:20.722Z</text:p>
          </table:table-cell>
          <table:table-cell office:value-type="string">
            <text:p>4 km NW of Redwood Valley, CA</text:p>
          </table:table-cell>
          <table:table-cell office:value-type="string">
            <text:p>earthquake</text:p>
          </table:table-cell>
          <table:table-cell office:value-type="string">
            <text:p>0.3</text:p>
          </table:table-cell>
          <table:table-cell office:value-type="string">
            <text:p>0.930000007</text:p>
          </table:table-cell>
          <table:table-cell office:value-type="string">
            <text:p>0.06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10:51:15.930Z</text:p>
          </table:table-cell>
          <table:table-cell office:value-type="string">
            <text:p>34.802333333333</text:p>
          </table:table-cell>
          <table:table-cell office:value-type="string">
            <text:p>-118.93366666667</text:p>
          </table:table-cell>
          <table:table-cell office:value-type="string">
            <text:p>12.41</text:p>
          </table:table-cell>
          <table:table-cell office:value-type="string">
            <text:p>0.75</text:p>
          </table:table-cell>
          <table:table-cell office:value-type="string">
            <text:p>ml</text:p>
          </table:table-cell>
          <table:table-cell office:value-type="string">
            <text:p>27</text:p>
          </table:table-cell>
          <table:table-cell office:value-type="string">
            <text:p>77</text:p>
          </table:table-cell>
          <table:table-cell office:value-type="string">
            <text:p>0.03995</text:p>
          </table:table-cell>
          <table:table-cell office:value-type="string">
            <text:p>0.19</text:p>
          </table:table-cell>
          <table:table-cell office:value-type="string">
            <text:p>ci</text:p>
          </table:table-cell>
          <table:table-cell office:value-type="string">
            <text:p>ci41291895</text:p>
          </table:table-cell>
          <table:table-cell office:value-type="string">
            <text:p>2026-07-12T10:54:44.671Z</text:p>
          </table:table-cell>
          <table:table-cell office:value-type="string">
            <text:p>2 km SSE of Frazier Park, CA</text:p>
          </table:table-cell>
          <table:table-cell office:value-type="string">
            <text:p>earthquake</text:p>
          </table:table-cell>
          <table:table-cell office:value-type="string">
            <text:p>0.28</text:p>
          </table:table-cell>
          <table:table-cell office:value-type="string">
            <text:p>0.5</text:p>
          </table:table-cell>
          <table:table-cell office:value-type="string">
            <text:p>0.34298516618808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48:15.831Z</text:p>
          </table:table-cell>
          <table:table-cell office:value-type="string">
            <text:p>58.668</text:p>
          </table:table-cell>
          <table:table-cell office:value-type="string">
            <text:p>-154.398</text:p>
          </table:table-cell>
          <table:table-cell office:value-type="string">
            <text:p>3.3</text:p>
          </table:table-cell>
          <table:table-cell office:value-type="string">
            <text:p>0.8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149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ak</text:p>
          </table:table-cell>
          <table:table-cell office:value-type="string">
            <text:p>aka2026nrlvfe</text:p>
          </table:table-cell>
          <table:table-cell office:value-type="string">
            <text:p>2026-07-12T10:49:25.025Z</text:p>
          </table:table-cell>
          <table:table-cell office:value-type="string">
            <text:p>88 km SSE of Kokhanok, Alaska</text:p>
          </table:table-cell>
          <table:table-cell office:value-type="string">
            <text:p>earthquake</text:p>
          </table:table-cell>
          <table:table-cell office:value-type="string">
            <text:p>19.7</text:p>
          </table:table-cell>
          <table:table-cell office:value-type="string">
            <text:p>38.6728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10:47:59.780Z</text:p>
          </table:table-cell>
          <table:table-cell office:value-type="string">
            <text:p>34.803333333333</text:p>
          </table:table-cell>
          <table:table-cell office:value-type="string">
            <text:p>-118.924</text:p>
          </table:table-cell>
          <table:table-cell office:value-type="string">
            <text:p>12.66</text:p>
          </table:table-cell>
          <table:table-cell office:value-type="string">
            <text:p>1.24</text:p>
          </table:table-cell>
          <table:table-cell office:value-type="string">
            <text:p>ml</text:p>
          </table:table-cell>
          <table:table-cell office:value-type="string">
            <text:p>42</text:p>
          </table:table-cell>
          <table:table-cell office:value-type="string">
            <text:p>29</text:p>
          </table:table-cell>
          <table:table-cell office:value-type="string">
            <text:p>0.04648</text:p>
          </table:table-cell>
          <table:table-cell office:value-type="string">
            <text:p>0.22</text:p>
          </table:table-cell>
          <table:table-cell office:value-type="string">
            <text:p>ci</text:p>
          </table:table-cell>
          <table:table-cell office:value-type="string">
            <text:p>ci41291887</text:p>
          </table:table-cell>
          <table:table-cell office:value-type="string">
            <text:p>2026-07-12T10:51:27.158Z</text:p>
          </table:table-cell>
          <table:table-cell office:value-type="string">
            <text:p>3 km SE of Frazier Park, CA</text:p>
          </table:table-cell>
          <table:table-cell office:value-type="string">
            <text:p>earthquake</text:p>
          </table:table-cell>
          <table:table-cell office:value-type="string">
            <text:p>0.27</text:p>
          </table:table-cell>
          <table:table-cell office:value-type="string">
            <text:p>0.47</text:p>
          </table:table-cell>
          <table:table-cell office:value-type="string">
            <text:p>0.32361669410075</text:p>
          </table:table-cell>
          <table:table-cell office:value-type="string">
            <text:p>2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42:43.730Z</text:p>
          </table:table-cell>
          <table:table-cell office:value-type="string">
            <text:p>34.585334777832</text:p>
          </table:table-cell>
          <table:table-cell office:value-type="string">
            <text:p>-118.8424987793</text:p>
          </table:table-cell>
          <table:table-cell office:value-type="string">
            <text:p>28.680000305176</text:p>
          </table:table-cell>
          <table:table-cell office:value-type="string">
            <text:p>1.5389793039517</text:p>
          </table:table-cell>
          <table:table-cell office:value-type="string">
            <text:p>ml</text:p>
          </table:table-cell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.1449</text:p>
          </table:table-cell>
          <table:table-cell office:value-type="string">
            <text:p>0.129999995</text:p>
          </table:table-cell>
          <table:table-cell office:value-type="string">
            <text:p>ci</text:p>
          </table:table-cell>
          <table:table-cell office:value-type="string">
            <text:p>ci41291879</text:p>
          </table:table-cell>
          <table:table-cell office:value-type="string">
            <text:p>2026-07-12T10:46:12.920Z</text:p>
          </table:table-cell>
          <table:table-cell office:value-type="string">
            <text:p>19 km NNW of Piru, CA</text:p>
          </table:table-cell>
          <table:table-cell office:value-type="string">
            <text:p>earthquake</text:p>
          </table:table-cell>
          <table:table-cell office:value-type="string">
            <text:p>0.9</text:p>
          </table:table-cell>
          <table:table-cell office:value-type="string">
            <text:p>1.13</text:p>
          </table:table-cell>
          <table:table-cell office:value-type="string">
            <text:p>0.43560490012169</text:p>
          </table:table-cell>
          <table:table-cell office:value-type="string">
            <text:p>2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40:45.670Z</text:p>
          </table:table-cell>
          <table:table-cell office:value-type="string">
            <text:p>34.799</text:p>
          </table:table-cell>
          <table:table-cell office:value-type="string">
            <text:p>-118.93266666667</text:p>
          </table:table-cell>
          <table:table-cell office:value-type="string">
            <text:p>12.54</text:p>
          </table:table-cell>
          <table:table-cell office:value-type="string">
            <text:p>1.86</text:p>
          </table:table-cell>
          <table:table-cell office:value-type="string">
            <text:p>ml</text:p>
          </table:table-cell>
          <table:table-cell office:value-type="string">
            <text:p>36</text:p>
          </table:table-cell>
          <table:table-cell office:value-type="string">
            <text:p>42</text:p>
          </table:table-cell>
          <table:table-cell office:value-type="string">
            <text:p>0.03842</text:p>
          </table:table-cell>
          <table:table-cell office:value-type="string">
            <text:p>0.21</text:p>
          </table:table-cell>
          <table:table-cell office:value-type="string">
            <text:p>ci</text:p>
          </table:table-cell>
          <table:table-cell office:value-type="string">
            <text:p>ci41291871</text:p>
          </table:table-cell>
          <table:table-cell office:value-type="string">
            <text:p>2026-07-12T10:44:23.339Z</text:p>
          </table:table-cell>
          <table:table-cell office:value-type="string">
            <text:p>3 km SSE of Frazier Park, CA</text:p>
          </table:table-cell>
          <table:table-cell office:value-type="string">
            <text:p>earthquake</text:p>
          </table:table-cell>
          <table:table-cell office:value-type="string">
            <text:p>0.27</text:p>
          </table:table-cell>
          <table:table-cell office:value-type="string">
            <text:p>0.46</text:p>
          </table:table-cell>
          <table:table-cell office:value-type="string">
            <text:p>0.16475445996847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38:04.720Z</text:p>
          </table:table-cell>
          <table:table-cell office:value-type="string">
            <text:p>34.817832946777</text:p>
          </table:table-cell>
          <table:table-cell office:value-type="string">
            <text:p>-118.92900085449</text:p>
          </table:table-cell>
          <table:table-cell office:value-type="string">
            <text:p>13.119999885559</text:p>
          </table:table-cell>
          <table:table-cell office:value-type="string">
            <text:p>4.1816630290851</text:p>
          </table:table-cell>
          <table:table-cell office:value-type="string">
            <text:p>mw</text:p>
          </table:table-cell>
          <table:table-cell office:value-type="string">
            <text:p>120</text:p>
          </table:table-cell>
          <table:table-cell office:value-type="string">
            <text:p>28</text:p>
          </table:table-cell>
          <table:table-cell office:value-type="string">
            <text:p>0.05398</text:p>
          </table:table-cell>
          <table:table-cell office:value-type="string">
            <text:p>0.330000013</text:p>
          </table:table-cell>
          <table:table-cell office:value-type="string">
            <text:p>ci</text:p>
          </table:table-cell>
          <table:table-cell office:value-type="string">
            <text:p>ci41291863</text:p>
          </table:table-cell>
          <table:table-cell office:value-type="string">
            <text:p>2026-07-12T11:53:20.616Z</text:p>
          </table:table-cell>
          <table:table-cell office:value-type="string">
            <text:p>2 km ESE of Frazier Park, CA</text:p>
          </table:table-cell>
          <table:table-cell office:value-type="string">
            <text:p>earthquake</text:p>
          </table:table-cell>
          <table:table-cell office:value-type="string">
            <text:p>0.33</text:p>
          </table:table-cell>
          <table:table-cell office:value-type="string">
            <text:p>0.720000029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reviewed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35:19.426Z</text:p>
          </table:table-cell>
          <table:table-cell office:value-type="string">
            <text:p>57.257</text:p>
          </table:table-cell>
          <table:table-cell office:value-type="string">
            <text:p>-155.584</text:p>
          </table:table-cell>
          <table:table-cell office:value-type="string">
            <text:p>77.7</text:p>
          </table:table-cell>
          <table:table-cell office:value-type="string">
            <text:p>2.1</text:p>
          </table:table-cell>
          <table:table-cell office:value-type="string">
            <text:p>ml</text:p>
          </table:table-cell>
          <table:table-cell office:value-type="string">
            <text:p>34</text:p>
          </table:table-cell>
          <table:table-cell office:value-type="string">
            <text:p>17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ak</text:p>
          </table:table-cell>
          <table:table-cell office:value-type="string">
            <text:p>aka2026nrljyn</text:p>
          </table:table-cell>
          <table:table-cell office:value-type="string">
            <text:p>2026-07-12T10:36:54.174Z</text:p>
          </table:table-cell>
          <table:table-cell office:value-type="string">
            <text:p>76 km WSW of Karluk, Alaska</text:p>
          </table:table-cell>
          <table:table-cell office:value-type="string">
            <text:p>earthquake</text:p>
          </table:table-cell>
          <table:table-cell office:value-type="string">
            <text:p>7.6</text:p>
          </table:table-cell>
          <table:table-cell office:value-type="string">
            <text:p>4.7169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10:33:52.690Z</text:p>
          </table:table-cell>
          <table:table-cell office:value-type="string">
            <text:p>38.814167022705</text:p>
          </table:table-cell>
          <table:table-cell office:value-type="string">
            <text:p>-122.78583526611</text:p>
          </table:table-cell>
          <table:table-cell office:value-type="string">
            <text:p>1.5599999427795</text:p>
          </table:table-cell>
          <table:table-cell office:value-type="string">
            <text:p>0.7</text:p>
          </table:table-cell>
          <table:table-cell office:value-type="string">
            <text:p>md</text:p>
          </table:table-cell>
          <table:table-cell office:value-type="string">
            <text:p>8</text:p>
          </table:table-cell>
          <table:table-cell office:value-type="string">
            <text:p>148</text:p>
          </table:table-cell>
          <table:table-cell office:value-type="string">
            <text:p>0.009645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396</text:p>
          </table:table-cell>
          <table:table-cell office:value-type="string">
            <text:p>2026-07-12T10:35:28.748Z</text:p>
          </table:table-cell>
          <table:table-cell office:value-type="string">
            <text:p>5 km NNW of The Geysers, CA</text:p>
          </table:table-cell>
          <table:table-cell office:value-type="string">
            <text:p>earthquake</text:p>
          </table:table-cell>
          <table:table-cell office:value-type="string">
            <text:p>0.9</text:p>
          </table:table-cell>
          <table:table-cell office:value-type="string">
            <text:p>1.10000002</text:p>
          </table:table-cell>
          <table:table-cell office:value-type="string">
            <text:p>0.23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10:27:38.300Z</text:p>
          </table:table-cell>
          <table:table-cell office:value-type="string">
            <text:p>17.992833333333</text:p>
          </table:table-cell>
          <table:table-cell office:value-type="string">
            <text:p>-66.8285</text:p>
          </table:table-cell>
          <table:table-cell office:value-type="string">
            <text:p>12.91</text:p>
          </table:table-cell>
          <table:table-cell office:value-type="string">
            <text:p>2.24</text:p>
          </table:table-cell>
          <table:table-cell office:value-type="string">
            <text:p>md</text:p>
          </table:table-cell>
          <table:table-cell office:value-type="string">
            <text:p>6</text:p>
          </table:table-cell>
          <table:table-cell office:value-type="string">
            <text:p>175</text:p>
          </table:table-cell>
          <table:table-cell office:value-type="string">
            <text:p>0.05144</text:p>
          </table:table-cell>
          <table:table-cell office:value-type="string">
            <text:p>0.12</text:p>
          </table:table-cell>
          <table:table-cell office:value-type="string">
            <text:p>pr</text:p>
          </table:table-cell>
          <table:table-cell office:value-type="string">
            <text:p>pr71523468</text:p>
          </table:table-cell>
          <table:table-cell office:value-type="string">
            <text:p>2026-07-12T10:44:47.950Z</text:p>
          </table:table-cell>
          <table:table-cell office:value-type="string">
            <text:p>0 km W of Indios, Puerto Rico</text:p>
          </table:table-cell>
          <table:table-cell office:value-type="string">
            <text:p>earthquake</text:p>
          </table:table-cell>
          <table:table-cell office:value-type="string">
            <text:p>1.48</text:p>
          </table:table-cell>
          <table:table-cell office:value-type="string">
            <text:p>0.74</text:p>
          </table:table-cell>
          <table:table-cell office:value-type="string">
            <text:p>0.077260501839774</text:p>
          </table:table-cell>
          <table:table-cell office:value-type="string">
            <text:p>3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2T10:27:20.740Z</text:p>
          </table:table-cell>
          <table:table-cell office:value-type="string">
            <text:p>33.925</text:p>
          </table:table-cell>
          <table:table-cell office:value-type="string">
            <text:p>-116.8065</text:p>
          </table:table-cell>
          <table:table-cell office:value-type="string">
            <text:p>15.94</text:p>
          </table:table-cell>
          <table:table-cell office:value-type="string">
            <text:p>1.39</text:p>
          </table:table-cell>
          <table:table-cell office:value-type="string">
            <text:p>ml</text:p>
          </table:table-cell>
          <table:table-cell office:value-type="string">
            <text:p>76</text:p>
          </table:table-cell>
          <table:table-cell office:value-type="string">
            <text:p>23</text:p>
          </table:table-cell>
          <table:table-cell office:value-type="string">
            <text:p>0.02175</text:p>
          </table:table-cell>
          <table:table-cell office:value-type="string">
            <text:p>0.18</text:p>
          </table:table-cell>
          <table:table-cell office:value-type="string">
            <text:p>ci</text:p>
          </table:table-cell>
          <table:table-cell office:value-type="string">
            <text:p>ci41291855</text:p>
          </table:table-cell>
          <table:table-cell office:value-type="string">
            <text:p>2026-07-12T10:38:19.070Z</text:p>
          </table:table-cell>
          <table:table-cell office:value-type="string">
            <text:p>2 km WNW of Cabazon, CA</text:p>
          </table:table-cell>
          <table:table-cell office:value-type="string">
            <text:p>earthquake</text:p>
          </table:table-cell>
          <table:table-cell office:value-type="string">
            <text:p>0.14</text:p>
          </table:table-cell>
          <table:table-cell office:value-type="string">
            <text:p>0.33</text:p>
          </table:table-cell>
          <table:table-cell office:value-type="string">
            <text:p>0.22990225515222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15:54.340Z</text:p>
          </table:table-cell>
          <table:table-cell office:value-type="string">
            <text:p>33.661833333333</text:p>
          </table:table-cell>
          <table:table-cell office:value-type="string">
            <text:p>-116.70166666667</text:p>
          </table:table-cell>
          <table:table-cell office:value-type="string">
            <text:p>14.54</text:p>
          </table:table-cell>
          <table:table-cell office:value-type="string">
            <text:p>0.39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99</text:p>
          </table:table-cell>
          <table:table-cell office:value-type="string">
            <text:p>0.08514</text:p>
          </table:table-cell>
          <table:table-cell office:value-type="string">
            <text:p>0.12</text:p>
          </table:table-cell>
          <table:table-cell office:value-type="string">
            <text:p>ci</text:p>
          </table:table-cell>
          <table:table-cell office:value-type="string">
            <text:p>ci41291847</text:p>
          </table:table-cell>
          <table:table-cell office:value-type="string">
            <text:p>2026-07-12T10:19:30.037Z</text:p>
          </table:table-cell>
          <table:table-cell office:value-type="string">
            <text:p>9 km S of Idyllwild, CA</text:p>
          </table:table-cell>
          <table:table-cell office:value-type="string">
            <text:p>earthquake</text:p>
          </table:table-cell>
          <table:table-cell office:value-type="string">
            <text:p>0.27</text:p>
          </table:table-cell>
          <table:table-cell office:value-type="string">
            <text:p>0.37</text:p>
          </table:table-cell>
          <table:table-cell office:value-type="string">
            <text:p>0.12773949129809</text:p>
          </table:table-cell>
          <table:table-cell office:value-type="string">
            <text:p>3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15:41.750Z</text:p>
          </table:table-cell>
          <table:table-cell office:value-type="string">
            <text:p>33.671833333333</text:p>
          </table:table-cell>
          <table:table-cell office:value-type="string">
            <text:p>-116.69883333333</text:p>
          </table:table-cell>
          <table:table-cell office:value-type="string">
            <text:p>15.03</text:p>
          </table:table-cell>
          <table:table-cell office:value-type="string">
            <text:p>0.56</text:p>
          </table:table-cell>
          <table:table-cell office:value-type="string">
            <text:p>ml</text:p>
          </table:table-cell>
          <table:table-cell office:value-type="string">
            <text:p>30</text:p>
          </table:table-cell>
          <table:table-cell office:value-type="string">
            <text:p>63</text:p>
          </table:table-cell>
          <table:table-cell office:value-type="string">
            <text:p>0.07566</text:p>
          </table:table-cell>
          <table:table-cell office:value-type="string">
            <text:p>0.14</text:p>
          </table:table-cell>
          <table:table-cell office:value-type="string">
            <text:p>ci</text:p>
          </table:table-cell>
          <table:table-cell office:value-type="string">
            <text:p>ci41291839</text:p>
          </table:table-cell>
          <table:table-cell office:value-type="string">
            <text:p>2026-07-12T10:19:25.957Z</text:p>
          </table:table-cell>
          <table:table-cell office:value-type="string">
            <text:p>8 km SSE of Idyllwild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37</text:p>
          </table:table-cell>
          <table:table-cell office:value-type="string">
            <text:p>0.15686079345052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15:07.390Z</text:p>
          </table:table-cell>
          <table:table-cell office:value-type="string">
            <text:p>35.945333333333</text:p>
          </table:table-cell>
          <table:table-cell office:value-type="string">
            <text:p>-117.67966666667</text:p>
          </table:table-cell>
          <table:table-cell office:value-type="string">
            <text:p>4.99</text:p>
          </table:table-cell>
          <table:table-cell office:value-type="string">
            <text:p>0.5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53</text:p>
          </table:table-cell>
          <table:table-cell office:value-type="string">
            <text:p>0.0239</text:p>
          </table:table-cell>
          <table:table-cell office:value-type="string">
            <text:p>0.11</text:p>
          </table:table-cell>
          <table:table-cell office:value-type="string">
            <text:p>ci</text:p>
          </table:table-cell>
          <table:table-cell office:value-type="string">
            <text:p>ci41291831</text:p>
          </table:table-cell>
          <table:table-cell office:value-type="string">
            <text:p>2026-07-12T10:18:40.123Z</text:p>
          </table:table-cell>
          <table:table-cell office:value-type="string">
            <text:p>20 km E of Little Lake, CA</text:p>
          </table:table-cell>
          <table:table-cell office:value-type="string">
            <text:p>earthquake</text:p>
          </table:table-cell>
          <table:table-cell office:value-type="string">
            <text:p>0.16</text:p>
          </table:table-cell>
          <table:table-cell office:value-type="string">
            <text:p>0.37</text:p>
          </table:table-cell>
          <table:table-cell office:value-type="string">
            <text:p>0.13720103799661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10:10:02.902Z</text:p>
          </table:table-cell>
          <table:table-cell office:value-type="string">
            <text:p>-20.7542</text:p>
          </table:table-cell>
          <table:table-cell office:value-type="string">
            <text:p>-178.3336</text:p>
          </table:table-cell>
          <table:table-cell office:value-type="string">
            <text:p>571.881</text:p>
          </table:table-cell>
          <table:table-cell office:value-type="string">
            <text:p>4.2</text:p>
          </table:table-cell>
          <table:table-cell office:value-type="string">
            <text:p>mb</text:p>
          </table:table-cell>
          <table:table-cell office:value-type="string">
            <text:p>68</text:p>
          </table:table-cell>
          <table:table-cell office:value-type="string">
            <text:p>136</text:p>
          </table:table-cell>
          <table:table-cell office:value-type="string">
            <text:p>4.54</text:p>
          </table:table-cell>
          <table:table-cell office:value-type="string">
            <text:p>0.76</text:p>
          </table:table-cell>
          <table:table-cell office:value-type="string">
            <text:p>us</text:p>
          </table:table-cell>
          <table:table-cell office:value-type="string">
            <text:p>us7000szut</text:p>
          </table:table-cell>
          <table:table-cell office:value-type="string">
            <text:p>2026-07-12T10:32:00.040Z</text:p>
          </table:table-cell>
          <table:table-cell office:value-type="string">
            <text:p>Fiji region</text:p>
          </table:table-cell>
          <table:table-cell office:value-type="string">
            <text:p>earthquake</text:p>
          </table:table-cell>
          <table:table-cell office:value-type="string">
            <text:p>14.35</text:p>
          </table:table-cell>
          <table:table-cell office:value-type="string">
            <text:p>8.055</text:p>
          </table:table-cell>
          <table:table-cell office:value-type="string">
            <text:p>0.059</text:p>
          </table:table-cell>
          <table:table-cell office:value-type="string">
            <text:p>78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10:05:37.142Z</text:p>
          </table:table-cell>
          <table:table-cell office:value-type="string">
            <text:p>0.2198</text:p>
          </table:table-cell>
          <table:table-cell office:value-type="string">
            <text:p>122.4111</text:p>
          </table:table-cell>
          <table:table-cell office:value-type="string">
            <text:p>152.278</text:p>
          </table:table-cell>
          <table:table-cell office:value-type="string">
            <text:p>4.7</text:p>
          </table:table-cell>
          <table:table-cell office:value-type="string">
            <text:p>mb</text:p>
          </table:table-cell>
          <table:table-cell office:value-type="string">
            <text:p>68</text:p>
          </table:table-cell>
          <table:table-cell office:value-type="string">
            <text:p>76</text:p>
          </table:table-cell>
          <table:table-cell office:value-type="string">
            <text:p>5.838</text:p>
          </table:table-cell>
          <table:table-cell office:value-type="string">
            <text:p>0.83</text:p>
          </table:table-cell>
          <table:table-cell office:value-type="string">
            <text:p>us</text:p>
          </table:table-cell>
          <table:table-cell office:value-type="string">
            <text:p>us7000szus</text:p>
          </table:table-cell>
          <table:table-cell office:value-type="string">
            <text:p>2026-07-12T10:22:54.040Z</text:p>
          </table:table-cell>
          <table:table-cell office:value-type="string">
            <text:p>80 km WSW of Gorontalo, Indonesia</text:p>
          </table:table-cell>
          <table:table-cell office:value-type="string">
            <text:p>earthquake</text:p>
          </table:table-cell>
          <table:table-cell office:value-type="string">
            <text:p>11.16</text:p>
          </table:table-cell>
          <table:table-cell office:value-type="string">
            <text:p>7.381</text:p>
          </table:table-cell>
          <table:table-cell office:value-type="string">
            <text:p>0.068</text:p>
          </table:table-cell>
          <table:table-cell office:value-type="string">
            <text:p>66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10:02:07.680Z</text:p>
          </table:table-cell>
          <table:table-cell office:value-type="string">
            <text:p>35.727166666667</text:p>
          </table:table-cell>
          <table:table-cell office:value-type="string">
            <text:p>-117.55716666667</text:p>
          </table:table-cell>
          <table:table-cell office:value-type="string">
            <text:p>5.39</text:p>
          </table:table-cell>
          <table:table-cell office:value-type="string">
            <text:p>0.58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87</text:p>
          </table:table-cell>
          <table:table-cell office:value-type="string">
            <text:p>0.09428</text:p>
          </table:table-cell>
          <table:table-cell office:value-type="string">
            <text:p>0.15</text:p>
          </table:table-cell>
          <table:table-cell office:value-type="string">
            <text:p>ci</text:p>
          </table:table-cell>
          <table:table-cell office:value-type="string">
            <text:p>ci41291823</text:p>
          </table:table-cell>
          <table:table-cell office:value-type="string">
            <text:p>2026-07-12T10:05:34.062Z</text:p>
          </table:table-cell>
          <table:table-cell office:value-type="string">
            <text:p>15 km WSW of Searles Valley, CA</text:p>
          </table:table-cell>
          <table:table-cell office:value-type="string">
            <text:p>earthquake</text:p>
          </table:table-cell>
          <table:table-cell office:value-type="string">
            <text:p>0.24</text:p>
          </table:table-cell>
          <table:table-cell office:value-type="string">
            <text:p>1.27</text:p>
          </table:table-cell>
          <table:table-cell office:value-type="string">
            <text:p>0.080293998134092</text:p>
          </table:table-cell>
          <table:table-cell office:value-type="string">
            <text:p>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9:59:17.450Z</text:p>
          </table:table-cell>
          <table:table-cell office:value-type="string">
            <text:p>38.835834503174</text:p>
          </table:table-cell>
          <table:table-cell office:value-type="string">
            <text:p>-122.81183624268</text:p>
          </table:table-cell>
          <table:table-cell office:value-type="string">
            <text:p>2.1099998950958</text:p>
          </table:table-cell>
          <table:table-cell office:value-type="string">
            <text:p>0.75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68</text:p>
          </table:table-cell>
          <table:table-cell office:value-type="string">
            <text:p>0.0125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391</text:p>
          </table:table-cell>
          <table:table-cell office:value-type="string">
            <text:p>2026-07-12T10:00:54.592Z</text:p>
          </table:table-cell>
          <table:table-cell office:value-type="string">
            <text:p>8 km WNW of Cobb, CA</text:p>
          </table:table-cell>
          <table:table-cell office:value-type="string">
            <text:p>earthquake</text:p>
          </table:table-cell>
          <table:table-cell office:value-type="string">
            <text:p>0.38</text:p>
          </table:table-cell>
          <table:table-cell office:value-type="string">
            <text:p>1.01999998</text:p>
          </table:table-cell>
          <table:table-cell office:value-type="string">
            <text:p>0.1</text:p>
          </table:table-cell>
          <table:table-cell office:value-type="string">
            <text:p>11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9:52:58.913Z</text:p>
          </table:table-cell>
          <table:table-cell office:value-type="string">
            <text:p>61.799</text:p>
          </table:table-cell>
          <table:table-cell office:value-type="string">
            <text:p>-150.233</text:p>
          </table:table-cell>
          <table:table-cell office:value-type="string">
            <text:p>35.5</text:p>
          </table:table-cell>
          <table:table-cell office:value-type="string">
            <text:p>1.9</text:p>
          </table:table-cell>
          <table:table-cell office:value-type="string">
            <text:p>ml</text:p>
          </table:table-cell>
          <table:table-cell office:value-type="string">
            <text:p>45</text:p>
          </table:table-cell>
          <table:table-cell office:value-type="string">
            <text:p>63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rjzgo</text:p>
          </table:table-cell>
          <table:table-cell office:value-type="string">
            <text:p>2026-07-12T09:55:19.973Z</text:p>
          </table:table-cell>
          <table:table-cell office:value-type="string">
            <text:p>11 km WNW of Willow, Alaska</text:p>
          </table:table-cell>
          <table:table-cell office:value-type="string">
            <text:p>earthquake</text:p>
          </table:table-cell>
          <table:table-cell office:value-type="string">
            <text:p>2.4</text:p>
          </table:table-cell>
          <table:table-cell office:value-type="string">
            <text:p>5.6836</text:p>
          </table:table-cell>
          <table:table-cell office:value-type="string">
            <text:p>0.2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9:51:23.917Z</text:p>
          </table:table-cell>
          <table:table-cell office:value-type="string">
            <text:p>56.797</text:p>
          </table:table-cell>
          <table:table-cell office:value-type="string">
            <text:p>-153.094</text:p>
          </table:table-cell>
          <table:table-cell office:value-type="string">
            <text:p>22.1</text:p>
          </table:table-cell>
          <table:table-cell office:value-type="string">
            <text:p>2.2</text:p>
          </table:table-cell>
          <table:table-cell office:value-type="string">
            <text:p>ml</text:p>
          </table:table-cell>
          <table:table-cell office:value-type="string">
            <text:p>17</text:p>
          </table:table-cell>
          <table:table-cell office:value-type="string">
            <text:p>230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rjxxc</text:p>
          </table:table-cell>
          <table:table-cell office:value-type="string">
            <text:p>2026-07-12T09:53:43.263Z</text:p>
          </table:table-cell>
          <table:table-cell office:value-type="string">
            <text:p>46 km SSE of Old Harbor, Alaska</text:p>
          </table:table-cell>
          <table:table-cell office:value-type="string">
            <text:p>earthquake</text:p>
          </table:table-cell>
          <table:table-cell office:value-type="string">
            <text:p>15</text:p>
          </table:table-cell>
          <table:table-cell office:value-type="string">
            <text:p>4.7913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9:45:56.793Z</text:p>
          </table:table-cell>
          <table:table-cell office:value-type="string">
            <text:p>61.567</text:p>
          </table:table-cell>
          <table:table-cell office:value-type="string">
            <text:p>-150.015</text:p>
          </table:table-cell>
          <table:table-cell office:value-type="string">
            <text:p>28.6</text:p>
          </table:table-cell>
          <table:table-cell office:value-type="string">
            <text:p>1.4</text:p>
          </table:table-cell>
          <table:table-cell office:value-type="string">
            <text:p>ml</text:p>
          </table:table-cell>
          <table:table-cell office:value-type="string">
            <text:p>11</text:p>
          </table:table-cell>
          <table:table-cell office:value-type="string">
            <text:p>88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rjtdu</text:p>
          </table:table-cell>
          <table:table-cell office:value-type="string">
            <text:p>2026-07-12T09:47:36.906Z</text:p>
          </table:table-cell>
          <table:table-cell office:value-type="string">
            <text:p>6 km NNW of Big Lake, Alaska</text:p>
          </table:table-cell>
          <table:table-cell office:value-type="string">
            <text:p>earthquake</text:p>
          </table:table-cell>
          <table:table-cell office:value-type="string">
            <text:p>5</text:p>
          </table:table-cell>
          <table:table-cell office:value-type="string">
            <text:p>3.1275</text:p>
          </table:table-cell>
          <table:table-cell office:value-type="string">
            <text:p>0.1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9:36:34.760Z</text:p>
          </table:table-cell>
          <table:table-cell office:value-type="string">
            <text:p>32.7725</text:p>
          </table:table-cell>
          <table:table-cell office:value-type="string">
            <text:p>-115.9295</text:p>
          </table:table-cell>
          <table:table-cell office:value-type="string">
            <text:p>18.58</text:p>
          </table:table-cell>
          <table:table-cell office:value-type="string">
            <text:p>1.55</text:p>
          </table:table-cell>
          <table:table-cell office:value-type="string">
            <text:p>ml</text:p>
          </table:table-cell>
          <table:table-cell office:value-type="string">
            <text:p>16</text:p>
          </table:table-cell>
          <table:table-cell office:value-type="string">
            <text:p>92</text:p>
          </table:table-cell>
          <table:table-cell office:value-type="string">
            <text:p>0.07966</text:p>
          </table:table-cell>
          <table:table-cell office:value-type="string">
            <text:p>0.32</text:p>
          </table:table-cell>
          <table:table-cell office:value-type="string">
            <text:p>ci</text:p>
          </table:table-cell>
          <table:table-cell office:value-type="string">
            <text:p>ci41291815</text:p>
          </table:table-cell>
          <table:table-cell office:value-type="string">
            <text:p>2026-07-12T09:40:07.536Z</text:p>
          </table:table-cell>
          <table:table-cell office:value-type="string">
            <text:p>7 km NE of Ocotillo, CA</text:p>
          </table:table-cell>
          <table:table-cell office:value-type="string">
            <text:p>earthquake</text:p>
          </table:table-cell>
          <table:table-cell office:value-type="string">
            <text:p>0.76</text:p>
          </table:table-cell>
          <table:table-cell office:value-type="string">
            <text:p>1.38</text:p>
          </table:table-cell>
          <table:table-cell office:value-type="string">
            <text:p>0.44394499060419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9:33:42.810Z</text:p>
          </table:table-cell>
          <table:table-cell office:value-type="string">
            <text:p>33.383166666667</text:p>
          </table:table-cell>
          <table:table-cell office:value-type="string">
            <text:p>-116.42083333333</text:p>
          </table:table-cell>
          <table:table-cell office:value-type="string">
            <text:p>10.6</text:p>
          </table:table-cell>
          <table:table-cell office:value-type="string">
            <text:p>0.51</text:p>
          </table:table-cell>
          <table:table-cell office:value-type="string">
            <text:p>ml</text:p>
          </table:table-cell>
          <table:table-cell office:value-type="string">
            <text:p>37</text:p>
          </table:table-cell>
          <table:table-cell office:value-type="string">
            <text:p>56</text:p>
          </table:table-cell>
          <table:table-cell office:value-type="string">
            <text:p>0.07203</text:p>
          </table:table-cell>
          <table:table-cell office:value-type="string">
            <text:p>0.19</text:p>
          </table:table-cell>
          <table:table-cell office:value-type="string">
            <text:p>ci</text:p>
          </table:table-cell>
          <table:table-cell office:value-type="string">
            <text:p>ci41291807</text:p>
          </table:table-cell>
          <table:table-cell office:value-type="string">
            <text:p>2026-07-12T09:37:08.963Z</text:p>
          </table:table-cell>
          <table:table-cell office:value-type="string">
            <text:p>15 km NNW of Borrego Springs, CA</text:p>
          </table:table-cell>
          <table:table-cell office:value-type="string">
            <text:p>earthquake</text:p>
          </table:table-cell>
          <table:table-cell office:value-type="string">
            <text:p>0.21</text:p>
          </table:table-cell>
          <table:table-cell office:value-type="string">
            <text:p>0.44</text:p>
          </table:table-cell>
          <table:table-cell office:value-type="string">
            <text:p>0.20032173670301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9:24:59.770Z</text:p>
          </table:table-cell>
          <table:table-cell office:value-type="string">
            <text:p>60.455</text:p>
          </table:table-cell>
          <table:table-cell office:value-type="string">
            <text:p>-148.993</text:p>
          </table:table-cell>
          <table:table-cell office:value-type="string">
            <text:p>20.3</text:p>
          </table:table-cell>
          <table:table-cell office:value-type="string">
            <text:p>2.1</text:p>
          </table:table-cell>
          <table:table-cell office:value-type="string">
            <text:p>ml</text:p>
          </table:table-cell>
          <table:table-cell office:value-type="string">
            <text:p>39</text:p>
          </table:table-cell>
          <table:table-cell office:value-type="string">
            <text:p>97</text:p>
          </table:table-cell>
          <table:table-cell office:value-type="string">
            <text:p>0.7</text:p>
          </table:table-cell>
          <table:table-cell office:value-type="string">
            <text:p>0.6</text:p>
          </table:table-cell>
          <table:table-cell office:value-type="string">
            <text:p>ak</text:p>
          </table:table-cell>
          <table:table-cell office:value-type="string">
            <text:p>aka2026nrjazz</text:p>
          </table:table-cell>
          <table:table-cell office:value-type="string">
            <text:p>2026-07-12T10:06:05.057Z</text:p>
          </table:table-cell>
          <table:table-cell office:value-type="string">
            <text:p>20 km E of Crown Point, Alaska</text:p>
          </table:table-cell>
          <table:table-cell office:value-type="string">
            <text:p>earthquake</text:p>
          </table:table-cell>
          <table:table-cell office:value-type="string">
            <text:p>3.1</text:p>
          </table:table-cell>
          <table:table-cell office:value-type="string">
            <text:p>3.177</text:p>
          </table:table-cell>
          <table:table-cell office:value-type="string">
            <text:p>0.3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9:11:42.960Z</text:p>
          </table:table-cell>
          <table:table-cell office:value-type="string">
            <text:p>33.958833333333</text:p>
          </table:table-cell>
          <table:table-cell office:value-type="string">
            <text:p>-116.67716666667</text:p>
          </table:table-cell>
          <table:table-cell office:value-type="string">
            <text:p>11.98</text:p>
          </table:table-cell>
          <table:table-cell office:value-type="string">
            <text:p>0.58</text:p>
          </table:table-cell>
          <table:table-cell office:value-type="string">
            <text:p>ml</text:p>
          </table:table-cell>
          <table:table-cell office:value-type="string">
            <text:p>40</text:p>
          </table:table-cell>
          <table:table-cell office:value-type="string">
            <text:p>49</text:p>
          </table:table-cell>
          <table:table-cell office:value-type="string">
            <text:p>0.08311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799</text:p>
          </table:table-cell>
          <table:table-cell office:value-type="string">
            <text:p>2026-07-12T09:15:15.622Z</text:p>
          </table:table-cell>
          <table:table-cell office:value-type="string">
            <text:p>11 km ENE of Cabazon, CA</text:p>
          </table:table-cell>
          <table:table-cell office:value-type="string">
            <text:p>earthquake</text:p>
          </table:table-cell>
          <table:table-cell office:value-type="string">
            <text:p>0.16</text:p>
          </table:table-cell>
          <table:table-cell office:value-type="string">
            <text:p>0.5</text:p>
          </table:table-cell>
          <table:table-cell office:value-type="string">
            <text:p>0.2095950972707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9:07:45.040Z</text:p>
          </table:table-cell>
          <table:table-cell office:value-type="string">
            <text:p>38.827331542969</text:p>
          </table:table-cell>
          <table:table-cell office:value-type="string">
            <text:p>-122.81500244141</text:p>
          </table:table-cell>
          <table:table-cell office:value-type="string">
            <text:p>2.0299999713898</text:p>
          </table:table-cell>
          <table:table-cell office:value-type="string">
            <text:p>0.5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114</text:p>
          </table:table-cell>
          <table:table-cell office:value-type="string">
            <text:p>0.005502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381</text:p>
          </table:table-cell>
          <table:table-cell office:value-type="string">
            <text:p>2026-07-12T09:09:24.295Z</text:p>
          </table:table-cell>
          <table:table-cell office:value-type="string">
            <text:p>8 km NW of The Geysers, CA</text:p>
          </table:table-cell>
          <table:table-cell office:value-type="string">
            <text:p>earthquake</text:p>
          </table:table-cell>
          <table:table-cell office:value-type="string">
            <text:p>0.49</text:p>
          </table:table-cell>
          <table:table-cell office:value-type="string">
            <text:p>2.53999996</text:p>
          </table:table-cell>
          <table:table-cell office:value-type="string">
            <text:p>0.39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8:56:09.622Z</text:p>
          </table:table-cell>
          <table:table-cell office:value-type="string">
            <text:p>59.446</text:p>
          </table:table-cell>
          <table:table-cell office:value-type="string">
            <text:p>-152.79</text:p>
          </table:table-cell>
          <table:table-cell office:value-type="string">
            <text:p>75.9</text:p>
          </table:table-cell>
          <table:table-cell office:value-type="string">
            <text:p>1.3</text:p>
          </table:table-cell>
          <table:table-cell office:value-type="string">
            <text:p>ml</text:p>
          </table:table-cell>
          <table:table-cell office:value-type="string">
            <text:p>35</text:p>
          </table:table-cell>
          <table:table-cell office:value-type="string">
            <text:p>82</text:p>
          </table:table-cell>
          <table:table-cell office:value-type="string">
            <text:p>0.3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ricce</text:p>
          </table:table-cell>
          <table:table-cell office:value-type="string">
            <text:p>2026-07-12T08:57:24.423Z</text:p>
          </table:table-cell>
          <table:table-cell office:value-type="string">
            <text:p>50 km W of Nanwalek, Alaska</text:p>
          </table:table-cell>
          <table:table-cell office:value-type="string">
            <text:p>earthquake</text:p>
          </table:table-cell>
          <table:table-cell office:value-type="string">
            <text:p>4.5</text:p>
          </table:table-cell>
          <table:table-cell office:value-type="string">
            <text:p>2.7379</text:p>
          </table:table-cell>
          <table:table-cell office:value-type="string">
            <text:p>0.3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8:56:00.360Z</text:p>
          </table:table-cell>
          <table:table-cell office:value-type="string">
            <text:p>34.215</text:p>
          </table:table-cell>
          <table:table-cell office:value-type="string">
            <text:p>-117.07733333333</text:p>
          </table:table-cell>
          <table:table-cell office:value-type="string">
            <text:p>3.7</text:p>
          </table:table-cell>
          <table:table-cell office:value-type="string">
            <text:p>0.76</text:p>
          </table:table-cell>
          <table:table-cell office:value-type="string">
            <text:p>ml</text:p>
          </table:table-cell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0.04434</text:p>
          </table:table-cell>
          <table:table-cell office:value-type="string">
            <text:p>0.14</text:p>
          </table:table-cell>
          <table:table-cell office:value-type="string">
            <text:p>ci</text:p>
          </table:table-cell>
          <table:table-cell office:value-type="string">
            <text:p>ci41291791</text:p>
          </table:table-cell>
          <table:table-cell office:value-type="string">
            <text:p>2026-07-12T08:59:25.111Z</text:p>
          </table:table-cell>
          <table:table-cell office:value-type="string">
            <text:p>3 km ENE of Running Springs, CA</text:p>
          </table:table-cell>
          <table:table-cell office:value-type="string">
            <text:p>earthquake</text:p>
          </table:table-cell>
          <table:table-cell office:value-type="string">
            <text:p>0.13</text:p>
          </table:table-cell>
          <table:table-cell office:value-type="string">
            <text:p>0.27</text:p>
          </table:table-cell>
          <table:table-cell office:value-type="string">
            <text:p>0.11379338820961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8:52:53.627Z</text:p>
          </table:table-cell>
          <table:table-cell office:value-type="string">
            <text:p>54.6404</text:p>
          </table:table-cell>
          <table:table-cell office:value-type="string">
            <text:p>163.1721</text:p>
          </table:table-cell>
          <table:table-cell office:value-type="string">
            <text:p>10</text:p>
          </table:table-cell>
          <table:table-cell office:value-type="string">
            <text:p>4.3</text:p>
          </table:table-cell>
          <table:table-cell office:value-type="string">
            <text:p>mb</text:p>
          </table:table-cell>
          <table:table-cell office:value-type="string">
            <text:p>44</text:p>
          </table:table-cell>
          <table:table-cell office:value-type="string">
            <text:p>131</text:p>
          </table:table-cell>
          <table:table-cell office:value-type="string">
            <text:p>3.585</text:p>
          </table:table-cell>
          <table:table-cell office:value-type="string">
            <text:p>0.84</text:p>
          </table:table-cell>
          <table:table-cell office:value-type="string">
            <text:p>us</text:p>
          </table:table-cell>
          <table:table-cell office:value-type="string">
            <text:p>us7000szuk</text:p>
          </table:table-cell>
          <table:table-cell office:value-type="string">
            <text:p>2026-07-12T11:38:00.040Z</text:p>
          </table:table-cell>
          <table:table-cell office:value-type="string">
            <text:p>182 km SSE of Ust’-Kamchatsk Staryy, Russia</text:p>
          </table:table-cell>
          <table:table-cell office:value-type="string">
            <text:p>earthquake</text:p>
          </table:table-cell>
          <table:table-cell office:value-type="string">
            <text:p>10.84</text:p>
          </table:table-cell>
          <table:table-cell office:value-type="string">
            <text:p>1.914</text:p>
          </table:table-cell>
          <table:table-cell office:value-type="string">
            <text:p>0.085</text:p>
          </table:table-cell>
          <table:table-cell office:value-type="string">
            <text:p>39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8:52:02.080Z</text:p>
          </table:table-cell>
          <table:table-cell office:value-type="string">
            <text:p>56.577</text:p>
          </table:table-cell>
          <table:table-cell office:value-type="string">
            <text:p>-158.466</text:p>
          </table:table-cell>
          <table:table-cell office:value-type="string">
            <text:p>18.5</text:p>
          </table:table-cell>
          <table:table-cell office:value-type="string">
            <text:p>1.3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154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ak</text:p>
          </table:table-cell>
          <table:table-cell office:value-type="string">
            <text:p>aka2026nrhwuu</text:p>
          </table:table-cell>
          <table:table-cell office:value-type="string">
            <text:p>2026-07-12T08:53:27.572Z</text:p>
          </table:table-cell>
          <table:table-cell office:value-type="string">
            <text:p>30 km N of Chignik Lagoon, Alaska</text:p>
          </table:table-cell>
          <table:table-cell office:value-type="string">
            <text:p>earthquake</text:p>
          </table:table-cell>
          <table:table-cell office:value-type="string">
            <text:p>14.3</text:p>
          </table:table-cell>
          <table:table-cell office:value-type="string">
            <text:p>14.9568</text:p>
          </table:table-cell>
          <table:table-cell office:value-type="string">
            <text:p>0.3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8:47:02.370Z</text:p>
          </table:table-cell>
          <table:table-cell office:value-type="string">
            <text:p>33.293666666667</text:p>
          </table:table-cell>
          <table:table-cell office:value-type="string">
            <text:p>-116.3185</text:p>
          </table:table-cell>
          <table:table-cell office:value-type="string">
            <text:p>6.14</text:p>
          </table:table-cell>
          <table:table-cell office:value-type="string">
            <text:p>0.52</text:p>
          </table:table-cell>
          <table:table-cell office:value-type="string">
            <text:p>ml</text:p>
          </table:table-cell>
          <table:table-cell office:value-type="string">
            <text:p>38</text:p>
          </table:table-cell>
          <table:table-cell office:value-type="string">
            <text:p>107</text:p>
          </table:table-cell>
          <table:table-cell office:value-type="string">
            <text:p>0.05241</text:p>
          </table:table-cell>
          <table:table-cell office:value-type="string">
            <text:p>0.21</text:p>
          </table:table-cell>
          <table:table-cell office:value-type="string">
            <text:p>ci</text:p>
          </table:table-cell>
          <table:table-cell office:value-type="string">
            <text:p>ci41291783</text:p>
          </table:table-cell>
          <table:table-cell office:value-type="string">
            <text:p>2026-07-12T08:50:20.783Z</text:p>
          </table:table-cell>
          <table:table-cell office:value-type="string">
            <text:p>7 km NE of Borrego Springs, CA</text:p>
          </table:table-cell>
          <table:table-cell office:value-type="string">
            <text:p>earthquake</text:p>
          </table:table-cell>
          <table:table-cell office:value-type="string">
            <text:p>0.27</text:p>
          </table:table-cell>
          <table:table-cell office:value-type="string">
            <text:p>0.52</text:p>
          </table:table-cell>
          <table:table-cell office:value-type="string">
            <text:p>0.21093073332053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8:45:12.523Z</text:p>
          </table:table-cell>
          <table:table-cell office:value-type="string">
            <text:p>-18.0983</text:p>
          </table:table-cell>
          <table:table-cell office:value-type="string">
            <text:p>-178.4847</text:p>
          </table:table-cell>
          <table:table-cell office:value-type="string">
            <text:p>605.235</text:p>
          </table:table-cell>
          <table:table-cell office:value-type="string">
            <text:p>4.1</text:p>
          </table:table-cell>
          <table:table-cell office:value-type="string">
            <text:p>mb</text:p>
          </table:table-cell>
          <table:table-cell office:value-type="string">
            <text:p>42</text:p>
          </table:table-cell>
          <table:table-cell office:value-type="string">
            <text:p>135</text:p>
          </table:table-cell>
          <table:table-cell office:value-type="string">
            <text:p>2.607</text:p>
          </table:table-cell>
          <table:table-cell office:value-type="string">
            <text:p>0.58</text:p>
          </table:table-cell>
          <table:table-cell office:value-type="string">
            <text:p>us</text:p>
          </table:table-cell>
          <table:table-cell office:value-type="string">
            <text:p>us7000szuj</text:p>
          </table:table-cell>
          <table:table-cell office:value-type="string">
            <text:p>2026-07-12T09:01:23.040Z</text:p>
          </table:table-cell>
          <table:table-cell office:value-type="string">
            <text:p>232 km E of Levuka, Fiji</text:p>
          </table:table-cell>
          <table:table-cell office:value-type="string">
            <text:p>earthquake</text:p>
          </table:table-cell>
          <table:table-cell office:value-type="string">
            <text:p>15.43</text:p>
          </table:table-cell>
          <table:table-cell office:value-type="string">
            <text:p>10.063</text:p>
          </table:table-cell>
          <table:table-cell office:value-type="string">
            <text:p>0.072</text:p>
          </table:table-cell>
          <table:table-cell office:value-type="string">
            <text:p>53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8:26:53.546Z</text:p>
          </table:table-cell>
          <table:table-cell office:value-type="string">
            <text:p>31.621</text:p>
          </table:table-cell>
          <table:table-cell office:value-type="string">
            <text:p>-104.387</text:p>
          </table:table-cell>
          <table:table-cell office:value-type="string">
            <text:p>3.7854</text:p>
          </table:table-cell>
          <table:table-cell office:value-type="string">
            <text:p>1.9</text:p>
          </table:table-cell>
          <table:table-cell office:value-type="string">
            <text:p>ml</text:p>
          </table:table-cell>
          <table:table-cell office:value-type="string">
            <text:p>31</text:p>
          </table:table-cell>
          <table:table-cell office:value-type="string">
            <text:p>74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pcfrh</text:p>
          </table:table-cell>
          <table:table-cell office:value-type="string">
            <text:p>2026-07-12T08:30:58.347Z</text:p>
          </table:table-cell>
          <table:table-cell office:value-type="string">
            <text:p>61 km S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773878097534</text:p>
          </table:table-cell>
          <table:table-cell office:value-type="string">
            <text:p>0.2</text:p>
          </table:table-cell>
          <table:table-cell office:value-type="string">
            <text:p>24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8:23:47.922Z</text:p>
          </table:table-cell>
          <table:table-cell office:value-type="string">
            <text:p>62.259</text:p>
          </table:table-cell>
          <table:table-cell office:value-type="string">
            <text:p>-149.517</text:p>
          </table:table-cell>
          <table:table-cell office:value-type="string">
            <text:p>54.2</text:p>
          </table:table-cell>
          <table:table-cell office:value-type="string">
            <text:p>1.4</text:p>
          </table:table-cell>
          <table:table-cell office:value-type="string">
            <text:p>ml</text:p>
          </table:table-cell>
          <table:table-cell office:value-type="string">
            <text:p>12</text:p>
          </table:table-cell>
          <table:table-cell office:value-type="string">
            <text:p>176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rgzvv</text:p>
          </table:table-cell>
          <table:table-cell office:value-type="string">
            <text:p>2026-07-12T08:25:11.510Z</text:p>
          </table:table-cell>
          <table:table-cell office:value-type="string">
            <text:p>20 km ENE of Susitna North, Alaska</text:p>
          </table:table-cell>
          <table:table-cell office:value-type="string">
            <text:p>earthquake</text:p>
          </table:table-cell>
          <table:table-cell office:value-type="string">
            <text:p>10</text:p>
          </table:table-cell>
          <table:table-cell office:value-type="string">
            <text:p>6.4621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8:17:39.204Z</text:p>
          </table:table-cell>
          <table:table-cell office:value-type="string">
            <text:p>31.648</text:p>
          </table:table-cell>
          <table:table-cell office:value-type="string">
            <text:p>-104.326</text:p>
          </table:table-cell>
          <table:table-cell office:value-type="string">
            <text:p>3.9771</text:p>
          </table:table-cell>
          <table:table-cell office:value-type="string">
            <text:p>2.1</text:p>
          </table:table-cell>
          <table:table-cell office:value-type="string">
            <text:p>ml</text:p>
          </table:table-cell>
          <table:table-cell office:value-type="string">
            <text:p>40</text:p>
          </table:table-cell>
          <table:table-cell office:value-type="string">
            <text:p>70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pbxvh</text:p>
          </table:table-cell>
          <table:table-cell office:value-type="string">
            <text:p>2026-07-12T08:22:07.582Z</text:p>
          </table:table-cell>
          <table:table-cell office:value-type="string">
            <text:p>58 km S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0.90664839744568</text:p>
          </table:table-cell>
          <table:table-cell office:value-type="string">
            <text:p>0.2</text:p>
          </table:table-cell>
          <table:table-cell office:value-type="string">
            <text:p>29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8:14:36.829Z</text:p>
          </table:table-cell>
          <table:table-cell office:value-type="string">
            <text:p>31.628</text:p>
          </table:table-cell>
          <table:table-cell office:value-type="string">
            <text:p>-104.454</text:p>
          </table:table-cell>
          <table:table-cell office:value-type="string">
            <text:p>3.8902</text:p>
          </table:table-cell>
          <table:table-cell office:value-type="string">
            <text:p>1.1</text:p>
          </table:table-cell>
          <table:table-cell office:value-type="string">
            <text:p>ml</text:p>
          </table:table-cell>
          <table:table-cell office:value-type="string">
            <text:p>14</text:p>
          </table:table-cell>
          <table:table-cell office:value-type="string">
            <text:p>92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pbvdo</text:p>
          </table:table-cell>
          <table:table-cell office:value-type="string">
            <text:p>2026-07-12T08:19:00.132Z</text:p>
          </table:table-cell>
          <table:table-cell office:value-type="string">
            <text:p>61 km S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8448829650879</text:p>
          </table:table-cell>
          <table:table-cell office:value-type="string">
            <text:p>0.2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8:10:19.513Z</text:p>
          </table:table-cell>
          <table:table-cell office:value-type="string">
            <text:p>37.4144</text:p>
          </table:table-cell>
          <table:table-cell office:value-type="string">
            <text:p>-118.0309</text:p>
          </table:table-cell>
          <table:table-cell office:value-type="string">
            <text:p>0.005</text:p>
          </table:table-cell>
          <table:table-cell office:value-type="string">
            <text:p>1.72</text:p>
          </table:table-cell>
          <table:table-cell office:value-type="string">
            <text:p>ml</text:p>
          </table:table-cell>
          <table:table-cell office:value-type="string">
            <text:p>24</text:p>
          </table:table-cell>
          <table:table-cell office:value-type="string">
            <text:p>107</text:p>
          </table:table-cell>
          <table:table-cell office:value-type="string">
            <text:p>0.066</text:p>
          </table:table-cell>
          <table:table-cell office:value-type="string">
            <text:p>0.3577</text:p>
          </table:table-cell>
          <table:table-cell office:value-type="string">
            <text:p>nn</text:p>
          </table:table-cell>
          <table:table-cell office:value-type="string">
            <text:p>nn00921507</text:p>
          </table:table-cell>
          <table:table-cell office:value-type="string">
            <text:p>2026-07-12T08:14:34.289Z</text:p>
          </table:table-cell>
          <table:table-cell office:value-type="string">
            <text:p>28 km S of Dyer, Nevada</text:p>
          </table:table-cell>
          <table:table-cell office:value-type="string">
            <text:p>earthquake</text:p>
          </table:table-cell>
          <table:table-cell office:value-type="string">
            <text:p/>
          </table:table-cell>
          <table:table-cell office:value-type="string">
            <text:p>0.2687</text:p>
          </table:table-cell>
          <table:table-cell office:value-type="string">
            <text:p>0.15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nn</text:p>
          </table:table-cell>
          <table:table-cell office:value-type="string">
            <text:p>nn</text:p>
          </table:table-cell>
        </table:table-row>
        <table:table-row>
          <table:table-cell office:value-type="string">
            <text:p>2026-07-12T08:08:27.176Z</text:p>
          </table:table-cell>
          <table:table-cell office:value-type="string">
            <text:p>31.746</text:p>
          </table:table-cell>
          <table:table-cell office:value-type="string">
            <text:p>-104.195</text:p>
          </table:table-cell>
          <table:table-cell office:value-type="string">
            <text:p>4.3603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32</text:p>
          </table:table-cell>
          <table:table-cell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0.2</text:p>
          </table:table-cell>
          <table:table-cell office:value-type="string">
            <text:p>tx</text:p>
          </table:table-cell>
          <table:table-cell office:value-type="string">
            <text:p>tx2026npbpxq</text:p>
          </table:table-cell>
          <table:table-cell office:value-type="string">
            <text:p>2026-07-12T08:11:47.822Z</text:p>
          </table:table-cell>
          <table:table-cell office:value-type="string">
            <text:p>50 km SSE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0.92911845445633</text:p>
          </table:table-cell>
          <table:table-cell office:value-type="string">
            <text:p>0.2</text:p>
          </table:table-cell>
          <table:table-cell office:value-type="string">
            <text:p>23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8:05:42.816Z</text:p>
          </table:table-cell>
          <table:table-cell office:value-type="string">
            <text:p>31.575</text:p>
          </table:table-cell>
          <table:table-cell office:value-type="string">
            <text:p>-104.4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ml</text:p>
          </table:table-cell>
          <table:table-cell office:value-type="string">
            <text:p>35</text:p>
          </table:table-cell>
          <table:table-cell office:value-type="string">
            <text:p>80</text:p>
          </table:table-cell>
          <table:table-cell office:value-type="string">
            <text:p>0.1</text:p>
          </table:table-cell>
          <table:table-cell office:value-type="string">
            <text:p>0.8</text:p>
          </table:table-cell>
          <table:table-cell office:value-type="string">
            <text:p>tx</text:p>
          </table:table-cell>
          <table:table-cell office:value-type="string">
            <text:p>tx2026npblum</text:p>
          </table:table-cell>
          <table:table-cell office:value-type="string">
            <text:p>2026-07-12T08:09:10.799Z</text:p>
          </table:table-cell>
          <table:table-cell office:value-type="string">
            <text:p>67 km S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27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8:02:03.670Z</text:p>
          </table:table-cell>
          <table:table-cell office:value-type="string">
            <text:p>37.330333709717</text:p>
          </table:table-cell>
          <table:table-cell office:value-type="string">
            <text:p>-118.16899871826</text:p>
          </table:table-cell>
          <table:table-cell office:value-type="string">
            <text:p>-1.25</text:p>
          </table:table-cell>
          <table:table-cell office:value-type="string">
            <text:p>2.58</text:p>
          </table:table-cell>
          <table:table-cell office:value-type="string">
            <text:p>md</text:p>
          </table:table-cell>
          <table:table-cell office:value-type="string">
            <text:p>21</text:p>
          </table:table-cell>
          <table:table-cell office:value-type="string">
            <text:p>92</text:p>
          </table:table-cell>
          <table:table-cell office:value-type="string">
            <text:p/>
          </table:table-cell>
          <table:table-cell office:value-type="string">
            <text:p>0.13</text:p>
          </table:table-cell>
          <table:table-cell office:value-type="string">
            <text:p>nc</text:p>
          </table:table-cell>
          <table:table-cell office:value-type="string">
            <text:p>nc75394371</text:p>
          </table:table-cell>
          <table:table-cell office:value-type="string">
            <text:p>2026-07-12T08:37:23.515Z</text:p>
          </table:table-cell>
          <table:table-cell office:value-type="string">
            <text:p>17 km WSW of Deep Springs, CA</text:p>
          </table:table-cell>
          <table:table-cell office:value-type="string">
            <text:p>earthquake</text:p>
          </table:table-cell>
          <table:table-cell office:value-type="string">
            <text:p>0.37</text:p>
          </table:table-cell>
          <table:table-cell office:value-type="string">
            <text:p>6.01999998</text:p>
          </table:table-cell>
          <table:table-cell office:value-type="string">
            <text:p>0.16</text:p>
          </table:table-cell>
          <table:table-cell office:value-type="string">
            <text:p>2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7:59:25.270Z</text:p>
          </table:table-cell>
          <table:table-cell office:value-type="string">
            <text:p>38.823665618896</text:p>
          </table:table-cell>
          <table:table-cell office:value-type="string">
            <text:p>-122.79916381836</text:p>
          </table:table-cell>
          <table:table-cell office:value-type="string">
            <text:p>2.9000000953674</text:p>
          </table:table-cell>
          <table:table-cell office:value-type="string">
            <text:p>0.77</text:p>
          </table:table-cell>
          <table:table-cell office:value-type="string">
            <text:p>md</text:p>
          </table:table-cell>
          <table:table-cell office:value-type="string">
            <text:p>20</text:p>
          </table:table-cell>
          <table:table-cell office:value-type="string">
            <text:p>53</text:p>
          </table:table-cell>
          <table:table-cell office:value-type="string">
            <text:p>0.008527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366</text:p>
          </table:table-cell>
          <table:table-cell office:value-type="string">
            <text:p>2026-07-12T08:01:03.745Z</text:p>
          </table:table-cell>
          <table:table-cell office:value-type="string">
            <text:p>6 km NW of The Geysers, CA</text:p>
          </table:table-cell>
          <table:table-cell office:value-type="string">
            <text:p>earthquake</text:p>
          </table:table-cell>
          <table:table-cell office:value-type="string">
            <text:p>0.26</text:p>
          </table:table-cell>
          <table:table-cell office:value-type="string">
            <text:p>0.469999999</text:p>
          </table:table-cell>
          <table:table-cell office:value-type="string">
            <text:p>0.15</text:p>
          </table:table-cell>
          <table:table-cell office:value-type="string">
            <text:p>21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7:43:17.410Z</text:p>
          </table:table-cell>
          <table:table-cell office:value-type="string">
            <text:p>38.847332000732</text:p>
          </table:table-cell>
          <table:table-cell office:value-type="string">
            <text:p>-122.84683227539</text:p>
          </table:table-cell>
          <table:table-cell office:value-type="string">
            <text:p>1.5900000333786</text:p>
          </table:table-cell>
          <table:table-cell office:value-type="string">
            <text:p>0.26</text:p>
          </table:table-cell>
          <table:table-cell office:value-type="string">
            <text:p>md</text:p>
          </table:table-cell>
          <table:table-cell office:value-type="string">
            <text:p>6</text:p>
          </table:table-cell>
          <table:table-cell office:value-type="string">
            <text:p>137</text:p>
          </table:table-cell>
          <table:table-cell office:value-type="string">
            <text:p>0.01244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361</text:p>
          </table:table-cell>
          <table:table-cell office:value-type="string">
            <text:p>2026-07-12T07:44:53.694Z</text:p>
          </table:table-cell>
          <table:table-cell office:value-type="string">
            <text:p>11 km NW of The Geysers, CA</text:p>
          </table:table-cell>
          <table:table-cell office:value-type="string">
            <text:p>earthquake</text:p>
          </table:table-cell>
          <table:table-cell office:value-type="string">
            <text:p>0.74</text:p>
          </table:table-cell>
          <table:table-cell office:value-type="string">
            <text:p>0.930000007</text:p>
          </table:table-cell>
          <table:table-cell office:value-type="string">
            <text:p>0.05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7:39:11.380Z</text:p>
          </table:table-cell>
          <table:table-cell office:value-type="string">
            <text:p>38.782665252685</text:p>
          </table:table-cell>
          <table:table-cell office:value-type="string">
            <text:p>-122.76399993897</text:p>
          </table:table-cell>
          <table:table-cell office:value-type="string">
            <text:p>3.9000000953674</text:p>
          </table:table-cell>
          <table:table-cell office:value-type="string">
            <text:p>1.08</text:p>
          </table:table-cell>
          <table:table-cell office:value-type="string">
            <text:p>md</text:p>
          </table:table-cell>
          <table:table-cell office:value-type="string">
            <text:p>15</text:p>
          </table:table-cell>
          <table:table-cell office:value-type="string">
            <text:p>71</text:p>
          </table:table-cell>
          <table:table-cell office:value-type="string">
            <text:p>0.012</text:p>
          </table:table-cell>
          <table:table-cell office:value-type="string">
            <text:p>0.03</text:p>
          </table:table-cell>
          <table:table-cell office:value-type="string">
            <text:p>nc</text:p>
          </table:table-cell>
          <table:table-cell office:value-type="string">
            <text:p>nc75394356</text:p>
          </table:table-cell>
          <table:table-cell office:value-type="string">
            <text:p>2026-07-12T07:40:48.540Z</text:p>
          </table:table-cell>
          <table:table-cell office:value-type="string">
            <text:p>1 km NW of The Geysers, CA</text:p>
          </table:table-cell>
          <table:table-cell office:value-type="string">
            <text:p>earthquake</text:p>
          </table:table-cell>
          <table:table-cell office:value-type="string">
            <text:p>0.38</text:p>
          </table:table-cell>
          <table:table-cell office:value-type="string">
            <text:p>0.879999995</text:p>
          </table:table-cell>
          <table:table-cell office:value-type="string">
            <text:p>0.18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7:34:51.390Z</text:p>
          </table:table-cell>
          <table:table-cell office:value-type="string">
            <text:p>33.342166666667</text:p>
          </table:table-cell>
          <table:table-cell office:value-type="string">
            <text:p>-116.3875</text:p>
          </table:table-cell>
          <table:table-cell office:value-type="string">
            <text:p>6.64</text:p>
          </table:table-cell>
          <table:table-cell office:value-type="string">
            <text:p>0.49</text:p>
          </table:table-cell>
          <table:table-cell office:value-type="string">
            <text:p>ml</text:p>
          </table:table-cell>
          <table:table-cell office:value-type="string">
            <text:p>34</text:p>
          </table:table-cell>
          <table:table-cell office:value-type="string">
            <text:p>60</text:p>
          </table:table-cell>
          <table:table-cell office:value-type="string">
            <text:p>0.02297</text:p>
          </table:table-cell>
          <table:table-cell office:value-type="string">
            <text:p>0.19</text:p>
          </table:table-cell>
          <table:table-cell office:value-type="string">
            <text:p>ci</text:p>
          </table:table-cell>
          <table:table-cell office:value-type="string">
            <text:p>ci41291759</text:p>
          </table:table-cell>
          <table:table-cell office:value-type="string">
            <text:p>2026-07-12T07:38:11.840Z</text:p>
          </table:table-cell>
          <table:table-cell office:value-type="string">
            <text:p>10 km N of Borrego Springs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43</text:p>
          </table:table-cell>
          <table:table-cell office:value-type="string">
            <text:p>0.14785350445866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7:29:23.556Z</text:p>
          </table:table-cell>
          <table:table-cell office:value-type="string">
            <text:p>-54.6008</text:p>
          </table:table-cell>
          <table:table-cell office:value-type="string">
            <text:p>-118.9732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b</text:p>
          </table:table-cell>
          <table:table-cell office:value-type="string">
            <text:p>43</text:p>
          </table:table-cell>
          <table:table-cell office:value-type="string">
            <text:p>103</text:p>
          </table:table-cell>
          <table:table-cell office:value-type="string">
            <text:p>27.859</text:p>
          </table:table-cell>
          <table:table-cell office:value-type="string">
            <text:p>0.59</text:p>
          </table:table-cell>
          <table:table-cell office:value-type="string">
            <text:p>us</text:p>
          </table:table-cell>
          <table:table-cell office:value-type="string">
            <text:p>us7000szu6</text:p>
          </table:table-cell>
          <table:table-cell office:value-type="string">
            <text:p>2026-07-12T09:36:29.051Z</text:p>
          </table:table-cell>
          <table:table-cell office:value-type="string">
            <text:p>southern East Pacific Rise</text:p>
          </table:table-cell>
          <table:table-cell office:value-type="string">
            <text:p>earthquake</text:p>
          </table:table-cell>
          <table:table-cell office:value-type="string">
            <text:p>15.7</text:p>
          </table:table-cell>
          <table:table-cell office:value-type="string">
            <text:p>1.893</text:p>
          </table:table-cell>
          <table:table-cell office:value-type="string">
            <text:p>0.046</text:p>
          </table:table-cell>
          <table:table-cell office:value-type="string">
            <text:p>164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7:28:12.322Z</text:p>
          </table:table-cell>
          <table:table-cell office:value-type="string">
            <text:p>31.205</text:p>
          </table:table-cell>
          <table:table-cell office:value-type="string">
            <text:p>-103.485</text:p>
          </table:table-cell>
          <table:table-cell office:value-type="string">
            <text:p>7.2309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17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tx</text:p>
          </table:table-cell>
          <table:table-cell office:value-type="string">
            <text:p>tx2026npagqm</text:p>
          </table:table-cell>
          <table:table-cell office:value-type="string">
            <text:p>2026-07-12T08:00:29.011Z</text:p>
          </table:table-cell>
          <table:table-cell office:value-type="string">
            <text:p>18 km SSE of Lindsay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2.3934950828552</text:p>
          </table:table-cell>
          <table:table-cell office:value-type="string">
            <text:p>0.4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7:21:38.840Z</text:p>
          </table:table-cell>
          <table:table-cell office:value-type="string">
            <text:p>37.426998138428</text:p>
          </table:table-cell>
          <table:table-cell office:value-type="string">
            <text:p>-121.77183532715</text:p>
          </table:table-cell>
          <table:table-cell office:value-type="string">
            <text:p>6.8200001716614</text:p>
          </table:table-cell>
          <table:table-cell office:value-type="string">
            <text:p>1.21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73</text:p>
          </table:table-cell>
          <table:table-cell office:value-type="string">
            <text:p>0.03254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351</text:p>
          </table:table-cell>
          <table:table-cell office:value-type="string">
            <text:p>2026-07-12T08:22:22.409Z</text:p>
          </table:table-cell>
          <table:table-cell office:value-type="string">
            <text:p>8 km NE of Alum Rock, CA</text:p>
          </table:table-cell>
          <table:table-cell office:value-type="string">
            <text:p>earthquake</text:p>
          </table:table-cell>
          <table:table-cell office:value-type="string">
            <text:p>0.31</text:p>
          </table:table-cell>
          <table:table-cell office:value-type="string">
            <text:p>0.670000017</text:p>
          </table:table-cell>
          <table:table-cell office:value-type="string">
            <text:p>0.31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7:20:19.214Z</text:p>
          </table:table-cell>
          <table:table-cell office:value-type="string">
            <text:p>55.978</text:p>
          </table:table-cell>
          <table:table-cell office:value-type="string">
            <text:p>-159.934</text:p>
          </table:table-cell>
          <table:table-cell office:value-type="string">
            <text:p>5</text:p>
          </table:table-cell>
          <table:table-cell office:value-type="string">
            <text:p>2.9</text:p>
          </table:table-cell>
          <table:table-cell office:value-type="string">
            <text:p>ml</text:p>
          </table:table-cell>
          <table:table-cell office:value-type="string">
            <text:p>31</text:p>
          </table:table-cell>
          <table:table-cell office:value-type="string">
            <text:p>142</text:p>
          </table:table-cell>
          <table:table-cell office:value-type="string">
            <text:p>0.3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rewsi</text:p>
          </table:table-cell>
          <table:table-cell office:value-type="string">
            <text:p>2026-07-12T07:21:55.404Z</text:p>
          </table:table-cell>
          <table:table-cell office:value-type="string">
            <text:p>29 km WNW of Ivanof Bay, Alaska</text:p>
          </table:table-cell>
          <table:table-cell office:value-type="string">
            <text:p>earthquake</text:p>
          </table:table-cell>
          <table:table-cell office:value-type="string">
            <text:p>12.8</text:p>
          </table:table-cell>
          <table:table-cell office:value-type="string">
            <text:p>2.9774</text:p>
          </table:table-cell>
          <table:table-cell office:value-type="string">
            <text:p>0.3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7:13:10.890Z</text:p>
          </table:table-cell>
          <table:table-cell office:value-type="string">
            <text:p>38.803665161133</text:p>
          </table:table-cell>
          <table:table-cell office:value-type="string">
            <text:p>-122.78216552734</text:p>
          </table:table-cell>
          <table:table-cell office:value-type="string">
            <text:p>3.539999961853</text:p>
          </table:table-cell>
          <table:table-cell office:value-type="string">
            <text:p>0.75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69</text:p>
          </table:table-cell>
          <table:table-cell office:value-type="string">
            <text:p>0.01113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341</text:p>
          </table:table-cell>
          <table:table-cell office:value-type="string">
            <text:p>2026-07-12T07:14:47.340Z</text:p>
          </table:table-cell>
          <table:table-cell office:value-type="string">
            <text:p>4 km NW of The Geysers, CA</text:p>
          </table:table-cell>
          <table:table-cell office:value-type="string">
            <text:p>earthquake</text:p>
          </table:table-cell>
          <table:table-cell office:value-type="string">
            <text:p>0.39</text:p>
          </table:table-cell>
          <table:table-cell office:value-type="string">
            <text:p>1.00999999</text:p>
          </table:table-cell>
          <table:table-cell office:value-type="string">
            <text:p>0.1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7:10:23.520Z</text:p>
          </table:table-cell>
          <table:table-cell office:value-type="string">
            <text:p>30.795</text:p>
          </table:table-cell>
          <table:table-cell office:value-type="string">
            <text:p>-103.472</text:p>
          </table:table-cell>
          <table:table-cell office:value-type="string">
            <text:p>0</text:p>
          </table:table-cell>
          <table:table-cell office:value-type="string">
            <text:p>1.8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26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tx</text:p>
          </table:table-cell>
          <table:table-cell office:value-type="string">
            <text:p>tx2026nozrwu</text:p>
          </table:table-cell>
          <table:table-cell office:value-type="string">
            <text:p>2026-07-12T08:00:25.114Z</text:p>
          </table:table-cell>
          <table:table-cell office:value-type="string">
            <text:p>33 km SE of Balmorhea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7:07:06.470Z</text:p>
          </table:table-cell>
          <table:table-cell office:value-type="string">
            <text:p>36.549835205078</text:p>
          </table:table-cell>
          <table:table-cell office:value-type="string">
            <text:p>-121.17583465576</text:p>
          </table:table-cell>
          <table:table-cell office:value-type="string">
            <text:p>0.33000001311302</text:p>
          </table:table-cell>
          <table:table-cell office:value-type="string">
            <text:p>1.61</text:p>
          </table:table-cell>
          <table:table-cell office:value-type="string">
            <text:p>md</text:p>
          </table:table-cell>
          <table:table-cell office:value-type="string">
            <text:p>11</text:p>
          </table:table-cell>
          <table:table-cell office:value-type="string">
            <text:p>109</text:p>
          </table:table-cell>
          <table:table-cell office:value-type="string">
            <text:p>0.1134</text:p>
          </table:table-cell>
          <table:table-cell office:value-type="string">
            <text:p>0.07</text:p>
          </table:table-cell>
          <table:table-cell office:value-type="string">
            <text:p>nc</text:p>
          </table:table-cell>
          <table:table-cell office:value-type="string">
            <text:p>nc75394336</text:p>
          </table:table-cell>
          <table:table-cell office:value-type="string">
            <text:p>2026-07-12T07:57:22.240Z</text:p>
          </table:table-cell>
          <table:table-cell office:value-type="string">
            <text:p>4 km NW of Pinnacles, CA</text:p>
          </table:table-cell>
          <table:table-cell office:value-type="string">
            <text:p>earthquake</text:p>
          </table:table-cell>
          <table:table-cell office:value-type="string">
            <text:p>0.36</text:p>
          </table:table-cell>
          <table:table-cell office:value-type="string">
            <text:p>8.43999958</text:p>
          </table:table-cell>
          <table:table-cell office:value-type="string">
            <text:p>0.2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6:58:09.560Z</text:p>
          </table:table-cell>
          <table:table-cell office:value-type="string">
            <text:p>37.983833312988</text:p>
          </table:table-cell>
          <table:table-cell office:value-type="string">
            <text:p>-121.87666320801</text:p>
          </table:table-cell>
          <table:table-cell office:value-type="string">
            <text:p>15.920000076294</text:p>
          </table:table-cell>
          <table:table-cell office:value-type="string">
            <text:p>1.82</text:p>
          </table:table-cell>
          <table:table-cell office:value-type="string">
            <text:p>md</text:p>
          </table:table-cell>
          <table:table-cell office:value-type="string">
            <text:p>24</text:p>
          </table:table-cell>
          <table:table-cell office:value-type="string">
            <text:p>87</text:p>
          </table:table-cell>
          <table:table-cell office:value-type="string">
            <text:p>0.03108</text:p>
          </table:table-cell>
          <table:table-cell office:value-type="string">
            <text:p>0.11</text:p>
          </table:table-cell>
          <table:table-cell office:value-type="string">
            <text:p>nc</text:p>
          </table:table-cell>
          <table:table-cell office:value-type="string">
            <text:p>nc75394331</text:p>
          </table:table-cell>
          <table:table-cell office:value-type="string">
            <text:p>2026-07-12T07:32:23.060Z</text:p>
          </table:table-cell>
          <table:table-cell office:value-type="string">
            <text:p>5 km S of Pittsburg, CA</text:p>
          </table:table-cell>
          <table:table-cell office:value-type="string">
            <text:p>earthquake</text:p>
          </table:table-cell>
          <table:table-cell office:value-type="string">
            <text:p>0.36</text:p>
          </table:table-cell>
          <table:table-cell office:value-type="string">
            <text:p>0.74000001</text:p>
          </table:table-cell>
          <table:table-cell office:value-type="string">
            <text:p>0.06</text:p>
          </table:table-cell>
          <table:table-cell office:value-type="string">
            <text:p>21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6:57:31.040Z</text:p>
          </table:table-cell>
          <table:table-cell office:value-type="string">
            <text:p>19.325332641602</text:p>
          </table:table-cell>
          <table:table-cell office:value-type="string">
            <text:p>-155.25332641602</text:p>
          </table:table-cell>
          <table:table-cell office:value-type="string">
            <text:p>4.1999998092651</text:p>
          </table:table-cell>
          <table:table-cell office:value-type="string">
            <text:p>1.87</text:p>
          </table:table-cell>
          <table:table-cell office:value-type="string">
            <text:p>md</text:p>
          </table:table-cell>
          <table:table-cell office:value-type="string">
            <text:p>41</text:p>
          </table:table-cell>
          <table:table-cell office:value-type="string">
            <text:p>82</text:p>
          </table:table-cell>
          <table:table-cell office:value-type="string">
            <text:p>0.04627</text:p>
          </table:table-cell>
          <table:table-cell office:value-type="string">
            <text:p>0.189999998</text:p>
          </table:table-cell>
          <table:table-cell office:value-type="string">
            <text:p>hv</text:p>
          </table:table-cell>
          <table:table-cell office:value-type="string">
            <text:p>hv75001246</text:p>
          </table:table-cell>
          <table:table-cell office:value-type="string">
            <text:p>2026-07-12T07:02:11.000Z</text:p>
          </table:table-cell>
          <table:table-cell office:value-type="string">
            <text:p>13 km S of Volcano, Hawaii</text:p>
          </table:table-cell>
          <table:table-cell office:value-type="string">
            <text:p>earthquake</text:p>
          </table:table-cell>
          <table:table-cell office:value-type="string">
            <text:p>0.3</text:p>
          </table:table-cell>
          <table:table-cell office:value-type="string">
            <text:p>0.870000005</text:p>
          </table:table-cell>
          <table:table-cell office:value-type="string">
            <text:p>0.12502337559122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2T06:48:01.740Z</text:p>
          </table:table-cell>
          <table:table-cell office:value-type="string">
            <text:p>35.743666666667</text:p>
          </table:table-cell>
          <table:table-cell office:value-type="string">
            <text:p>-117.55816666667</text:p>
          </table:table-cell>
          <table:table-cell office:value-type="string">
            <text:p>2.35</text:p>
          </table:table-cell>
          <table:table-cell office:value-type="string">
            <text:p>0.8</text:p>
          </table:table-cell>
          <table:table-cell office:value-type="string">
            <text:p>ml</text:p>
          </table:table-cell>
          <table:table-cell office:value-type="string">
            <text:p>24</text:p>
          </table:table-cell>
          <table:table-cell office:value-type="string">
            <text:p>86</text:p>
          </table:table-cell>
          <table:table-cell office:value-type="string">
            <text:p>0.07871</text:p>
          </table:table-cell>
          <table:table-cell office:value-type="string">
            <text:p>0.15</text:p>
          </table:table-cell>
          <table:table-cell office:value-type="string">
            <text:p>ci</text:p>
          </table:table-cell>
          <table:table-cell office:value-type="string">
            <text:p>ci41291751</text:p>
          </table:table-cell>
          <table:table-cell office:value-type="string">
            <text:p>2026-07-12T06:51:26.263Z</text:p>
          </table:table-cell>
          <table:table-cell office:value-type="string">
            <text:p>14 km W of Searles Valley, CA</text:p>
          </table:table-cell>
          <table:table-cell office:value-type="string">
            <text:p>earthquake</text:p>
          </table:table-cell>
          <table:table-cell office:value-type="string">
            <text:p>0.18</text:p>
          </table:table-cell>
          <table:table-cell office:value-type="string">
            <text:p>0.33</text:p>
          </table:table-cell>
          <table:table-cell office:value-type="string">
            <text:p>0.17816323086748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6:35:47.833Z</text:p>
          </table:table-cell>
          <table:table-cell office:value-type="string">
            <text:p>59.795</text:p>
          </table:table-cell>
          <table:table-cell office:value-type="string">
            <text:p>-152.564</text:p>
          </table:table-cell>
          <table:table-cell office:value-type="string">
            <text:p>79</text:p>
          </table:table-cell>
          <table:table-cell office:value-type="string">
            <text:p>1.9</text:p>
          </table:table-cell>
          <table:table-cell office:value-type="string">
            <text:p>ml</text:p>
          </table:table-cell>
          <table:table-cell office:value-type="string">
            <text:p>53</text:p>
          </table:table-cell>
          <table:table-cell office:value-type="string">
            <text:p>64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rdkht</text:p>
          </table:table-cell>
          <table:table-cell office:value-type="string">
            <text:p>2026-07-12T06:38:32.900Z</text:p>
          </table:table-cell>
          <table:table-cell office:value-type="string">
            <text:p>41 km W of Anchor Point, Alaska</text:p>
          </table:table-cell>
          <table:table-cell office:value-type="string">
            <text:p>earthquake</text:p>
          </table:table-cell>
          <table:table-cell office:value-type="string">
            <text:p>3.5</text:p>
          </table:table-cell>
          <table:table-cell office:value-type="string">
            <text:p>2.2316</text:p>
          </table:table-cell>
          <table:table-cell office:value-type="string">
            <text:p>0.1</text:p>
          </table:table-cell>
          <table:table-cell office:value-type="string">
            <text:p>31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6:33:21.720Z</text:p>
          </table:table-cell>
          <table:table-cell office:value-type="string">
            <text:p>36.547832489014</text:p>
          </table:table-cell>
          <table:table-cell office:value-type="string">
            <text:p>-121.16916656494</text:p>
          </table:table-cell>
          <table:table-cell office:value-type="string">
            <text:p>5.8299999237061</text:p>
          </table:table-cell>
          <table:table-cell office:value-type="string">
            <text:p>1.84</text:p>
          </table:table-cell>
          <table:table-cell office:value-type="string">
            <text:p>md</text:p>
          </table:table-cell>
          <table:table-cell office:value-type="string">
            <text:p>30</text:p>
          </table:table-cell>
          <table:table-cell office:value-type="string">
            <text:p>51</text:p>
          </table:table-cell>
          <table:table-cell office:value-type="string">
            <text:p>0.02717</text:p>
          </table:table-cell>
          <table:table-cell office:value-type="string">
            <text:p>0.16</text:p>
          </table:table-cell>
          <table:table-cell office:value-type="string">
            <text:p>nc</text:p>
          </table:table-cell>
          <table:table-cell office:value-type="string">
            <text:p>nc75394326</text:p>
          </table:table-cell>
          <table:table-cell office:value-type="string">
            <text:p>2026-07-12T07:07:19.877Z</text:p>
          </table:table-cell>
          <table:table-cell office:value-type="string">
            <text:p>3 km NW of Pinnacles, CA</text:p>
          </table:table-cell>
          <table:table-cell office:value-type="string">
            <text:p>earthquake</text:p>
          </table:table-cell>
          <table:table-cell office:value-type="string">
            <text:p>0.3</text:p>
          </table:table-cell>
          <table:table-cell office:value-type="string">
            <text:p>0.970000029</text:p>
          </table:table-cell>
          <table:table-cell office:value-type="string">
            <text:p>0.21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6:30:39.013Z</text:p>
          </table:table-cell>
          <table:table-cell office:value-type="string">
            <text:p>25.5695</text:p>
          </table:table-cell>
          <table:table-cell office:value-type="string">
            <text:p>90.7428</text:p>
          </table:table-cell>
          <table:table-cell office:value-type="string">
            <text:p>10</text:p>
          </table:table-cell>
          <table:table-cell office:value-type="string">
            <text:p>4.3</text:p>
          </table:table-cell>
          <table:table-cell office:value-type="string">
            <text:p>mb</text:p>
          </table:table-cell>
          <table:table-cell office:value-type="string">
            <text:p>33</text:p>
          </table:table-cell>
          <table:table-cell office:value-type="string">
            <text:p>165</text:p>
          </table:table-cell>
          <table:table-cell office:value-type="string">
            <text:p>5.793</text:p>
          </table:table-cell>
          <table:table-cell office:value-type="string">
            <text:p>0.78</text:p>
          </table:table-cell>
          <table:table-cell office:value-type="string">
            <text:p>us</text:p>
          </table:table-cell>
          <table:table-cell office:value-type="string">
            <text:p>us7000sztw</text:p>
          </table:table-cell>
          <table:table-cell office:value-type="string">
            <text:p>2026-07-12T11:23:41.040Z</text:p>
          </table:table-cell>
          <table:table-cell office:value-type="string">
            <text:p>52 km W of Nongstoin, India</text:p>
          </table:table-cell>
          <table:table-cell office:value-type="string">
            <text:p>earthquake</text:p>
          </table:table-cell>
          <table:table-cell office:value-type="string">
            <text:p>12.58</text:p>
          </table:table-cell>
          <table:table-cell office:value-type="string">
            <text:p>1.872</text:p>
          </table:table-cell>
          <table:table-cell office:value-type="string">
            <text:p>0.101</text:p>
          </table:table-cell>
          <table:table-cell office:value-type="string">
            <text:p>28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6:27:04.610Z</text:p>
          </table:table-cell>
          <table:table-cell office:value-type="string">
            <text:p>38.756999969482</text:p>
          </table:table-cell>
          <table:table-cell office:value-type="string">
            <text:p>-122.73133087158</text:p>
          </table:table-cell>
          <table:table-cell office:value-type="string">
            <text:p>2.9000000953674</text:p>
          </table:table-cell>
          <table:table-cell office:value-type="string">
            <text:p>1.02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153</text:p>
          </table:table-cell>
          <table:table-cell office:value-type="string">
            <text:p>0.01117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321</text:p>
          </table:table-cell>
          <table:table-cell office:value-type="string">
            <text:p>2026-07-12T06:28:41.905Z</text:p>
          </table:table-cell>
          <table:table-cell office:value-type="string">
            <text:p>3 km SE of The Geysers, CA</text:p>
          </table:table-cell>
          <table:table-cell office:value-type="string">
            <text:p>earthquake</text:p>
          </table:table-cell>
          <table:table-cell office:value-type="string">
            <text:p>0.47</text:p>
          </table:table-cell>
          <table:table-cell office:value-type="string">
            <text:p>0.409999996</text:p>
          </table:table-cell>
          <table:table-cell office:value-type="string">
            <text:p>0.18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6:08:21.540Z</text:p>
          </table:table-cell>
          <table:table-cell office:value-type="string">
            <text:p>38.826667785645</text:p>
          </table:table-cell>
          <table:table-cell office:value-type="string">
            <text:p>-122.84133148193</text:p>
          </table:table-cell>
          <table:table-cell office:value-type="string">
            <text:p>1.5900000333786</text:p>
          </table:table-cell>
          <table:table-cell office:value-type="string">
            <text:p>1.05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124</text:p>
          </table:table-cell>
          <table:table-cell office:value-type="string">
            <text:p>0.006067</text:p>
          </table:table-cell>
          <table:table-cell office:value-type="string">
            <text:p>0.04</text:p>
          </table:table-cell>
          <table:table-cell office:value-type="string">
            <text:p>nc</text:p>
          </table:table-cell>
          <table:table-cell office:value-type="string">
            <text:p>nc75394311</text:p>
          </table:table-cell>
          <table:table-cell office:value-type="string">
            <text:p>2026-07-12T06:09:57.794Z</text:p>
          </table:table-cell>
          <table:table-cell office:value-type="string">
            <text:p>9 km NW of The Geysers, CA</text:p>
          </table:table-cell>
          <table:table-cell office:value-type="string">
            <text:p>earthquake</text:p>
          </table:table-cell>
          <table:table-cell office:value-type="string">
            <text:p>0.46</text:p>
          </table:table-cell>
          <table:table-cell office:value-type="string">
            <text:p>1.32000005</text:p>
          </table:table-cell>
          <table:table-cell office:value-type="string">
            <text:p>0.11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6:01:17.700Z</text:p>
          </table:table-cell>
          <table:table-cell office:value-type="string">
            <text:p>33.338666666667</text:p>
          </table:table-cell>
          <table:table-cell office:value-type="string">
            <text:p>-116.3755</text:p>
          </table:table-cell>
          <table:table-cell office:value-type="string">
            <text:p>8.47</text:p>
          </table:table-cell>
          <table:table-cell office:value-type="string">
            <text:p>1.21</text:p>
          </table:table-cell>
          <table:table-cell office:value-type="string">
            <text:p>ml</text:p>
          </table:table-cell>
          <table:table-cell office:value-type="string">
            <text:p>26</text:p>
          </table:table-cell>
          <table:table-cell office:value-type="string">
            <text:p>79</text:p>
          </table:table-cell>
          <table:table-cell office:value-type="string">
            <text:p>0.01381</text:p>
          </table:table-cell>
          <table:table-cell office:value-type="string">
            <text:p>0.15</text:p>
          </table:table-cell>
          <table:table-cell office:value-type="string">
            <text:p>ci</text:p>
          </table:table-cell>
          <table:table-cell office:value-type="string">
            <text:p>ci41291743</text:p>
          </table:table-cell>
          <table:table-cell office:value-type="string">
            <text:p>2026-07-12T06:04:40.214Z</text:p>
          </table:table-cell>
          <table:table-cell office:value-type="string">
            <text:p>9 km N of Borrego Springs, CA</text:p>
          </table:table-cell>
          <table:table-cell office:value-type="string">
            <text:p>earthquake</text:p>
          </table:table-cell>
          <table:table-cell office:value-type="string">
            <text:p>0.2</text:p>
          </table:table-cell>
          <table:table-cell office:value-type="string">
            <text:p>0.41</text:p>
          </table:table-cell>
          <table:table-cell office:value-type="string">
            <text:p>0.44016961354445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6:00:44.138Z</text:p>
          </table:table-cell>
          <table:table-cell office:value-type="string">
            <text:p>59.72</text:p>
          </table:table-cell>
          <table:table-cell office:value-type="string">
            <text:p>-153.026</text:p>
          </table:table-cell>
          <table:table-cell office:value-type="string">
            <text:p>106.8</text:p>
          </table:table-cell>
          <table:table-cell office:value-type="string">
            <text:p>4.2</text:p>
          </table:table-cell>
          <table:table-cell office:value-type="string">
            <text:p>ml</text:p>
          </table:table-cell>
          <table:table-cell office:value-type="string">
            <text:p>216</text:p>
          </table:table-cell>
          <table:table-cell office:value-type="string">
            <text:p>60</text:p>
          </table:table-cell>
          <table:table-cell office:value-type="string">
            <text:p>0.1</text:p>
          </table:table-cell>
          <table:table-cell office:value-type="string">
            <text:p>0.9</text:p>
          </table:table-cell>
          <table:table-cell office:value-type="string">
            <text:p>ak</text:p>
          </table:table-cell>
          <table:table-cell office:value-type="string">
            <text:p>aka2026nrcfxi</text:p>
          </table:table-cell>
          <table:table-cell office:value-type="string">
            <text:p>2026-07-12T08:01:00.536Z</text:p>
          </table:table-cell>
          <table:table-cell office:value-type="string">
            <text:p>61 km E of Pedro Bay, Alaska</text:p>
          </table:table-cell>
          <table:table-cell office:value-type="string">
            <text:p>earthquake</text:p>
          </table:table-cell>
          <table:table-cell office:value-type="string">
            <text:p>1.8</text:p>
          </table:table-cell>
          <table:table-cell office:value-type="string">
            <text:p>1.0191</text:p>
          </table:table-cell>
          <table:table-cell office:value-type="string">
            <text:p>0.3</text:p>
          </table:table-cell>
          <table:table-cell office:value-type="string">
            <text:p>132</text:p>
          </table:table-cell>
          <table:table-cell office:value-type="string">
            <text:p>reviewed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5:58:39.064Z</text:p>
          </table:table-cell>
          <table:table-cell office:value-type="string">
            <text:p>31.524</text:p>
          </table:table-cell>
          <table:table-cell office:value-type="string">
            <text:p>-104.153</text:p>
          </table:table-cell>
          <table:table-cell office:value-type="string">
            <text:p>4.1906</text:p>
          </table:table-cell>
          <table:table-cell office:value-type="string">
            <text:p>1.2</text:p>
          </table:table-cell>
          <table:table-cell office:value-type="string">
            <text:p>ml</text:p>
          </table:table-cell>
          <table:table-cell office:value-type="string">
            <text:p>27</text:p>
          </table:table-cell>
          <table:table-cell office:value-type="string">
            <text:p>73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string">
            <text:p>tx</text:p>
          </table:table-cell>
          <table:table-cell office:value-type="string">
            <text:p>tx2026noxhss</text:p>
          </table:table-cell>
          <table:table-cell office:value-type="string">
            <text:p>2026-07-12T07:00:27.066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1554173231125</text:p>
          </table:table-cell>
          <table:table-cell office:value-type="string">
            <text:p>0.2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5:46:19.810Z</text:p>
          </table:table-cell>
          <table:table-cell office:value-type="string">
            <text:p>35.0605</text:p>
          </table:table-cell>
          <table:table-cell office:value-type="string">
            <text:p>-119.04033333333</text:p>
          </table:table-cell>
          <table:table-cell office:value-type="string">
            <text:p>12.11</text:p>
          </table:table-cell>
          <table:table-cell office:value-type="string">
            <text:p>1.65</text:p>
          </table:table-cell>
          <table:table-cell office:value-type="string">
            <text:p>ml</text:p>
          </table:table-cell>
          <table:table-cell office:value-type="string">
            <text:p>60</text:p>
          </table:table-cell>
          <table:table-cell office:value-type="string">
            <text:p>42</text:p>
          </table:table-cell>
          <table:table-cell office:value-type="string">
            <text:p>0.03571</text:p>
          </table:table-cell>
          <table:table-cell office:value-type="string">
            <text:p>0.25</text:p>
          </table:table-cell>
          <table:table-cell office:value-type="string">
            <text:p>ci</text:p>
          </table:table-cell>
          <table:table-cell office:value-type="string">
            <text:p>ci41291735</text:p>
          </table:table-cell>
          <table:table-cell office:value-type="string">
            <text:p>2026-07-12T05:57:18.960Z</text:p>
          </table:table-cell>
          <table:table-cell office:value-type="string">
            <text:p>16 km NW of Grapevine, CA</text:p>
          </table:table-cell>
          <table:table-cell office:value-type="string">
            <text:p>earthquake</text:p>
          </table:table-cell>
          <table:table-cell office:value-type="string">
            <text:p>0.24</text:p>
          </table:table-cell>
          <table:table-cell office:value-type="string">
            <text:p>0.66</text:p>
          </table:table-cell>
          <table:table-cell office:value-type="string">
            <text:p>0.13072633482222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5:45:37.600Z</text:p>
          </table:table-cell>
          <table:table-cell office:value-type="string">
            <text:p>38.838665008545</text:p>
          </table:table-cell>
          <table:table-cell office:value-type="string">
            <text:p>-122.79233551025</text:p>
          </table:table-cell>
          <table:table-cell office:value-type="string">
            <text:p>1.4900000095367</text:p>
          </table:table-cell>
          <table:table-cell office:value-type="string">
            <text:p>0.2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114</text:p>
          </table:table-cell>
          <table:table-cell office:value-type="string">
            <text:p>0.001576</text:p>
          </table:table-cell>
          <table:table-cell office:value-type="string">
            <text:p>0.03</text:p>
          </table:table-cell>
          <table:table-cell office:value-type="string">
            <text:p>nc</text:p>
          </table:table-cell>
          <table:table-cell office:value-type="string">
            <text:p>nc75394296</text:p>
          </table:table-cell>
          <table:table-cell office:value-type="string">
            <text:p>2026-07-12T05:47:13.795Z</text:p>
          </table:table-cell>
          <table:table-cell office:value-type="string">
            <text:p>6 km WNW of Cobb, CA</text:p>
          </table:table-cell>
          <table:table-cell office:value-type="string">
            <text:p>earthquake</text:p>
          </table:table-cell>
          <table:table-cell office:value-type="string">
            <text:p>0.41</text:p>
          </table:table-cell>
          <table:table-cell office:value-type="string">
            <text:p>1.03999996</text:p>
          </table:table-cell>
          <table:table-cell office:value-type="string">
            <text:p>0.11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5:40:54.072Z</text:p>
          </table:table-cell>
          <table:table-cell office:value-type="string">
            <text:p>31.53</text:p>
          </table:table-cell>
          <table:table-cell office:value-type="string">
            <text:p>-104.155</text:p>
          </table:table-cell>
          <table:table-cell office:value-type="string">
            <text:p>4.5743</text:p>
          </table:table-cell>
          <table:table-cell office:value-type="string">
            <text:p>1.7</text:p>
          </table:table-cell>
          <table:table-cell office:value-type="string">
            <text:p>ml</text:p>
          </table:table-cell>
          <table:table-cell office:value-type="string">
            <text:p>35</text:p>
          </table:table-cell>
          <table:table-cell office:value-type="string">
            <text:p>72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string">
            <text:p>tx</text:p>
          </table:table-cell>
          <table:table-cell office:value-type="string">
            <text:p>tx2026nowroz</text:p>
          </table:table-cell>
          <table:table-cell office:value-type="string">
            <text:p>2026-07-12T05:45:13.276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635551214218</text:p>
          </table:table-cell>
          <table:table-cell office:value-type="string">
            <text:p>0.2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5:36:14.117Z</text:p>
          </table:table-cell>
          <table:table-cell office:value-type="string">
            <text:p>31.529</text:p>
          </table:table-cell>
          <table:table-cell office:value-type="string">
            <text:p>-104.156</text:p>
          </table:table-cell>
          <table:table-cell office:value-type="string">
            <text:p>4.5213</text:p>
          </table:table-cell>
          <table:table-cell office:value-type="string">
            <text:p>2.3</text:p>
          </table:table-cell>
          <table:table-cell office:value-type="string">
            <text:p>ml</text:p>
          </table:table-cell>
          <table:table-cell office:value-type="string">
            <text:p>42</text:p>
          </table:table-cell>
          <table:table-cell office:value-type="string">
            <text:p>72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owosh</text:p>
          </table:table-cell>
          <table:table-cell office:value-type="string">
            <text:p>2026-07-12T06:01:15.486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0.9552783370018</text:p>
          </table:table-cell>
          <table:table-cell office:value-type="string">
            <text:p>0.3</text:p>
          </table:table-cell>
          <table:table-cell office:value-type="string">
            <text:p>31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5:20:12.936Z</text:p>
          </table:table-cell>
          <table:table-cell office:value-type="string">
            <text:p>28.863</text:p>
          </table:table-cell>
          <table:table-cell office:value-type="string">
            <text:p>-98.988</text:p>
          </table:table-cell>
          <table:table-cell office:value-type="string">
            <text:p>5.6718</text:p>
          </table:table-cell>
          <table:table-cell office:value-type="string">
            <text:p>1.9</text:p>
          </table:table-cell>
          <table:table-cell office:value-type="string">
            <text:p>ml</text:p>
          </table:table-cell>
          <table:table-cell office:value-type="string">
            <text:p>24</text:p>
          </table:table-cell>
          <table:table-cell office:value-type="string">
            <text:p>85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x</text:p>
          </table:table-cell>
          <table:table-cell office:value-type="string">
            <text:p>tx2026nowaxy</text:p>
          </table:table-cell>
          <table:table-cell office:value-type="string">
            <text:p>2026-07-12T10:19:00.243Z</text:p>
          </table:table-cell>
          <table:table-cell office:value-type="string">
            <text:p>10 km ESE of Pearsall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2.2483801841736</text:p>
          </table:table-cell>
          <table:table-cell office:value-type="string">
            <text:p>0.2</text:p>
          </table:table-cell>
          <table:table-cell office:value-type="string">
            <text:p>18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5:13:46.140Z</text:p>
          </table:table-cell>
          <table:table-cell office:value-type="string">
            <text:p>38.824333190918</text:p>
          </table:table-cell>
          <table:table-cell office:value-type="string">
            <text:p>-122.78849792481</text:p>
          </table:table-cell>
          <table:table-cell office:value-type="string">
            <text:p>1.5499999523163</text:p>
          </table:table-cell>
          <table:table-cell office:value-type="string">
            <text:p>1.09</text:p>
          </table:table-cell>
          <table:table-cell office:value-type="string">
            <text:p>md</text:p>
          </table:table-cell>
          <table:table-cell office:value-type="string">
            <text:p>22</text:p>
          </table:table-cell>
          <table:table-cell office:value-type="string">
            <text:p>73</text:p>
          </table:table-cell>
          <table:table-cell office:value-type="string">
            <text:p>0.01263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291</text:p>
          </table:table-cell>
          <table:table-cell office:value-type="string">
            <text:p>2026-07-12T05:15:22.325Z</text:p>
          </table:table-cell>
          <table:table-cell office:value-type="string">
            <text:p>6 km W of Cobb, CA</text:p>
          </table:table-cell>
          <table:table-cell office:value-type="string">
            <text:p>earthquake</text:p>
          </table:table-cell>
          <table:table-cell office:value-type="string">
            <text:p>0.22</text:p>
          </table:table-cell>
          <table:table-cell office:value-type="string">
            <text:p>0.379999995</text:p>
          </table:table-cell>
          <table:table-cell office:value-type="string">
            <text:p>0.11</text:p>
          </table:table-cell>
          <table:table-cell office:value-type="string">
            <text:p>24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5:12:58.560Z</text:p>
          </table:table-cell>
          <table:table-cell office:value-type="string">
            <text:p>38.82466506958</text:p>
          </table:table-cell>
          <table:table-cell office:value-type="string">
            <text:p>-122.78816986084</text:p>
          </table:table-cell>
          <table:table-cell office:value-type="string">
            <text:p>1.539999961853</text:p>
          </table:table-cell>
          <table:table-cell office:value-type="string">
            <text:p>1.05</text:p>
          </table:table-cell>
          <table:table-cell office:value-type="string">
            <text:p>md</text:p>
          </table:table-cell>
          <table:table-cell office:value-type="string">
            <text:p>18</text:p>
          </table:table-cell>
          <table:table-cell office:value-type="string">
            <text:p>55</text:p>
          </table:table-cell>
          <table:table-cell office:value-type="string">
            <text:p>0.0128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286</text:p>
          </table:table-cell>
          <table:table-cell office:value-type="string">
            <text:p>2026-07-12T05:14:33.561Z</text:p>
          </table:table-cell>
          <table:table-cell office:value-type="string">
            <text:p>6 km W of Cobb, CA</text:p>
          </table:table-cell>
          <table:table-cell office:value-type="string">
            <text:p>earthquake</text:p>
          </table:table-cell>
          <table:table-cell office:value-type="string">
            <text:p>0.23</text:p>
          </table:table-cell>
          <table:table-cell office:value-type="string">
            <text:p>0.430000007</text:p>
          </table:table-cell>
          <table:table-cell office:value-type="string">
            <text:p>0.1</text:p>
          </table:table-cell>
          <table:table-cell office:value-type="string">
            <text:p>1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5:01:07.453Z</text:p>
          </table:table-cell>
          <table:table-cell office:value-type="string">
            <text:p>55.944</text:p>
          </table:table-cell>
          <table:table-cell office:value-type="string">
            <text:p>-159.764</text:p>
          </table:table-cell>
          <table:table-cell office:value-type="string">
            <text:p>11.1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14</text:p>
          </table:table-cell>
          <table:table-cell office:value-type="string">
            <text:p>173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ak</text:p>
          </table:table-cell>
          <table:table-cell office:value-type="string">
            <text:p>aka2026nrageu</text:p>
          </table:table-cell>
          <table:table-cell office:value-type="string">
            <text:p>2026-07-12T05:02:15.097Z</text:p>
          </table:table-cell>
          <table:table-cell office:value-type="string">
            <text:p>18 km WNW of Ivanof Bay, Alaska</text:p>
          </table:table-cell>
          <table:table-cell office:value-type="string">
            <text:p>earthquake</text:p>
          </table:table-cell>
          <table:table-cell office:value-type="string">
            <text:p>13.4</text:p>
          </table:table-cell>
          <table:table-cell office:value-type="string">
            <text:p>4.0679</text:p>
          </table:table-cell>
          <table:table-cell office:value-type="string">
            <text:p>0.3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4:32:26.314Z</text:p>
          </table:table-cell>
          <table:table-cell office:value-type="string">
            <text:p>56.16</text:p>
          </table:table-cell>
          <table:table-cell office:value-type="string">
            <text:p>-156.635</text:p>
          </table:table-cell>
          <table:table-cell office:value-type="string">
            <text:p>56.6</text:p>
          </table:table-cell>
          <table:table-cell office:value-type="string">
            <text:p>2.5</text:p>
          </table:table-cell>
          <table:table-cell office:value-type="string">
            <text:p>ml</text:p>
          </table:table-cell>
          <table:table-cell office:value-type="string">
            <text:p>32</text:p>
          </table:table-cell>
          <table:table-cell office:value-type="string">
            <text:p>134</text:p>
          </table:table-cell>
          <table:table-cell office:value-type="string">
            <text:p>0.7</text:p>
          </table:table-cell>
          <table:table-cell office:value-type="string">
            <text:p>0.6</text:p>
          </table:table-cell>
          <table:table-cell office:value-type="string">
            <text:p>ak</text:p>
          </table:table-cell>
          <table:table-cell office:value-type="string">
            <text:p>aka2026nqzhhf</text:p>
          </table:table-cell>
          <table:table-cell office:value-type="string">
            <text:p>2026-07-12T04:34:18.768Z</text:p>
          </table:table-cell>
          <table:table-cell office:value-type="string">
            <text:p>110 km E of Chignik, Alaska</text:p>
          </table:table-cell>
          <table:table-cell office:value-type="string">
            <text:p>earthquake</text:p>
          </table:table-cell>
          <table:table-cell office:value-type="string">
            <text:p>4.7</text:p>
          </table:table-cell>
          <table:table-cell office:value-type="string">
            <text:p>8.0356</text:p>
          </table:table-cell>
          <table:table-cell office:value-type="string">
            <text:p>0.3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4:29:33.793Z</text:p>
          </table:table-cell>
          <table:table-cell office:value-type="string">
            <text:p>31.551</text:p>
          </table:table-cell>
          <table:table-cell office:value-type="string">
            <text:p>-104.191</text:p>
          </table:table-cell>
          <table:table-cell office:value-type="string">
            <text:p>4.1288</text:p>
          </table:table-cell>
          <table:table-cell office:value-type="string">
            <text:p>1.7</text:p>
          </table:table-cell>
          <table:table-cell office:value-type="string">
            <text:p>ml</text:p>
          </table:table-cell>
          <table:table-cell office:value-type="string">
            <text:p>36</text:p>
          </table:table-cell>
          <table:table-cell office:value-type="string">
            <text:p>73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tx</text:p>
          </table:table-cell>
          <table:table-cell office:value-type="string">
            <text:p>tx2026nouiyi</text:p>
          </table:table-cell>
          <table:table-cell office:value-type="string">
            <text:p>2026-07-12T04:33:18.905Z</text:p>
          </table:table-cell>
          <table:table-cell office:value-type="string">
            <text:p>45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506356954575</text:p>
          </table:table-cell>
          <table:table-cell office:value-type="string">
            <text:p>0.2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4:19:16.090Z</text:p>
          </table:table-cell>
          <table:table-cell office:value-type="string">
            <text:p>17.98</text:p>
          </table:table-cell>
          <table:table-cell office:value-type="string">
            <text:p>-66.954333333333</text:p>
          </table:table-cell>
          <table:table-cell office:value-type="string">
            <text:p>9.68</text:p>
          </table:table-cell>
          <table:table-cell office:value-type="string">
            <text:p>1.65</text:p>
          </table:table-cell>
          <table:table-cell office:value-type="string">
            <text:p>md</text:p>
          </table:table-cell>
          <table:table-cell office:value-type="string">
            <text:p>5</text:p>
          </table:table-cell>
          <table:table-cell office:value-type="string">
            <text:p>171</text:p>
          </table:table-cell>
          <table:table-cell office:value-type="string">
            <text:p>0.06216</text:p>
          </table:table-cell>
          <table:table-cell office:value-type="string">
            <text:p>0.1</text:p>
          </table:table-cell>
          <table:table-cell office:value-type="string">
            <text:p>pr</text:p>
          </table:table-cell>
          <table:table-cell office:value-type="string">
            <text:p>pr71523463</text:p>
          </table:table-cell>
          <table:table-cell office:value-type="string">
            <text:p>2026-07-12T10:28:05.490Z</text:p>
          </table:table-cell>
          <table:table-cell office:value-type="string">
            <text:p>4 km WSW of Fuig, Puerto Rico</text:p>
          </table:table-cell>
          <table:table-cell office:value-type="string">
            <text:p>earthquake</text:p>
          </table:table-cell>
          <table:table-cell office:value-type="string">
            <text:p>0.58</text:p>
          </table:table-cell>
          <table:table-cell office:value-type="string">
            <text:p>0.98</text:p>
          </table:table-cell>
          <table:table-cell office:value-type="string">
            <text:p>0.097626302668907</text:p>
          </table:table-cell>
          <table:table-cell office:value-type="string">
            <text:p>3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2T04:13:41.931Z</text:p>
          </table:table-cell>
          <table:table-cell office:value-type="string">
            <text:p>28.877</text:p>
          </table:table-cell>
          <table:table-cell office:value-type="string">
            <text:p>-98.991</text:p>
          </table:table-cell>
          <table:table-cell office:value-type="string">
            <text:p>4.0303</text:p>
          </table:table-cell>
          <table:table-cell office:value-type="string">
            <text:p>1.7</text:p>
          </table:table-cell>
          <table:table-cell office:value-type="string">
            <text:p>ml</text:p>
          </table:table-cell>
          <table:table-cell office:value-type="string">
            <text:p>7</text:p>
          </table:table-cell>
          <table:table-cell office:value-type="string">
            <text:p>126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otvpp</text:p>
          </table:table-cell>
          <table:table-cell office:value-type="string">
            <text:p>2026-07-12T05:00:16.728Z</text:p>
          </table:table-cell>
          <table:table-cell office:value-type="string">
            <text:p>10 km E of Pearsall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4.4737539291382</text:p>
          </table:table-cell>
          <table:table-cell office:value-type="string">
            <text:p>0.1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4:11:30.637Z</text:p>
          </table:table-cell>
          <table:table-cell office:value-type="string">
            <text:p>23.7163</text:p>
          </table:table-cell>
          <table:table-cell office:value-type="string">
            <text:p>125.6339</text:p>
          </table:table-cell>
          <table:table-cell office:value-type="string">
            <text:p>10</text:p>
          </table:table-cell>
          <table:table-cell office:value-type="string">
            <text:p>4.3</text:p>
          </table:table-cell>
          <table:table-cell office:value-type="string">
            <text:p>mb</text:p>
          </table:table-cell>
          <table:table-cell office:value-type="string">
            <text:p>30</text:p>
          </table:table-cell>
          <table:table-cell office:value-type="string">
            <text:p>87</text:p>
          </table:table-cell>
          <table:table-cell office:value-type="string">
            <text:p>2.511</text:p>
          </table:table-cell>
          <table:table-cell office:value-type="string">
            <text:p>0.88</text:p>
          </table:table-cell>
          <table:table-cell office:value-type="string">
            <text:p>us</text:p>
          </table:table-cell>
          <table:table-cell office:value-type="string">
            <text:p>us7000szth</text:p>
          </table:table-cell>
          <table:table-cell office:value-type="string">
            <text:p>2026-07-12T04:31:53.040Z</text:p>
          </table:table-cell>
          <table:table-cell office:value-type="string">
            <text:p>123 km SSE of Miyakojima, Japan</text:p>
          </table:table-cell>
          <table:table-cell office:value-type="string">
            <text:p>earthquake</text:p>
          </table:table-cell>
          <table:table-cell office:value-type="string">
            <text:p>8.32</text:p>
          </table:table-cell>
          <table:table-cell office:value-type="string">
            <text:p>1.935</text:p>
          </table:table-cell>
          <table:table-cell office:value-type="string">
            <text:p>0.128</text:p>
          </table:table-cell>
          <table:table-cell office:value-type="string">
            <text:p>17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3:51:21.232Z</text:p>
          </table:table-cell>
          <table:table-cell office:value-type="string">
            <text:p>61.209</text:p>
          </table:table-cell>
          <table:table-cell office:value-type="string">
            <text:p>-147.18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9</text:p>
          </table:table-cell>
          <table:table-cell office:value-type="string">
            <text:p>149</text:p>
          </table:table-cell>
          <table:table-cell office:value-type="string">
            <text:p>0.3</text:p>
          </table:table-cell>
          <table:table-cell office:value-type="string">
            <text:p>0.6</text:p>
          </table:table-cell>
          <table:table-cell office:value-type="string">
            <text:p>ak</text:p>
          </table:table-cell>
          <table:table-cell office:value-type="string">
            <text:p>aka2026nqxxsi</text:p>
          </table:table-cell>
          <table:table-cell office:value-type="string">
            <text:p>2026-07-12T03:52:37.731Z</text:p>
          </table:table-cell>
          <table:table-cell office:value-type="string">
            <text:p>45 km W of Valdez, Alaska</text:p>
          </table:table-cell>
          <table:table-cell office:value-type="string">
            <text:p>earthquake</text:p>
          </table:table-cell>
          <table:table-cell office:value-type="string">
            <text:p>5.5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3:48:59.510Z</text:p>
          </table:table-cell>
          <table:table-cell office:value-type="string">
            <text:p>33.479333333333</text:p>
          </table:table-cell>
          <table:table-cell office:value-type="string">
            <text:p>-116.44983333333</text:p>
          </table:table-cell>
          <table:table-cell office:value-type="string">
            <text:p>12.38</text:p>
          </table:table-cell>
          <table:table-cell office:value-type="string">
            <text:p>2.2</text:p>
          </table:table-cell>
          <table:table-cell office:value-type="string">
            <text:p>ml</text:p>
          </table:table-cell>
          <table:table-cell office:value-type="string">
            <text:p>101</text:p>
          </table:table-cell>
          <table:table-cell office:value-type="string">
            <text:p>26</text:p>
          </table:table-cell>
          <table:table-cell office:value-type="string">
            <text:p>0.1283</text:p>
          </table:table-cell>
          <table:table-cell office:value-type="string">
            <text:p>0.21</text:p>
          </table:table-cell>
          <table:table-cell office:value-type="string">
            <text:p>ci</text:p>
          </table:table-cell>
          <table:table-cell office:value-type="string">
            <text:p>ci41291727</text:p>
          </table:table-cell>
          <table:table-cell office:value-type="string">
            <text:p>2026-07-12T03:59:55.220Z</text:p>
          </table:table-cell>
          <table:table-cell office:value-type="string">
            <text:p>22 km ESE of Anza, CA</text:p>
          </table:table-cell>
          <table:table-cell office:value-type="string">
            <text:p>earthquake</text:p>
          </table:table-cell>
          <table:table-cell office:value-type="string">
            <text:p>0.12</text:p>
          </table:table-cell>
          <table:table-cell office:value-type="string">
            <text:p>0.44</text:p>
          </table:table-cell>
          <table:table-cell office:value-type="string">
            <text:p>0.17248755371432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3:48:51.700Z</text:p>
          </table:table-cell>
          <table:table-cell office:value-type="string">
            <text:p>32.182</text:p>
          </table:table-cell>
          <table:table-cell office:value-type="string">
            <text:p>-101.392</text:p>
          </table:table-cell>
          <table:table-cell office:value-type="string">
            <text:p>3.3186</text:p>
          </table:table-cell>
          <table:table-cell office:value-type="string">
            <text:p>1.2</text:p>
          </table:table-cell>
          <table:table-cell office:value-type="string">
            <text:p>ml</text:p>
          </table:table-cell>
          <table:table-cell office:value-type="string">
            <text:p>25</text:p>
          </table:table-cell>
          <table:table-cell office:value-type="string">
            <text:p>69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x</text:p>
          </table:table-cell>
          <table:table-cell office:value-type="string">
            <text:p>tx2026notafn</text:p>
          </table:table-cell>
          <table:table-cell office:value-type="string">
            <text:p>2026-07-12T11:18:18.595Z</text:p>
          </table:table-cell>
          <table:table-cell office:value-type="string">
            <text:p>8 km NNW of Forsan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854444503784</text:p>
          </table:table-cell>
          <table:table-cell office:value-type="string">
            <text:p>0.1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3:48:45.536Z</text:p>
          </table:table-cell>
          <table:table-cell office:value-type="string">
            <text:p>60.104</text:p>
          </table:table-cell>
          <table:table-cell office:value-type="string">
            <text:p>-151.325</text:p>
          </table:table-cell>
          <table:table-cell office:value-type="string">
            <text:p>63.1</text:p>
          </table:table-cell>
          <table:table-cell office:value-type="string">
            <text:p>2.2</text:p>
          </table:table-cell>
          <table:table-cell office:value-type="string">
            <text:p>ml</text:p>
          </table:table-cell>
          <table:table-cell office:value-type="string">
            <text:p>33</text:p>
          </table:table-cell>
          <table:table-cell office:value-type="string">
            <text:p>49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ak</text:p>
          </table:table-cell>
          <table:table-cell office:value-type="string">
            <text:p>aka2026nqxvap</text:p>
          </table:table-cell>
          <table:table-cell office:value-type="string">
            <text:p>2026-07-12T07:29:40.069Z</text:p>
          </table:table-cell>
          <table:table-cell office:value-type="string">
            <text:p>14 km SSE of Clam Gulch, Alaska</text:p>
          </table:table-cell>
          <table:table-cell office:value-type="string">
            <text:p>earthquake</text:p>
          </table:table-cell>
          <table:table-cell office:value-type="string">
            <text:p>3.8</text:p>
          </table:table-cell>
          <table:table-cell office:value-type="string">
            <text:p>4.0722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3:43:37.900Z</text:p>
          </table:table-cell>
          <table:table-cell office:value-type="string">
            <text:p>35.362666666667</text:p>
          </table:table-cell>
          <table:table-cell office:value-type="string">
            <text:p>-117.79</text:p>
          </table:table-cell>
          <table:table-cell office:value-type="string">
            <text:p>4.6</text:p>
          </table:table-cell>
          <table:table-cell office:value-type="string">
            <text:p>1.2</text:p>
          </table:table-cell>
          <table:table-cell office:value-type="string">
            <text:p>ml</text:p>
          </table:table-cell>
          <table:table-cell office:value-type="string">
            <text:p>39</text:p>
          </table:table-cell>
          <table:table-cell office:value-type="string">
            <text:p>73</text:p>
          </table:table-cell>
          <table:table-cell office:value-type="string">
            <text:p>0.1054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719</text:p>
          </table:table-cell>
          <table:table-cell office:value-type="string">
            <text:p>2026-07-12T03:46:55.885Z</text:p>
          </table:table-cell>
          <table:table-cell office:value-type="string">
            <text:p>14 km W of Johannesburg, CA</text:p>
          </table:table-cell>
          <table:table-cell office:value-type="string">
            <text:p>earthquake</text:p>
          </table:table-cell>
          <table:table-cell office:value-type="string">
            <text:p>0.16</text:p>
          </table:table-cell>
          <table:table-cell office:value-type="string">
            <text:p>0.46</text:p>
          </table:table-cell>
          <table:table-cell office:value-type="string">
            <text:p>0.19946204365496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3:35:05.990Z</text:p>
          </table:table-cell>
          <table:table-cell office:value-type="string">
            <text:p>40.546501159668</text:p>
          </table:table-cell>
          <table:table-cell office:value-type="string">
            <text:p>-124.29016876221</text:p>
          </table:table-cell>
          <table:table-cell office:value-type="string">
            <text:p>19.979999542236</text:p>
          </table:table-cell>
          <table:table-cell office:value-type="string">
            <text:p>2.71</text:p>
          </table:table-cell>
          <table:table-cell office:value-type="string">
            <text:p>md</text:p>
          </table:table-cell>
          <table:table-cell office:value-type="string">
            <text:p>34</text:p>
          </table:table-cell>
          <table:table-cell office:value-type="string">
            <text:p>185</text:p>
          </table:table-cell>
          <table:table-cell office:value-type="string">
            <text:p>0.185</text:p>
          </table:table-cell>
          <table:table-cell office:value-type="string">
            <text:p>0.11</text:p>
          </table:table-cell>
          <table:table-cell office:value-type="string">
            <text:p>nc</text:p>
          </table:table-cell>
          <table:table-cell office:value-type="string">
            <text:p>nc75394266</text:p>
          </table:table-cell>
          <table:table-cell office:value-type="string">
            <text:p>2026-07-12T04:33:42.204Z</text:p>
          </table:table-cell>
          <table:table-cell office:value-type="string">
            <text:p>4 km SW of Ferndale, CA</text:p>
          </table:table-cell>
          <table:table-cell office:value-type="string">
            <text:p>earthquake</text:p>
          </table:table-cell>
          <table:table-cell office:value-type="string">
            <text:p>0.55</text:p>
          </table:table-cell>
          <table:table-cell office:value-type="string">
            <text:p>0.349999994</text:p>
          </table:table-cell>
          <table:table-cell office:value-type="string">
            <text:p>0.09</text:p>
          </table:table-cell>
          <table:table-cell office:value-type="string">
            <text:p>23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3:31:27.490Z</text:p>
          </table:table-cell>
          <table:table-cell office:value-type="string">
            <text:p>19.354499816894</text:p>
          </table:table-cell>
          <table:table-cell office:value-type="string">
            <text:p>-155.30966186523</text:p>
          </table:table-cell>
          <table:table-cell office:value-type="string">
            <text:p>31.709999084473</text:p>
          </table:table-cell>
          <table:table-cell office:value-type="string">
            <text:p>1.73</text:p>
          </table:table-cell>
          <table:table-cell office:value-type="string">
            <text:p>md</text:p>
          </table:table-cell>
          <table:table-cell office:value-type="string">
            <text:p>21</text:p>
          </table:table-cell>
          <table:table-cell office:value-type="string">
            <text:p>84</text:p>
          </table:table-cell>
          <table:table-cell office:value-type="string">
            <text:p>0.01087</text:p>
          </table:table-cell>
          <table:table-cell office:value-type="string">
            <text:p>0.140000001</text:p>
          </table:table-cell>
          <table:table-cell office:value-type="string">
            <text:p>hv</text:p>
          </table:table-cell>
          <table:table-cell office:value-type="string">
            <text:p>hv75001181</text:p>
          </table:table-cell>
          <table:table-cell office:value-type="string">
            <text:p>2026-07-12T03:34:50.000Z</text:p>
          </table:table-cell>
          <table:table-cell office:value-type="string">
            <text:p>12 km SW of Volcano, Hawaii</text:p>
          </table:table-cell>
          <table:table-cell office:value-type="string">
            <text:p>earthquake</text:p>
          </table:table-cell>
          <table:table-cell office:value-type="string">
            <text:p>0.85</text:p>
          </table:table-cell>
          <table:table-cell office:value-type="string">
            <text:p>1.25999999</text:p>
          </table:table-cell>
          <table:table-cell office:value-type="string">
            <text:p>0.16665887802376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2T03:13:27.870Z</text:p>
          </table:table-cell>
          <table:table-cell office:value-type="string">
            <text:p>40.24100112915</text:p>
          </table:table-cell>
          <table:table-cell office:value-type="string">
            <text:p>-124.56566619873</text:p>
          </table:table-cell>
          <table:table-cell office:value-type="string">
            <text:p>6.5500001907349</text:p>
          </table:table-cell>
          <table:table-cell office:value-type="string">
            <text:p>2.17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313</text:p>
          </table:table-cell>
          <table:table-cell office:value-type="string">
            <text:p>0.1772</text:p>
          </table:table-cell>
          <table:table-cell office:value-type="string">
            <text:p>0.16</text:p>
          </table:table-cell>
          <table:table-cell office:value-type="string">
            <text:p>nc</text:p>
          </table:table-cell>
          <table:table-cell office:value-type="string">
            <text:p>nc75394261</text:p>
          </table:table-cell>
          <table:table-cell office:value-type="string">
            <text:p>2026-07-12T03:37:21.419Z</text:p>
          </table:table-cell>
          <table:table-cell office:value-type="string">
            <text:p>26 km WSW of Petrolia, CA</text:p>
          </table:table-cell>
          <table:table-cell office:value-type="string">
            <text:p>earthquake</text:p>
          </table:table-cell>
          <table:table-cell office:value-type="string">
            <text:p>7.38</text:p>
          </table:table-cell>
          <table:table-cell office:value-type="string">
            <text:p>4.03999996</text:p>
          </table:table-cell>
          <table:table-cell office:value-type="string">
            <text:p>0.2</text:p>
          </table:table-cell>
          <table:table-cell office:value-type="string">
            <text:p>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3:04:07.694Z</text:p>
          </table:table-cell>
          <table:table-cell office:value-type="string">
            <text:p>-15.0887</text:p>
          </table:table-cell>
          <table:table-cell office:value-type="string">
            <text:p>167.3355</text:p>
          </table:table-cell>
          <table:table-cell office:value-type="string">
            <text:p>126.089</text:p>
          </table:table-cell>
          <table:table-cell office:value-type="string">
            <text:p>4.6</text:p>
          </table:table-cell>
          <table:table-cell office:value-type="string">
            <text:p>mb</text:p>
          </table:table-cell>
          <table:table-cell office:value-type="string">
            <text:p>35</text:p>
          </table:table-cell>
          <table:table-cell office:value-type="string">
            <text:p>144</text:p>
          </table:table-cell>
          <table:table-cell office:value-type="string">
            <text:p>6.159</text:p>
          </table:table-cell>
          <table:table-cell office:value-type="string">
            <text:p>0.87</text:p>
          </table:table-cell>
          <table:table-cell office:value-type="string">
            <text:p>us</text:p>
          </table:table-cell>
          <table:table-cell office:value-type="string">
            <text:p>us7000szt5</text:p>
          </table:table-cell>
          <table:table-cell office:value-type="string">
            <text:p>2026-07-12T03:21:16.040Z</text:p>
          </table:table-cell>
          <table:table-cell office:value-type="string">
            <text:p>28 km E of Port-Olry, Vanuatu</text:p>
          </table:table-cell>
          <table:table-cell office:value-type="string">
            <text:p>earthquake</text:p>
          </table:table-cell>
          <table:table-cell office:value-type="string">
            <text:p>12.3</text:p>
          </table:table-cell>
          <table:table-cell office:value-type="string">
            <text:p>8.262</text:p>
          </table:table-cell>
          <table:table-cell office:value-type="string">
            <text:p>0.103</text:p>
          </table:table-cell>
          <table:table-cell office:value-type="string">
            <text:p>28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2:56:43.920Z</text:p>
          </table:table-cell>
          <table:table-cell office:value-type="string">
            <text:p>38.842166900635</text:p>
          </table:table-cell>
          <table:table-cell office:value-type="string">
            <text:p>-122.84033203125</text:p>
          </table:table-cell>
          <table:table-cell office:value-type="string">
            <text:p>2.1800000667572</text:p>
          </table:table-cell>
          <table:table-cell office:value-type="string">
            <text:p>0.72</text:p>
          </table:table-cell>
          <table:table-cell office:value-type="string">
            <text:p>md</text:p>
          </table:table-cell>
          <table:table-cell office:value-type="string">
            <text:p>12</text:p>
          </table:table-cell>
          <table:table-cell office:value-type="string">
            <text:p>119</text:p>
          </table:table-cell>
          <table:table-cell office:value-type="string">
            <text:p>0.01821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251</text:p>
          </table:table-cell>
          <table:table-cell office:value-type="string">
            <text:p>2026-07-12T02:58:18.402Z</text:p>
          </table:table-cell>
          <table:table-cell office:value-type="string">
            <text:p>10 km NW of The Geysers, CA</text:p>
          </table:table-cell>
          <table:table-cell office:value-type="string">
            <text:p>earthquake</text:p>
          </table:table-cell>
          <table:table-cell office:value-type="string">
            <text:p>0.34</text:p>
          </table:table-cell>
          <table:table-cell office:value-type="string">
            <text:p>0.600000024</text:p>
          </table:table-cell>
          <table:table-cell office:value-type="string">
            <text:p>0.47</text:p>
          </table:table-cell>
          <table:table-cell office:value-type="string">
            <text:p>13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2:45:37.659Z</text:p>
          </table:table-cell>
          <table:table-cell office:value-type="string">
            <text:p>31.586</text:p>
          </table:table-cell>
          <table:table-cell office:value-type="string">
            <text:p>-104.48</text:p>
          </table:table-cell>
          <table:table-cell office:value-type="string">
            <text:p>3.2457</text:p>
          </table:table-cell>
          <table:table-cell office:value-type="string">
            <text:p>0.8</text:p>
          </table:table-cell>
          <table:table-cell office:value-type="string">
            <text:p>ml</text:p>
          </table:table-cell>
          <table:table-cell office:value-type="string">
            <text:p>10</text:p>
          </table:table-cell>
          <table:table-cell office:value-type="string">
            <text:p>214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oqxpw</text:p>
          </table:table-cell>
          <table:table-cell office:value-type="string">
            <text:p>2026-07-12T03:00:43.184Z</text:p>
          </table:table-cell>
          <table:table-cell office:value-type="string">
            <text:p>66 km S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3.6143488883972</text:p>
          </table:table-cell>
          <table:table-cell office:value-type="string">
            <text:p>0.2</text:p>
          </table:table-cell>
          <table:table-cell office:value-type="string">
            <text:p>7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2:39:08.939Z</text:p>
          </table:table-cell>
          <table:table-cell office:value-type="string">
            <text:p>43.2128</text:p>
          </table:table-cell>
          <table:table-cell office:value-type="string">
            <text:p>144.2682</text:p>
          </table:table-cell>
          <table:table-cell office:value-type="string">
            <text:p>123.547</text:p>
          </table:table-cell>
          <table:table-cell office:value-type="string">
            <text:p>4.4</text:p>
          </table:table-cell>
          <table:table-cell office:value-type="string">
            <text:p>mb</text:p>
          </table:table-cell>
          <table:table-cell office:value-type="string">
            <text:p>22</text:p>
          </table:table-cell>
          <table:table-cell office:value-type="string">
            <text:p>176</text:p>
          </table:table-cell>
          <table:table-cell office:value-type="string">
            <text:p>1.451</text:p>
          </table:table-cell>
          <table:table-cell office:value-type="string">
            <text:p>1.24</text:p>
          </table:table-cell>
          <table:table-cell office:value-type="string">
            <text:p>us</text:p>
          </table:table-cell>
          <table:table-cell office:value-type="string">
            <text:p>us7000szt3</text:p>
          </table:table-cell>
          <table:table-cell office:value-type="string">
            <text:p>2026-07-12T03:11:27.040Z</text:p>
          </table:table-cell>
          <table:table-cell office:value-type="string">
            <text:p>27 km NNW of Kushiro, Japan</text:p>
          </table:table-cell>
          <table:table-cell office:value-type="string">
            <text:p>earthquake</text:p>
          </table:table-cell>
          <table:table-cell office:value-type="string">
            <text:p>9.06</text:p>
          </table:table-cell>
          <table:table-cell office:value-type="string">
            <text:p>8.36</text:p>
          </table:table-cell>
          <table:table-cell office:value-type="string">
            <text:p>0.138</text:p>
          </table:table-cell>
          <table:table-cell office:value-type="string">
            <text:p>15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2:24:29.650Z</text:p>
          </table:table-cell>
          <table:table-cell office:value-type="string">
            <text:p>38.824333190918</text:p>
          </table:table-cell>
          <table:table-cell office:value-type="string">
            <text:p>-122.80100250244</text:p>
          </table:table-cell>
          <table:table-cell office:value-type="string">
            <text:p>2.5499999523163</text:p>
          </table:table-cell>
          <table:table-cell office:value-type="string">
            <text:p>1.03</text:p>
          </table:table-cell>
          <table:table-cell office:value-type="string">
            <text:p>md</text:p>
          </table:table-cell>
          <table:table-cell office:value-type="string">
            <text:p>19</text:p>
          </table:table-cell>
          <table:table-cell office:value-type="string">
            <text:p>56</text:p>
          </table:table-cell>
          <table:table-cell office:value-type="string">
            <text:p>0.007148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241</text:p>
          </table:table-cell>
          <table:table-cell office:value-type="string">
            <text:p>2026-07-12T02:26:06.964Z</text:p>
          </table:table-cell>
          <table:table-cell office:value-type="string">
            <text:p>7 km NW of The Geysers, CA</text:p>
          </table:table-cell>
          <table:table-cell office:value-type="string">
            <text:p>earthquake</text:p>
          </table:table-cell>
          <table:table-cell office:value-type="string">
            <text:p>0.26</text:p>
          </table:table-cell>
          <table:table-cell office:value-type="string">
            <text:p>0.49000001</text:p>
          </table:table-cell>
          <table:table-cell office:value-type="string">
            <text:p>0.25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2:21:34.020Z</text:p>
          </table:table-cell>
          <table:table-cell office:value-type="string">
            <text:p>34.309166666667</text:p>
          </table:table-cell>
          <table:table-cell office:value-type="string">
            <text:p>-117.14183333333</text:p>
          </table:table-cell>
          <table:table-cell office:value-type="string">
            <text:p>7.81</text:p>
          </table:table-cell>
          <table:table-cell office:value-type="string">
            <text:p>0.99</text:p>
          </table:table-cell>
          <table:table-cell office:value-type="string">
            <text:p>ml</text:p>
          </table:table-cell>
          <table:table-cell office:value-type="string">
            <text:p>27</text:p>
          </table:table-cell>
          <table:table-cell office:value-type="string">
            <text:p>120</text:p>
          </table:table-cell>
          <table:table-cell office:value-type="string">
            <text:p>0.113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703</text:p>
          </table:table-cell>
          <table:table-cell office:value-type="string">
            <text:p>2026-07-12T02:25:01.186Z</text:p>
          </table:table-cell>
          <table:table-cell office:value-type="string">
            <text:p>8 km NNE of Lake Arrowhead, CA</text:p>
          </table:table-cell>
          <table:table-cell office:value-type="string">
            <text:p>earthquake</text:p>
          </table:table-cell>
          <table:table-cell office:value-type="string">
            <text:p>0.26</text:p>
          </table:table-cell>
          <table:table-cell office:value-type="string">
            <text:p>0.6</text:p>
          </table:table-cell>
          <table:table-cell office:value-type="string">
            <text:p>0.26739677336991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2:21:32.440Z</text:p>
          </table:table-cell>
          <table:table-cell office:value-type="string">
            <text:p>35.312666666667</text:p>
          </table:table-cell>
          <table:table-cell office:value-type="string">
            <text:p>-117.80966666667</text:p>
          </table:table-cell>
          <table:table-cell office:value-type="string">
            <text:p>8.25</text:p>
          </table:table-cell>
          <table:table-cell office:value-type="string">
            <text:p>1.07</text:p>
          </table:table-cell>
          <table:table-cell office:value-type="string">
            <text:p>ml</text:p>
          </table:table-cell>
          <table:table-cell office:value-type="string">
            <text:p>35</text:p>
          </table:table-cell>
          <table:table-cell office:value-type="string">
            <text:p>56</text:p>
          </table:table-cell>
          <table:table-cell office:value-type="string">
            <text:p>0.05397</text:p>
          </table:table-cell>
          <table:table-cell office:value-type="string">
            <text:p>0.18</text:p>
          </table:table-cell>
          <table:table-cell office:value-type="string">
            <text:p>ci</text:p>
          </table:table-cell>
          <table:table-cell office:value-type="string">
            <text:p>ci41291695</text:p>
          </table:table-cell>
          <table:table-cell office:value-type="string">
            <text:p>2026-07-12T02:25:16.021Z</text:p>
          </table:table-cell>
          <table:table-cell office:value-type="string">
            <text:p>17 km WSW of Johannesburg, CA</text:p>
          </table:table-cell>
          <table:table-cell office:value-type="string">
            <text:p>earthquake</text:p>
          </table:table-cell>
          <table:table-cell office:value-type="string">
            <text:p>0.21</text:p>
          </table:table-cell>
          <table:table-cell office:value-type="string">
            <text:p>0.47</text:p>
          </table:table-cell>
          <table:table-cell office:value-type="string">
            <text:p>0.19038798607128</text:p>
          </table:table-cell>
          <table:table-cell office:value-type="string">
            <text:p>1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2T02:07:06.700Z</text:p>
          </table:table-cell>
          <table:table-cell office:value-type="string">
            <text:p>39.321166992188</text:p>
          </table:table-cell>
          <table:table-cell office:value-type="string">
            <text:p>-123.28450012207</text:p>
          </table:table-cell>
          <table:table-cell office:value-type="string">
            <text:p>7.2199997901917</text:p>
          </table:table-cell>
          <table:table-cell office:value-type="string">
            <text:p>1.56</text:p>
          </table:table-cell>
          <table:table-cell office:value-type="string">
            <text:p>md</text:p>
          </table:table-cell>
          <table:table-cell office:value-type="string">
            <text:p>12</text:p>
          </table:table-cell>
          <table:table-cell office:value-type="string">
            <text:p>81</text:p>
          </table:table-cell>
          <table:table-cell office:value-type="string">
            <text:p>0.116</text:p>
          </table:table-cell>
          <table:table-cell office:value-type="string">
            <text:p>0.05</text:p>
          </table:table-cell>
          <table:table-cell office:value-type="string">
            <text:p>nc</text:p>
          </table:table-cell>
          <table:table-cell office:value-type="string">
            <text:p>nc75394236</text:p>
          </table:table-cell>
          <table:table-cell office:value-type="string">
            <text:p>2026-07-12T03:17:25.287Z</text:p>
          </table:table-cell>
          <table:table-cell office:value-type="string">
            <text:p>9 km NW of Redwood Valley, CA</text:p>
          </table:table-cell>
          <table:table-cell office:value-type="string">
            <text:p>earthquake</text:p>
          </table:table-cell>
          <table:table-cell office:value-type="string">
            <text:p>0.23</text:p>
          </table:table-cell>
          <table:table-cell office:value-type="string">
            <text:p>1.04999995</text:p>
          </table:table-cell>
          <table:table-cell office:value-type="string">
            <text:p>0.12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2:05:33.150Z</text:p>
          </table:table-cell>
          <table:table-cell office:value-type="string">
            <text:p>38.82799911499</text:p>
          </table:table-cell>
          <table:table-cell office:value-type="string">
            <text:p>-122.81533050537</text:p>
          </table:table-cell>
          <table:table-cell office:value-type="string">
            <text:p>1.6200000047684</text:p>
          </table:table-cell>
          <table:table-cell office:value-type="string">
            <text:p>1.05</text:p>
          </table:table-cell>
          <table:table-cell office:value-type="string">
            <text:p>md</text:p>
          </table:table-cell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0.006164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226</text:p>
          </table:table-cell>
          <table:table-cell office:value-type="string">
            <text:p>2026-07-12T02:07:08.068Z</text:p>
          </table:table-cell>
          <table:table-cell office:value-type="string">
            <text:p>8 km NW of The Geysers, CA</text:p>
          </table:table-cell>
          <table:table-cell office:value-type="string">
            <text:p>earthquake</text:p>
          </table:table-cell>
          <table:table-cell office:value-type="string">
            <text:p>0.24</text:p>
          </table:table-cell>
          <table:table-cell office:value-type="string">
            <text:p>0.430000007</text:p>
          </table:table-cell>
          <table:table-cell office:value-type="string">
            <text:p>0.15</text:p>
          </table:table-cell>
          <table:table-cell office:value-type="string">
            <text:p>1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2:03:26.910Z</text:p>
          </table:table-cell>
          <table:table-cell office:value-type="string">
            <text:p>37.839168548584</text:p>
          </table:table-cell>
          <table:table-cell office:value-type="string">
            <text:p>-122.05066680908</text:p>
          </table:table-cell>
          <table:table-cell office:value-type="string">
            <text:p>11.729999542236</text:p>
          </table:table-cell>
          <table:table-cell office:value-type="string">
            <text:p>1.75</text:p>
          </table:table-cell>
          <table:table-cell office:value-type="string">
            <text:p>md</text:p>
          </table:table-cell>
          <table:table-cell office:value-type="string">
            <text:p>31</text:p>
          </table:table-cell>
          <table:table-cell office:value-type="string">
            <text:p>85</text:p>
          </table:table-cell>
          <table:table-cell office:value-type="string">
            <text:p>0.02468</text:p>
          </table:table-cell>
          <table:table-cell office:value-type="string">
            <text:p>0.07</text:p>
          </table:table-cell>
          <table:table-cell office:value-type="string">
            <text:p>nc</text:p>
          </table:table-cell>
          <table:table-cell office:value-type="string">
            <text:p>nc75394221</text:p>
          </table:table-cell>
          <table:table-cell office:value-type="string">
            <text:p>2026-07-12T02:52:22.135Z</text:p>
          </table:table-cell>
          <table:table-cell office:value-type="string">
            <text:p>2 km SW of Alamo, CA</text:p>
          </table:table-cell>
          <table:table-cell office:value-type="string">
            <text:p>earthquake</text:p>
          </table:table-cell>
          <table:table-cell office:value-type="string">
            <text:p>0.22</text:p>
          </table:table-cell>
          <table:table-cell office:value-type="string">
            <text:p>0.400000006</text:p>
          </table:table-cell>
          <table:table-cell office:value-type="string">
            <text:p>0.17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1:57:24.297Z</text:p>
          </table:table-cell>
          <table:table-cell office:value-type="string">
            <text:p>32.01</text:p>
          </table:table-cell>
          <table:table-cell office:value-type="string">
            <text:p>-103.242</text:p>
          </table:table-cell>
          <table:table-cell office:value-type="string">
            <text:p>8.79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18</text:p>
          </table:table-cell>
          <table:table-cell office:value-type="string">
            <text:p>79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x</text:p>
          </table:table-cell>
          <table:table-cell office:value-type="string">
            <text:p>tx2026nopidx</text:p>
          </table:table-cell>
          <table:table-cell office:value-type="string">
            <text:p>2026-07-12T07:10:33.400Z</text:p>
          </table:table-cell>
          <table:table-cell office:value-type="string">
            <text:p>12 km SSW of Jal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2.1740307807922</text:p>
          </table:table-cell>
          <table:table-cell office:value-type="string">
            <text:p>0.2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1:51:59.650Z</text:p>
          </table:table-cell>
          <table:table-cell office:value-type="string">
            <text:p>40.289165496826</text:p>
          </table:table-cell>
          <table:table-cell office:value-type="string">
            <text:p>-124.52149963379</text:p>
          </table:table-cell>
          <table:table-cell office:value-type="string">
            <text:p>10.579999923706</text:p>
          </table:table-cell>
          <table:table-cell office:value-type="string">
            <text:p>2.78</text:p>
          </table:table-cell>
          <table:table-cell office:value-type="string">
            <text:p>md</text:p>
          </table:table-cell>
          <table:table-cell office:value-type="string">
            <text:p>14</text:p>
          </table:table-cell>
          <table:table-cell office:value-type="string">
            <text:p>295</text:p>
          </table:table-cell>
          <table:table-cell office:value-type="string">
            <text:p>0.1369</text:p>
          </table:table-cell>
          <table:table-cell office:value-type="string">
            <text:p>0.17</text:p>
          </table:table-cell>
          <table:table-cell office:value-type="string">
            <text:p>nc</text:p>
          </table:table-cell>
          <table:table-cell office:value-type="string">
            <text:p>nc75394216</text:p>
          </table:table-cell>
          <table:table-cell office:value-type="string">
            <text:p>2026-07-12T02:27:22.964Z</text:p>
          </table:table-cell>
          <table:table-cell office:value-type="string">
            <text:p>20 km W of Petrolia, CA</text:p>
          </table:table-cell>
          <table:table-cell office:value-type="string">
            <text:p>earthquake</text:p>
          </table:table-cell>
          <table:table-cell office:value-type="string">
            <text:p>3.86</text:p>
          </table:table-cell>
          <table:table-cell office:value-type="string">
            <text:p>1.01999998</text:p>
          </table:table-cell>
          <table:table-cell office:value-type="string">
            <text:p>0.08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1:50:12.910Z</text:p>
          </table:table-cell>
          <table:table-cell office:value-type="string">
            <text:p>40.535831451416</text:p>
          </table:table-cell>
          <table:table-cell office:value-type="string">
            <text:p>-123.86250305176</text:p>
          </table:table-cell>
          <table:table-cell office:value-type="string">
            <text:p>21.729999542236</text:p>
          </table:table-cell>
          <table:table-cell office:value-type="string">
            <text:p>2.19</text:p>
          </table:table-cell>
          <table:table-cell office:value-type="string">
            <text:p>md</text:p>
          </table:table-cell>
          <table:table-cell office:value-type="string">
            <text:p>25</text:p>
          </table:table-cell>
          <table:table-cell office:value-type="string">
            <text:p>92</text:p>
          </table:table-cell>
          <table:table-cell office:value-type="string">
            <text:p>0.1138</text:p>
          </table:table-cell>
          <table:table-cell office:value-type="string">
            <text:p>0.13</text:p>
          </table:table-cell>
          <table:table-cell office:value-type="string">
            <text:p>nc</text:p>
          </table:table-cell>
          <table:table-cell office:value-type="string">
            <text:p>nc75394211</text:p>
          </table:table-cell>
          <table:table-cell office:value-type="string">
            <text:p>2026-07-12T02:12:21.862Z</text:p>
          </table:table-cell>
          <table:table-cell office:value-type="string">
            <text:p>20 km E of Hydesville, CA</text:p>
          </table:table-cell>
          <table:table-cell office:value-type="string">
            <text:p>earthquake</text:p>
          </table:table-cell>
          <table:table-cell office:value-type="string">
            <text:p>0.42</text:p>
          </table:table-cell>
          <table:table-cell office:value-type="string">
            <text:p>0.589999974</text:p>
          </table:table-cell>
          <table:table-cell office:value-type="string">
            <text:p>0.13</text:p>
          </table:table-cell>
          <table:table-cell office:value-type="string">
            <text:p>20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1:09:33.589Z</text:p>
          </table:table-cell>
          <table:table-cell office:value-type="string">
            <text:p>62.223</text:p>
          </table:table-cell>
          <table:table-cell office:value-type="string">
            <text:p>-148.23</text:p>
          </table:table-cell>
          <table:table-cell office:value-type="string">
            <text:p>19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9</text:p>
          </table:table-cell>
          <table:table-cell office:value-type="string">
            <text:p>13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qsnlg</text:p>
          </table:table-cell>
          <table:table-cell office:value-type="string">
            <text:p>2026-07-12T01:11:01.596Z</text:p>
          </table:table-cell>
          <table:table-cell office:value-type="string">
            <text:p>49 km NNE of Chickaloon, Alaska</text:p>
          </table:table-cell>
          <table:table-cell office:value-type="string">
            <text:p>earthquake</text:p>
          </table:table-cell>
          <table:table-cell office:value-type="string">
            <text:p>6.6</text:p>
          </table:table-cell>
          <table:table-cell office:value-type="string">
            <text:p>3.4948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1:00:19.420Z</text:p>
          </table:table-cell>
          <table:table-cell office:value-type="string">
            <text:p>38.80899810791</text:p>
          </table:table-cell>
          <table:table-cell office:value-type="string">
            <text:p>-122.78849792481</text:p>
          </table:table-cell>
          <table:table-cell office:value-type="string">
            <text:p>3</text:p>
          </table:table-cell>
          <table:table-cell office:value-type="string">
            <text:p>1.14</text:p>
          </table:table-cell>
          <table:table-cell office:value-type="string">
            <text:p>md</text:p>
          </table:table-cell>
          <table:table-cell office:value-type="string">
            <text:p>24</text:p>
          </table:table-cell>
          <table:table-cell office:value-type="string">
            <text:p>52</text:p>
          </table:table-cell>
          <table:table-cell office:value-type="string">
            <text:p>0.005415</text:p>
          </table:table-cell>
          <table:table-cell office:value-type="string">
            <text:p>0.03</text:p>
          </table:table-cell>
          <table:table-cell office:value-type="string">
            <text:p>nc</text:p>
          </table:table-cell>
          <table:table-cell office:value-type="string">
            <text:p>nc75394186</text:p>
          </table:table-cell>
          <table:table-cell office:value-type="string">
            <text:p>2026-07-12T01:32:21.581Z</text:p>
          </table:table-cell>
          <table:table-cell office:value-type="string">
            <text:p>4 km NW of The Geysers, CA</text:p>
          </table:table-cell>
          <table:table-cell office:value-type="string">
            <text:p>earthquake</text:p>
          </table:table-cell>
          <table:table-cell office:value-type="string">
            <text:p>0.28</text:p>
          </table:table-cell>
          <table:table-cell office:value-type="string">
            <text:p>0.469999999</text:p>
          </table:table-cell>
          <table:table-cell office:value-type="string">
            <text:p>0.17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0:43:30.178Z</text:p>
          </table:table-cell>
          <table:table-cell office:value-type="string">
            <text:p>3.6769</text:p>
          </table:table-cell>
          <table:table-cell office:value-type="string">
            <text:p>127.0246</text:p>
          </table:table-cell>
          <table:table-cell office:value-type="string">
            <text:p>41.8</text:p>
          </table:table-cell>
          <table:table-cell office:value-type="string">
            <text:p>4.9</text:p>
          </table:table-cell>
          <table:table-cell office:value-type="string">
            <text:p>mb</text:p>
          </table:table-cell>
          <table:table-cell office:value-type="string">
            <text:p>63</text:p>
          </table:table-cell>
          <table:table-cell office:value-type="string">
            <text:p>110</text:p>
          </table:table-cell>
          <table:table-cell office:value-type="string">
            <text:p>3.665</text:p>
          </table:table-cell>
          <table:table-cell office:value-type="string">
            <text:p>0.9</text:p>
          </table:table-cell>
          <table:table-cell office:value-type="string">
            <text:p>us</text:p>
          </table:table-cell>
          <table:table-cell office:value-type="string">
            <text:p>us7000szsv</text:p>
          </table:table-cell>
          <table:table-cell office:value-type="string">
            <text:p>2026-07-12T01:13:27.175Z</text:p>
          </table:table-cell>
          <table:table-cell office:value-type="string">
            <text:p>241 km NNW of Tobelo, Indonesia</text:p>
          </table:table-cell>
          <table:table-cell office:value-type="string">
            <text:p>earthquake</text:p>
          </table:table-cell>
          <table:table-cell office:value-type="string">
            <text:p>9.97</text:p>
          </table:table-cell>
          <table:table-cell office:value-type="string">
            <text:p>6.956</text:p>
          </table:table-cell>
          <table:table-cell office:value-type="string">
            <text:p>0.06</text:p>
          </table:table-cell>
          <table:table-cell office:value-type="string">
            <text:p>91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2T00:41:54.711Z</text:p>
          </table:table-cell>
          <table:table-cell office:value-type="string">
            <text:p>31.726</text:p>
          </table:table-cell>
          <table:table-cell office:value-type="string">
            <text:p>-104.26</text:p>
          </table:table-cell>
          <table:table-cell office:value-type="string">
            <text:p>4.2956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27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omuyf</text:p>
          </table:table-cell>
          <table:table-cell office:value-type="string">
            <text:p>2026-07-12T00:44:28.788Z</text:p>
          </table:table-cell>
          <table:table-cell office:value-type="string">
            <text:p>51 km SSE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56689620018</text:p>
          </table:table-cell>
          <table:table-cell office:value-type="string">
            <text:p>0.2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2T00:34:55.610Z</text:p>
          </table:table-cell>
          <table:table-cell office:value-type="string">
            <text:p>18.034</text:p>
          </table:table-cell>
          <table:table-cell office:value-type="string">
            <text:p>-66.897833333333</text:p>
          </table:table-cell>
          <table:table-cell office:value-type="string">
            <text:p>20.91</text:p>
          </table:table-cell>
          <table:table-cell office:value-type="string">
            <text:p>2.32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80</text:p>
          </table:table-cell>
          <table:table-cell office:value-type="string">
            <text:p>0.01462</text:p>
          </table:table-cell>
          <table:table-cell office:value-type="string">
            <text:p>0.09</text:p>
          </table:table-cell>
          <table:table-cell office:value-type="string">
            <text:p>pr</text:p>
          </table:table-cell>
          <table:table-cell office:value-type="string">
            <text:p>pr71523448</text:p>
          </table:table-cell>
          <table:table-cell office:value-type="string">
            <text:p>2026-07-12T00:43:43.340Z</text:p>
          </table:table-cell>
          <table:table-cell office:value-type="string">
            <text:p>0 km ESE of Lluveras, Puerto Rico</text:p>
          </table:table-cell>
          <table:table-cell office:value-type="string">
            <text:p>earthquake</text:p>
          </table:table-cell>
          <table:table-cell office:value-type="string">
            <text:p>0.44</text:p>
          </table:table-cell>
          <table:table-cell office:value-type="string">
            <text:p>0.64</text:p>
          </table:table-cell>
          <table:table-cell office:value-type="string">
            <text:p>0.078310524835928</text:p>
          </table:table-cell>
          <table:table-cell office:value-type="string">
            <text:p>4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2T00:31:53.290Z</text:p>
          </table:table-cell>
          <table:table-cell office:value-type="string">
            <text:p>38.832832336426</text:p>
          </table:table-cell>
          <table:table-cell office:value-type="string">
            <text:p>-122.81033325195</text:p>
          </table:table-cell>
          <table:table-cell office:value-type="string">
            <text:p>1.75</text:p>
          </table:table-cell>
          <table:table-cell office:value-type="string">
            <text:p>0.7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108</text:p>
          </table:table-cell>
          <table:table-cell office:value-type="string">
            <text:p>0.009426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181</text:p>
          </table:table-cell>
          <table:table-cell office:value-type="string">
            <text:p>2026-07-12T00:33:27.367Z</text:p>
          </table:table-cell>
          <table:table-cell office:value-type="string">
            <text:p>8 km W of Cobb, CA</text:p>
          </table:table-cell>
          <table:table-cell office:value-type="string">
            <text:p>earthquake</text:p>
          </table:table-cell>
          <table:table-cell office:value-type="string">
            <text:p>0.49</text:p>
          </table:table-cell>
          <table:table-cell office:value-type="string">
            <text:p>1.26999998</text:p>
          </table:table-cell>
          <table:table-cell office:value-type="string">
            <text:p>0.37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2T00:27:34.536Z</text:p>
          </table:table-cell>
          <table:table-cell office:value-type="string">
            <text:p>63.555</text:p>
          </table:table-cell>
          <table:table-cell office:value-type="string">
            <text:p>-147.913</text:p>
          </table:table-cell>
          <table:table-cell office:value-type="string">
            <text:p>3.7</text:p>
          </table:table-cell>
          <table:table-cell office:value-type="string">
            <text:p>1.8</text:p>
          </table:table-cell>
          <table:table-cell office:value-type="string">
            <text:p>ml</text:p>
          </table:table-cell>
          <table:table-cell office:value-type="string">
            <text:p>24</text:p>
          </table:table-cell>
          <table:table-cell office:value-type="string">
            <text:p>6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ak</text:p>
          </table:table-cell>
          <table:table-cell office:value-type="string">
            <text:p>aka2026nqrdao</text:p>
          </table:table-cell>
          <table:table-cell office:value-type="string">
            <text:p>2026-07-12T00:29:12.620Z</text:p>
          </table:table-cell>
          <table:table-cell office:value-type="string">
            <text:p>53 km ESE of Denali Park, Alaska</text:p>
          </table:table-cell>
          <table:table-cell office:value-type="string">
            <text:p>earthquake</text:p>
          </table:table-cell>
          <table:table-cell office:value-type="string">
            <text:p>2.6</text:p>
          </table:table-cell>
          <table:table-cell office:value-type="string">
            <text:p>2.2663</text:p>
          </table:table-cell>
          <table:table-cell office:value-type="string">
            <text:p>0.1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2T00:27:04.600Z</text:p>
          </table:table-cell>
          <table:table-cell office:value-type="string">
            <text:p>19.310667037964</text:p>
          </table:table-cell>
          <table:table-cell office:value-type="string">
            <text:p>-155.21817016602</text:p>
          </table:table-cell>
          <table:table-cell office:value-type="string">
            <text:p>1.0199999809265</text:p>
          </table:table-cell>
          <table:table-cell office:value-type="string">
            <text:p>1.77</text:p>
          </table:table-cell>
          <table:table-cell office:value-type="string">
            <text:p>md</text:p>
          </table:table-cell>
          <table:table-cell office:value-type="string">
            <text:p>32</text:p>
          </table:table-cell>
          <table:table-cell office:value-type="string">
            <text:p>133</text:p>
          </table:table-cell>
          <table:table-cell office:value-type="string">
            <text:p>0.02991</text:p>
          </table:table-cell>
          <table:table-cell office:value-type="string">
            <text:p>0.189999998</text:p>
          </table:table-cell>
          <table:table-cell office:value-type="string">
            <text:p>hv</text:p>
          </table:table-cell>
          <table:table-cell office:value-type="string">
            <text:p>hv75001081</text:p>
          </table:table-cell>
          <table:table-cell office:value-type="string">
            <text:p>2026-07-12T00:31:03.800Z</text:p>
          </table:table-cell>
          <table:table-cell office:value-type="string">
            <text:p>14 km S of Volcano, Hawaii</text:p>
          </table:table-cell>
          <table:table-cell office:value-type="string">
            <text:p>earthquake</text:p>
          </table:table-cell>
          <table:table-cell office:value-type="string">
            <text:p>0.27</text:p>
          </table:table-cell>
          <table:table-cell office:value-type="string">
            <text:p>0.379999995</text:p>
          </table:table-cell>
          <table:table-cell office:value-type="string">
            <text:p>0.13523330913812</text:p>
          </table:table-cell>
          <table:table-cell office:value-type="string">
            <text:p>11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2T00:10:16.379Z</text:p>
          </table:table-cell>
          <table:table-cell office:value-type="string">
            <text:p>60.059</text:p>
          </table:table-cell>
          <table:table-cell office:value-type="string">
            <text:p>-148.047</text:p>
          </table:table-cell>
          <table:table-cell office:value-type="string">
            <text:p>13.1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7</text:p>
          </table:table-cell>
          <table:table-cell office:value-type="string">
            <text:p>174</text:p>
          </table:table-cell>
          <table:table-cell office:value-type="string">
            <text:p>0.3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qqoap</text:p>
          </table:table-cell>
          <table:table-cell office:value-type="string">
            <text:p>2026-07-12T00:11:59.941Z</text:p>
          </table:table-cell>
          <table:table-cell office:value-type="string">
            <text:p>2 km WSW of Chenega, Alaska</text:p>
          </table:table-cell>
          <table:table-cell office:value-type="string">
            <text:p>earthquake</text:p>
          </table:table-cell>
          <table:table-cell office:value-type="string">
            <text:p>7.1</text:p>
          </table:table-cell>
          <table:table-cell office:value-type="string">
            <text:p>4.6308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3:48:02.090Z</text:p>
          </table:table-cell>
          <table:table-cell office:value-type="string">
            <text:p>38.780166625977</text:p>
          </table:table-cell>
          <table:table-cell office:value-type="string">
            <text:p>-122.71583557129</text:p>
          </table:table-cell>
          <table:table-cell office:value-type="string">
            <text:p>1.2799999713898</text:p>
          </table:table-cell>
          <table:table-cell office:value-type="string">
            <text:p>0.96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95</text:p>
          </table:table-cell>
          <table:table-cell office:value-type="string">
            <text:p>0.01661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171</text:p>
          </table:table-cell>
          <table:table-cell office:value-type="string">
            <text:p>2026-07-11T23:49:37.951Z</text:p>
          </table:table-cell>
          <table:table-cell office:value-type="string">
            <text:p>2 km WNW of Anderson Springs, CA</text:p>
          </table:table-cell>
          <table:table-cell office:value-type="string">
            <text:p>earthquake</text:p>
          </table:table-cell>
          <table:table-cell office:value-type="string">
            <text:p>1.07</text:p>
          </table:table-cell>
          <table:table-cell office:value-type="string">
            <text:p>2.52999997</text:p>
          </table:table-cell>
          <table:table-cell office:value-type="string">
            <text:p>0.2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3:37:29.560Z</text:p>
          </table:table-cell>
          <table:table-cell office:value-type="string">
            <text:p>17.939666666667</text:p>
          </table:table-cell>
          <table:table-cell office:value-type="string">
            <text:p>-66.995333333333</text:p>
          </table:table-cell>
          <table:table-cell office:value-type="string">
            <text:p>11.11</text:p>
          </table:table-cell>
          <table:table-cell office:value-type="string">
            <text:p>2.15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227</text:p>
          </table:table-cell>
          <table:table-cell office:value-type="string">
            <text:p>0.05515</text:p>
          </table:table-cell>
          <table:table-cell office:value-type="string">
            <text:p>0.07</text:p>
          </table:table-cell>
          <table:table-cell office:value-type="string">
            <text:p>pr</text:p>
          </table:table-cell>
          <table:table-cell office:value-type="string">
            <text:p>pr71523443</text:p>
          </table:table-cell>
          <table:table-cell office:value-type="string">
            <text:p>2026-07-11T23:47:58.420Z</text:p>
          </table:table-cell>
          <table:table-cell office:value-type="string">
            <text:p>6 km SE of La Parguera, Puerto Rico</text:p>
          </table:table-cell>
          <table:table-cell office:value-type="string">
            <text:p>earthquake</text:p>
          </table:table-cell>
          <table:table-cell office:value-type="string">
            <text:p>0.51</text:p>
          </table:table-cell>
          <table:table-cell office:value-type="string">
            <text:p>0.71</text:p>
          </table:table-cell>
          <table:table-cell office:value-type="string">
            <text:p>0.065293238993039</text:p>
          </table:table-cell>
          <table:table-cell office:value-type="string">
            <text:p>4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1T23:35:45.479Z</text:p>
          </table:table-cell>
          <table:table-cell office:value-type="string">
            <text:p>16.4995</text:p>
          </table:table-cell>
          <table:table-cell office:value-type="string">
            <text:p>84.5232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b</text:p>
          </table:table-cell>
          <table:table-cell office:value-type="string">
            <text:p>27</text:p>
          </table:table-cell>
          <table:table-cell office:value-type="string">
            <text:p>73</text:p>
          </table:table-cell>
          <table:table-cell office:value-type="string">
            <text:p>8.941</text:p>
          </table:table-cell>
          <table:table-cell office:value-type="string">
            <text:p>0.79</text:p>
          </table:table-cell>
          <table:table-cell office:value-type="string">
            <text:p>us</text:p>
          </table:table-cell>
          <table:table-cell office:value-type="string">
            <text:p>us7000szsn</text:p>
          </table:table-cell>
          <table:table-cell office:value-type="string">
            <text:p>2026-07-12T02:52:34.346Z</text:p>
          </table:table-cell>
          <table:table-cell office:value-type="string">
            <text:p>184 km SE of Yārāda, India</text:p>
          </table:table-cell>
          <table:table-cell office:value-type="string">
            <text:p>earthquake</text:p>
          </table:table-cell>
          <table:table-cell office:value-type="string">
            <text:p>11.7</text:p>
          </table:table-cell>
          <table:table-cell office:value-type="string">
            <text:p>1.904</text:p>
          </table:table-cell>
          <table:table-cell office:value-type="string">
            <text:p>0.136</text:p>
          </table:table-cell>
          <table:table-cell office:value-type="string">
            <text:p>16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23:34:24.030Z</text:p>
          </table:table-cell>
          <table:table-cell office:value-type="string">
            <text:p>19.17816734314</text:p>
          </table:table-cell>
          <table:table-cell office:value-type="string">
            <text:p>-155.41133117676</text:p>
          </table:table-cell>
          <table:table-cell office:value-type="string">
            <text:p>29.219999313354</text:p>
          </table:table-cell>
          <table:table-cell office:value-type="string">
            <text:p>1.76</text:p>
          </table:table-cell>
          <table:table-cell office:value-type="string">
            <text:p>md</text:p>
          </table:table-cell>
          <table:table-cell office:value-type="string">
            <text:p>17</text:p>
          </table:table-cell>
          <table:table-cell office:value-type="string">
            <text:p>209</text:p>
          </table:table-cell>
          <table:table-cell office:value-type="string">
            <text:p>0.06045</text:p>
          </table:table-cell>
          <table:table-cell office:value-type="string">
            <text:p>0.150000006</text:p>
          </table:table-cell>
          <table:table-cell office:value-type="string">
            <text:p>hv</text:p>
          </table:table-cell>
          <table:table-cell office:value-type="string">
            <text:p>hv75001036</text:p>
          </table:table-cell>
          <table:table-cell office:value-type="string">
            <text:p>2026-07-11T23:38:28.150Z</text:p>
          </table:table-cell>
          <table:table-cell office:value-type="string">
            <text:p>7 km ESE of Pāhala, Hawaii</text:p>
          </table:table-cell>
          <table:table-cell office:value-type="string">
            <text:p>earthquake</text:p>
          </table:table-cell>
          <table:table-cell office:value-type="string">
            <text:p>1.16</text:p>
          </table:table-cell>
          <table:table-cell office:value-type="string">
            <text:p>0.899999976</text:p>
          </table:table-cell>
          <table:table-cell office:value-type="string">
            <text:p>0.14475607223333</text:p>
          </table:table-cell>
          <table:table-cell office:value-type="string">
            <text:p>13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23:22:17.520Z</text:p>
          </table:table-cell>
          <table:table-cell office:value-type="string">
            <text:p>18.007333333333</text:p>
          </table:table-cell>
          <table:table-cell office:value-type="string">
            <text:p>-66.851666666667</text:p>
          </table:table-cell>
          <table:table-cell office:value-type="string">
            <text:p>18.93</text:p>
          </table:table-cell>
          <table:table-cell office:value-type="string">
            <text:p>1.85</text:p>
          </table:table-cell>
          <table:table-cell office:value-type="string">
            <text:p>md</text:p>
          </table:table-cell>
          <table:table-cell office:value-type="string">
            <text:p>8</text:p>
          </table:table-cell>
          <table:table-cell office:value-type="string">
            <text:p>139</text:p>
          </table:table-cell>
          <table:table-cell office:value-type="string">
            <text:p>0.04148</text:p>
          </table:table-cell>
          <table:table-cell office:value-type="string">
            <text:p>0.15</text:p>
          </table:table-cell>
          <table:table-cell office:value-type="string">
            <text:p>pr</text:p>
          </table:table-cell>
          <table:table-cell office:value-type="string">
            <text:p>pr71523438</text:p>
          </table:table-cell>
          <table:table-cell office:value-type="string">
            <text:p>2026-07-11T23:36:06.080Z</text:p>
          </table:table-cell>
          <table:table-cell office:value-type="string">
            <text:p>2 km ESE of Palomas, Puerto Rico</text:p>
          </table:table-cell>
          <table:table-cell office:value-type="string">
            <text:p>earthquake</text:p>
          </table:table-cell>
          <table:table-cell office:value-type="string">
            <text:p>0.65</text:p>
          </table:table-cell>
          <table:table-cell office:value-type="string">
            <text:p>0.62</text:p>
          </table:table-cell>
          <table:table-cell office:value-type="string">
            <text:p>0.1021164302035</text:p>
          </table:table-cell>
          <table:table-cell office:value-type="string">
            <text:p>5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1T23:04:01.150Z</text:p>
          </table:table-cell>
          <table:table-cell office:value-type="string">
            <text:p>38.823333740234</text:p>
          </table:table-cell>
          <table:table-cell office:value-type="string">
            <text:p>-122.85182952881</text:p>
          </table:table-cell>
          <table:table-cell office:value-type="string">
            <text:p>2.1400001049042</text:p>
          </table:table-cell>
          <table:table-cell office:value-type="string">
            <text:p>0.75</text:p>
          </table:table-cell>
          <table:table-cell office:value-type="string">
            <text:p>md</text:p>
          </table:table-cell>
          <table:table-cell office:value-type="string">
            <text:p>8</text:p>
          </table:table-cell>
          <table:table-cell office:value-type="string">
            <text:p>166</text:p>
          </table:table-cell>
          <table:table-cell office:value-type="string">
            <text:p>0.005762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156</text:p>
          </table:table-cell>
          <table:table-cell office:value-type="string">
            <text:p>2026-07-11T23:05:37.651Z</text:p>
          </table:table-cell>
          <table:table-cell office:value-type="string">
            <text:p>10 km WNW of The Geysers, CA</text:p>
          </table:table-cell>
          <table:table-cell office:value-type="string">
            <text:p>earthquake</text:p>
          </table:table-cell>
          <table:table-cell office:value-type="string">
            <text:p>0.79</text:p>
          </table:table-cell>
          <table:table-cell office:value-type="string">
            <text:p>0.75999999</text:p>
          </table:table-cell>
          <table:table-cell office:value-type="string">
            <text:p>0.24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2:39:24.089Z</text:p>
          </table:table-cell>
          <table:table-cell office:value-type="string">
            <text:p>22.697</text:p>
          </table:table-cell>
          <table:table-cell office:value-type="string">
            <text:p>95.8926</text:p>
          </table:table-cell>
          <table:table-cell office:value-type="string">
            <text:p>10</text:p>
          </table:table-cell>
          <table:table-cell office:value-type="string">
            <text:p>4.2</text:p>
          </table:table-cell>
          <table:table-cell office:value-type="string">
            <text:p>mb</text:p>
          </table:table-cell>
          <table:table-cell office:value-type="string">
            <text:p>16</text:p>
          </table:table-cell>
          <table:table-cell office:value-type="string">
            <text:p>163</text:p>
          </table:table-cell>
          <table:table-cell office:value-type="string">
            <text:p>3.881</text:p>
          </table:table-cell>
          <table:table-cell office:value-type="string">
            <text:p>0.75</text:p>
          </table:table-cell>
          <table:table-cell office:value-type="string">
            <text:p>us</text:p>
          </table:table-cell>
          <table:table-cell office:value-type="string">
            <text:p>us7000szsk</text:p>
          </table:table-cell>
          <table:table-cell office:value-type="string">
            <text:p>2026-07-12T00:37:27.040Z</text:p>
          </table:table-cell>
          <table:table-cell office:value-type="string">
            <text:p>24 km NE of Shwebo, Burma (Myanmar)</text:p>
          </table:table-cell>
          <table:table-cell office:value-type="string">
            <text:p>earthquake</text:p>
          </table:table-cell>
          <table:table-cell office:value-type="string">
            <text:p>12.48</text:p>
          </table:table-cell>
          <table:table-cell office:value-type="string">
            <text:p>1.928</text:p>
          </table:table-cell>
          <table:table-cell office:value-type="string">
            <text:p>0.236</text:p>
          </table:table-cell>
          <table:table-cell office:value-type="string">
            <text:p>5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22:38:02.850Z</text:p>
          </table:table-cell>
          <table:table-cell office:value-type="string">
            <text:p>32.627333333333</text:p>
          </table:table-cell>
          <table:table-cell office:value-type="string">
            <text:p>-115.751</text:p>
          </table:table-cell>
          <table:table-cell office:value-type="string">
            <text:p>4.81</text:p>
          </table:table-cell>
          <table:table-cell office:value-type="string">
            <text:p>2.06</text:p>
          </table:table-cell>
          <table:table-cell office:value-type="string">
            <text:p>ml</text:p>
          </table:table-cell>
          <table:table-cell office:value-type="string">
            <text:p>45</text:p>
          </table:table-cell>
          <table:table-cell office:value-type="string">
            <text:p>47</text:p>
          </table:table-cell>
          <table:table-cell office:value-type="string">
            <text:p>0.03021</text:p>
          </table:table-cell>
          <table:table-cell office:value-type="string">
            <text:p>0.25</text:p>
          </table:table-cell>
          <table:table-cell office:value-type="string">
            <text:p>ci</text:p>
          </table:table-cell>
          <table:table-cell office:value-type="string">
            <text:p>ci41291671</text:p>
          </table:table-cell>
          <table:table-cell office:value-type="string">
            <text:p>2026-07-11T22:48:58.910Z</text:p>
          </table:table-cell>
          <table:table-cell office:value-type="string">
            <text:p>17 km WNW of Progreso, B.C., MX</text:p>
          </table:table-cell>
          <table:table-cell office:value-type="string">
            <text:p>earthquake</text:p>
          </table:table-cell>
          <table:table-cell office:value-type="string">
            <text:p>0.25</text:p>
          </table:table-cell>
          <table:table-cell office:value-type="string">
            <text:p>0.56</text:p>
          </table:table-cell>
          <table:table-cell office:value-type="string">
            <text:p>0.21149280310555</text:p>
          </table:table-cell>
          <table:table-cell office:value-type="string">
            <text:p>2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22:28:48.834Z</text:p>
          </table:table-cell>
          <table:table-cell office:value-type="string">
            <text:p>42.2443</text:p>
          </table:table-cell>
          <table:table-cell office:value-type="string">
            <text:p>-111.5951</text:p>
          </table:table-cell>
          <table:table-cell office:value-type="string">
            <text:p>13.75</text:p>
          </table:table-cell>
          <table:table-cell office:value-type="string">
            <text:p>2.6</text:p>
          </table:table-cell>
          <table:table-cell office:value-type="string">
            <text:p>ml</text:p>
          </table:table-cell>
          <table:table-cell office:value-type="string">
            <text:p>45</text:p>
          </table:table-cell>
          <table:table-cell office:value-type="string">
            <text:p>49</text:p>
          </table:table-cell>
          <table:table-cell office:value-type="string">
            <text:p>0.189</text:p>
          </table:table-cell>
          <table:table-cell office:value-type="string">
            <text:p>1.09</text:p>
          </table:table-cell>
          <table:table-cell office:value-type="string">
            <text:p>us</text:p>
          </table:table-cell>
          <table:table-cell office:value-type="string">
            <text:p>us7000szsg</text:p>
          </table:table-cell>
          <table:table-cell office:value-type="string">
            <text:p>2026-07-12T00:16:35.040Z</text:p>
          </table:table-cell>
          <table:table-cell office:value-type="string">
            <text:p>16 km W of Paris, Idaho</text:p>
          </table:table-cell>
          <table:table-cell office:value-type="string">
            <text:p>earthquake</text:p>
          </table:table-cell>
          <table:table-cell office:value-type="string">
            <text:p>1.45</text:p>
          </table:table-cell>
          <table:table-cell office:value-type="string">
            <text:p>7.77</text:p>
          </table:table-cell>
          <table:table-cell office:value-type="string">
            <text:p>0.038</text:p>
          </table:table-cell>
          <table:table-cell office:value-type="string">
            <text:p>91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22:26:14.444Z</text:p>
          </table:table-cell>
          <table:table-cell office:value-type="string">
            <text:p>61.776</text:p>
          </table:table-cell>
          <table:table-cell office:value-type="string">
            <text:p>-148.671</text:p>
          </table:table-cell>
          <table:table-cell office:value-type="string">
            <text:p>5.8</text:p>
          </table:table-cell>
          <table:table-cell office:value-type="string">
            <text:p>1.9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102</text:p>
          </table:table-cell>
          <table:table-cell office:value-type="string">
            <text:p>0.1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qnbuu</text:p>
          </table:table-cell>
          <table:table-cell office:value-type="string">
            <text:p>2026-07-11T22:27:24.519Z</text:p>
          </table:table-cell>
          <table:table-cell office:value-type="string">
            <text:p>4 km E of Sutton-Alpine, Alaska</text:p>
          </table:table-cell>
          <table:table-cell office:value-type="string">
            <text:p>earthquake</text:p>
          </table:table-cell>
          <table:table-cell office:value-type="string">
            <text:p>4</text:p>
          </table:table-cell>
          <table:table-cell office:value-type="string">
            <text:p>3.3119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2:13:42.896Z</text:p>
          </table:table-cell>
          <table:table-cell office:value-type="string">
            <text:p>32.655</text:p>
          </table:table-cell>
          <table:table-cell office:value-type="string">
            <text:p>-39.8835</text:p>
          </table:table-cell>
          <table:table-cell office:value-type="string">
            <text:p>10</text:p>
          </table:table-cell>
          <table:table-cell office:value-type="string">
            <text:p>4.7</text:p>
          </table:table-cell>
          <table:table-cell office:value-type="string">
            <text:p>mb</text:p>
          </table:table-cell>
          <table:table-cell office:value-type="string">
            <text:p>71</text:p>
          </table:table-cell>
          <table:table-cell office:value-type="string">
            <text:p>89</text:p>
          </table:table-cell>
          <table:table-cell office:value-type="string">
            <text:p>12.797</text:p>
          </table:table-cell>
          <table:table-cell office:value-type="string">
            <text:p>0.87</text:p>
          </table:table-cell>
          <table:table-cell office:value-type="string">
            <text:p>us</text:p>
          </table:table-cell>
          <table:table-cell office:value-type="string">
            <text:p>us7000szse</text:p>
          </table:table-cell>
          <table:table-cell office:value-type="string">
            <text:p>2026-07-12T00:00:50.040Z</text:p>
          </table:table-cell>
          <table:table-cell office:value-type="string">
            <text:p>northern Mid-Atlantic Ridge</text:p>
          </table:table-cell>
          <table:table-cell office:value-type="string">
            <text:p>earthquake</text:p>
          </table:table-cell>
          <table:table-cell office:value-type="string">
            <text:p>11.39</text:p>
          </table:table-cell>
          <table:table-cell office:value-type="string">
            <text:p>1.876</text:p>
          </table:table-cell>
          <table:table-cell office:value-type="string">
            <text:p>0.048</text:p>
          </table:table-cell>
          <table:table-cell office:value-type="string">
            <text:p>129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22:10:30.800Z</text:p>
          </table:table-cell>
          <table:table-cell office:value-type="string">
            <text:p>17.961</text:p>
          </table:table-cell>
          <table:table-cell office:value-type="string">
            <text:p>-66.839166666667</text:p>
          </table:table-cell>
          <table:table-cell office:value-type="string">
            <text:p>15.46</text:p>
          </table:table-cell>
          <table:table-cell office:value-type="string">
            <text:p>2.47</text:p>
          </table:table-cell>
          <table:table-cell office:value-type="string">
            <text:p>md</text:p>
          </table:table-cell>
          <table:table-cell office:value-type="string">
            <text:p>14</text:p>
          </table:table-cell>
          <table:table-cell office:value-type="string">
            <text:p>188</text:p>
          </table:table-cell>
          <table:table-cell office:value-type="string">
            <text:p>0.04064</text:p>
          </table:table-cell>
          <table:table-cell office:value-type="string">
            <text:p>0.07</text:p>
          </table:table-cell>
          <table:table-cell office:value-type="string">
            <text:p>pr</text:p>
          </table:table-cell>
          <table:table-cell office:value-type="string">
            <text:p>pr71523423</text:p>
          </table:table-cell>
          <table:table-cell office:value-type="string">
            <text:p>2026-07-11T22:34:55.660Z</text:p>
          </table:table-cell>
          <table:table-cell office:value-type="string">
            <text:p>4 km SSW of Indios, Puerto Rico</text:p>
          </table:table-cell>
          <table:table-cell office:value-type="string">
            <text:p>earthquake</text:p>
          </table:table-cell>
          <table:table-cell office:value-type="string">
            <text:p>0.38</text:p>
          </table:table-cell>
          <table:table-cell office:value-type="string">
            <text:p>0.28</text:p>
          </table:table-cell>
          <table:table-cell office:value-type="string">
            <text:p>0.012256270637145</text:p>
          </table:table-cell>
          <table:table-cell office:value-type="string">
            <text:p>5</text:p>
          </table:table-cell>
          <table:table-cell office:value-type="string">
            <text:p>reviewed</text:p>
          </table:table-cell>
          <table:table-cell office:value-type="string">
            <text:p>pr</text:p>
          </table:table-cell>
          <table:table-cell office:value-type="string">
            <text:p>pr</text:p>
          </table:table-cell>
        </table:table-row>
        <table:table-row>
          <table:table-cell office:value-type="string">
            <text:p>2026-07-11T22:09:41.328Z</text:p>
          </table:table-cell>
          <table:table-cell office:value-type="string">
            <text:p>58.207</text:p>
          </table:table-cell>
          <table:table-cell office:value-type="string">
            <text:p>-155.23</text:p>
          </table:table-cell>
          <table:table-cell office:value-type="string">
            <text:p>13.2</text:p>
          </table:table-cell>
          <table:table-cell office:value-type="string">
            <text:p>0.5</text:p>
          </table:table-cell>
          <table:table-cell office:value-type="string">
            <text:p>ml</text:p>
          </table:table-cell>
          <table:table-cell office:value-type="string">
            <text:p>7</text:p>
          </table:table-cell>
          <table:table-cell office:value-type="string">
            <text:p>113</text:p>
          </table:table-cell>
          <table:table-cell office:value-type="string">
            <text:p>0.1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qmnme</text:p>
          </table:table-cell>
          <table:table-cell office:value-type="string">
            <text:p>2026-07-11T22:10:59.175Z</text:p>
          </table:table-cell>
          <table:table-cell office:value-type="string">
            <text:p>84 km NNW of Karluk, Alaska</text:p>
          </table:table-cell>
          <table:table-cell office:value-type="string">
            <text:p>earthquake</text:p>
          </table:table-cell>
          <table:table-cell office:value-type="string">
            <text:p>15.5</text:p>
          </table:table-cell>
          <table:table-cell office:value-type="string">
            <text:p>4.6766</text:p>
          </table:table-cell>
          <table:table-cell office:value-type="string">
            <text:p>0.3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1:53:08.700Z</text:p>
          </table:table-cell>
          <table:table-cell office:value-type="string">
            <text:p>38.842166900635</text:p>
          </table:table-cell>
          <table:table-cell office:value-type="string">
            <text:p>-122.83999633789</text:p>
          </table:table-cell>
          <table:table-cell office:value-type="string">
            <text:p>2.1500000953674</text:p>
          </table:table-cell>
          <table:table-cell office:value-type="string">
            <text:p>0.77</text:p>
          </table:table-cell>
          <table:table-cell office:value-type="string">
            <text:p>md</text:p>
          </table:table-cell>
          <table:table-cell office:value-type="string">
            <text:p>17</text:p>
          </table:table-cell>
          <table:table-cell office:value-type="string">
            <text:p>90</text:p>
          </table:table-cell>
          <table:table-cell office:value-type="string">
            <text:p>0.005017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141</text:p>
          </table:table-cell>
          <table:table-cell office:value-type="string">
            <text:p>2026-07-11T21:54:43.270Z</text:p>
          </table:table-cell>
          <table:table-cell office:value-type="string">
            <text:p>10 km NW of The Geysers, CA</text:p>
          </table:table-cell>
          <table:table-cell office:value-type="string">
            <text:p>earthquake</text:p>
          </table:table-cell>
          <table:table-cell office:value-type="string">
            <text:p>0.29</text:p>
          </table:table-cell>
          <table:table-cell office:value-type="string">
            <text:p>0.439999998</text:p>
          </table:table-cell>
          <table:table-cell office:value-type="string">
            <text:p>0.15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1:40:19.523Z</text:p>
          </table:table-cell>
          <table:table-cell office:value-type="string">
            <text:p>58.632</text:p>
          </table:table-cell>
          <table:table-cell office:value-type="string">
            <text:p>-154.368</text:p>
          </table:table-cell>
          <table:table-cell office:value-type="string">
            <text:p>12.7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k</text:p>
          </table:table-cell>
          <table:table-cell office:value-type="string">
            <text:p>aka2026nqloaf</text:p>
          </table:table-cell>
          <table:table-cell office:value-type="string">
            <text:p>2026-07-11T21:41:31.063Z</text:p>
          </table:table-cell>
          <table:table-cell office:value-type="string">
            <text:p>92 km SSE of Kokhanok, Alaska</text:p>
          </table:table-cell>
          <table:table-cell office:value-type="string">
            <text:p>earthquake</text:p>
          </table:table-cell>
          <table:table-cell office:value-type="string">
            <text:p>7.3</text:p>
          </table:table-cell>
          <table:table-cell office:value-type="string">
            <text:p>3.5661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1:38:11.591Z</text:p>
          </table:table-cell>
          <table:table-cell office:value-type="string">
            <text:p>58.632</text:p>
          </table:table-cell>
          <table:table-cell office:value-type="string">
            <text:p>-154.369</text:p>
          </table:table-cell>
          <table:table-cell office:value-type="string">
            <text:p>15.3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19</text:p>
          </table:table-cell>
          <table:table-cell office:value-type="string">
            <text:p>71</text:p>
          </table:table-cell>
          <table:table-cell office:value-type="string">
            <text:p>0</text:p>
          </table:table-cell>
          <table:table-cell office:value-type="string">
            <text:p>0.4</text:p>
          </table:table-cell>
          <table:table-cell office:value-type="string">
            <text:p>ak</text:p>
          </table:table-cell>
          <table:table-cell office:value-type="string">
            <text:p>aka2026nqlmeh</text:p>
          </table:table-cell>
          <table:table-cell office:value-type="string">
            <text:p>2026-07-11T21:39:21.082Z</text:p>
          </table:table-cell>
          <table:table-cell office:value-type="string">
            <text:p>92 km SSE of Kokhanok, Alaska</text:p>
          </table:table-cell>
          <table:table-cell office:value-type="string">
            <text:p>earthquake</text:p>
          </table:table-cell>
          <table:table-cell office:value-type="string">
            <text:p>9.5</text:p>
          </table:table-cell>
          <table:table-cell office:value-type="string">
            <text:p>3.4128</text:p>
          </table:table-cell>
          <table:table-cell office:value-type="string">
            <text:p>0.1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1:34:27.476Z</text:p>
          </table:table-cell>
          <table:table-cell office:value-type="string">
            <text:p>38.6307</text:p>
          </table:table-cell>
          <table:table-cell office:value-type="string">
            <text:p>-117.1854</text:p>
          </table:table-cell>
          <table:table-cell office:value-type="string">
            <text:p>6.5137</text:p>
          </table:table-cell>
          <table:table-cell office:value-type="string">
            <text:p>1.55</text:p>
          </table:table-cell>
          <table:table-cell office:value-type="string">
            <text:p>ml</text:p>
          </table:table-cell>
          <table:table-cell office:value-type="string">
            <text:p>9</text:p>
          </table:table-cell>
          <table:table-cell office:value-type="string">
            <text:p>187</text:p>
          </table:table-cell>
          <table:table-cell office:value-type="string">
            <text:p>0.5</text:p>
          </table:table-cell>
          <table:table-cell office:value-type="string">
            <text:p>0.265</text:p>
          </table:table-cell>
          <table:table-cell office:value-type="string">
            <text:p>nn</text:p>
          </table:table-cell>
          <table:table-cell office:value-type="string">
            <text:p>nn00921492</text:p>
          </table:table-cell>
          <table:table-cell office:value-type="string">
            <text:p>2026-07-11T21:37:05.638Z</text:p>
          </table:table-cell>
          <table:table-cell office:value-type="string">
            <text:p>62 km N of Tonopah, Nevada</text:p>
          </table:table-cell>
          <table:table-cell office:value-type="string">
            <text:p>earthquake</text:p>
          </table:table-cell>
          <table:table-cell office:value-type="string">
            <text:p/>
          </table:table-cell>
          <table:table-cell office:value-type="string">
            <text:p>1.187</text:p>
          </table:table-cell>
          <table:table-cell office:value-type="string">
            <text:p>0.8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nn</text:p>
          </table:table-cell>
          <table:table-cell office:value-type="string">
            <text:p>nn</text:p>
          </table:table-cell>
        </table:table-row>
        <table:table-row>
          <table:table-cell office:value-type="string">
            <text:p>2026-07-11T21:33:56.200Z</text:p>
          </table:table-cell>
          <table:table-cell office:value-type="string">
            <text:p>34.336666666667</text:p>
          </table:table-cell>
          <table:table-cell office:value-type="string">
            <text:p>-116.45183333333</text:p>
          </table:table-cell>
          <table:table-cell office:value-type="string">
            <text:p>10.61</text:p>
          </table:table-cell>
          <table:table-cell office:value-type="string">
            <text:p>0.99</text:p>
          </table:table-cell>
          <table:table-cell office:value-type="string">
            <text:p>ml</text:p>
          </table:table-cell>
          <table:table-cell office:value-type="string">
            <text:p>27</text:p>
          </table:table-cell>
          <table:table-cell office:value-type="string">
            <text:p>72</text:p>
          </table:table-cell>
          <table:table-cell office:value-type="string">
            <text:p>0.07293</text:p>
          </table:table-cell>
          <table:table-cell office:value-type="string">
            <text:p>0.14</text:p>
          </table:table-cell>
          <table:table-cell office:value-type="string">
            <text:p>ci</text:p>
          </table:table-cell>
          <table:table-cell office:value-type="string">
            <text:p>ci41291647</text:p>
          </table:table-cell>
          <table:table-cell office:value-type="string">
            <text:p>2026-07-11T21:37:18.726Z</text:p>
          </table:table-cell>
          <table:table-cell office:value-type="string">
            <text:p>25 km N of Yucca Valley, CA</text:p>
          </table:table-cell>
          <table:table-cell office:value-type="string">
            <text:p>earthquake</text:p>
          </table:table-cell>
          <table:table-cell office:value-type="string">
            <text:p>0.2</text:p>
          </table:table-cell>
          <table:table-cell office:value-type="string">
            <text:p>0.37</text:p>
          </table:table-cell>
          <table:table-cell office:value-type="string">
            <text:p>0.07550433716103</text:p>
          </table:table-cell>
          <table:table-cell office:value-type="string">
            <text:p>1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21:29:37.477Z</text:p>
          </table:table-cell>
          <table:table-cell office:value-type="string">
            <text:p>31.699</text:p>
          </table:table-cell>
          <table:table-cell office:value-type="string">
            <text:p>-104.147</text:p>
          </table:table-cell>
          <table:table-cell office:value-type="string">
            <text:p>4.6216</text:p>
          </table:table-cell>
          <table:table-cell office:value-type="string">
            <text:p>1.9</text:p>
          </table:table-cell>
          <table:table-cell office:value-type="string">
            <text:p>ml</text:p>
          </table:table-cell>
          <table:table-cell office:value-type="string">
            <text:p>39</text:p>
          </table:table-cell>
          <table:table-cell office:value-type="string">
            <text:p>56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oglcj</text:p>
          </table:table-cell>
          <table:table-cell office:value-type="string">
            <text:p>2026-07-11T21:32:59.611Z</text:p>
          </table:table-cell>
          <table:table-cell office:value-type="string">
            <text:p>51 km W of Mentone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0.85971534252167</text:p>
          </table:table-cell>
          <table:table-cell office:value-type="string">
            <text:p>0.2</text:p>
          </table:table-cell>
          <table:table-cell office:value-type="string">
            <text:p>28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21:28:52.930Z</text:p>
          </table:table-cell>
          <table:table-cell office:value-type="string">
            <text:p>38.826000213623</text:p>
          </table:table-cell>
          <table:table-cell office:value-type="string">
            <text:p>-122.81600189209</text:p>
          </table:table-cell>
          <table:table-cell office:value-type="string">
            <text:p>1.5599999427795</text:p>
          </table:table-cell>
          <table:table-cell office:value-type="string">
            <text:p>0.24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90</text:p>
          </table:table-cell>
          <table:table-cell office:value-type="string">
            <text:p>0.005311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131</text:p>
          </table:table-cell>
          <table:table-cell office:value-type="string">
            <text:p>2026-07-11T21:30:27.874Z</text:p>
          </table:table-cell>
          <table:table-cell office:value-type="string">
            <text:p>7 km NW of The Geysers, CA</text:p>
          </table:table-cell>
          <table:table-cell office:value-type="string">
            <text:p>earthquake</text:p>
          </table:table-cell>
          <table:table-cell office:value-type="string">
            <text:p>0.44</text:p>
          </table:table-cell>
          <table:table-cell office:value-type="string">
            <text:p>1.29999995</text:p>
          </table:table-cell>
          <table:table-cell office:value-type="string">
            <text:p>0.14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1:28:11.950Z</text:p>
          </table:table-cell>
          <table:table-cell office:value-type="string">
            <text:p>38.825668334961</text:p>
          </table:table-cell>
          <table:table-cell office:value-type="string">
            <text:p>-122.81300354004</text:p>
          </table:table-cell>
          <table:table-cell office:value-type="string">
            <text:p>1.8799999952316</text:p>
          </table:table-cell>
          <table:table-cell office:value-type="string">
            <text:p>2.13</text:p>
          </table:table-cell>
          <table:table-cell office:value-type="string">
            <text:p>md</text:p>
          </table:table-cell>
          <table:table-cell office:value-type="string">
            <text:p>50</text:p>
          </table:table-cell>
          <table:table-cell office:value-type="string">
            <text:p>37</text:p>
          </table:table-cell>
          <table:table-cell office:value-type="string">
            <text:p>0.003223</text:p>
          </table:table-cell>
          <table:table-cell office:value-type="string">
            <text:p>0.08</text:p>
          </table:table-cell>
          <table:table-cell office:value-type="string">
            <text:p>nc</text:p>
          </table:table-cell>
          <table:table-cell office:value-type="string">
            <text:p>nc75394126</text:p>
          </table:table-cell>
          <table:table-cell office:value-type="string">
            <text:p>2026-07-11T21:52:20.003Z</text:p>
          </table:table-cell>
          <table:table-cell office:value-type="string">
            <text:p>7 km NW of The Geysers, CA</text:p>
          </table:table-cell>
          <table:table-cell office:value-type="string">
            <text:p>earthquake</text:p>
          </table:table-cell>
          <table:table-cell office:value-type="string">
            <text:p>0.15</text:p>
          </table:table-cell>
          <table:table-cell office:value-type="string">
            <text:p>0.239999995</text:p>
          </table:table-cell>
          <table:table-cell office:value-type="string">
            <text:p>0.16</text:p>
          </table:table-cell>
          <table:table-cell office:value-type="string">
            <text:p>51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1:25:43.029Z</text:p>
          </table:table-cell>
          <table:table-cell office:value-type="string">
            <text:p>60.376</text:p>
          </table:table-cell>
          <table:table-cell office:value-type="string">
            <text:p>-152.94</text:p>
          </table:table-cell>
          <table:table-cell office:value-type="string">
            <text:p>143.3</text:p>
          </table:table-cell>
          <table:table-cell office:value-type="string">
            <text:p>3.3</text:p>
          </table:table-cell>
          <table:table-cell office:value-type="string">
            <text:p>ml</text:p>
          </table:table-cell>
          <table:table-cell office:value-type="string">
            <text:p>182</text:p>
          </table:table-cell>
          <table:table-cell office:value-type="string">
            <text:p>33</text:p>
          </table:table-cell>
          <table:table-cell office:value-type="string">
            <text:p>0.1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qlbis</text:p>
          </table:table-cell>
          <table:table-cell office:value-type="string">
            <text:p>2026-07-12T00:39:20.734Z</text:p>
          </table:table-cell>
          <table:table-cell office:value-type="string">
            <text:p>78 km ENE of Port Alsworth, Alaska</text:p>
          </table:table-cell>
          <table:table-cell office:value-type="string">
            <text:p>earthquake</text:p>
          </table:table-cell>
          <table:table-cell office:value-type="string">
            <text:p>2.3</text:p>
          </table:table-cell>
          <table:table-cell office:value-type="string">
            <text:p>1.2133</text:p>
          </table:table-cell>
          <table:table-cell office:value-type="string">
            <text:p>0.3</text:p>
          </table:table-cell>
          <table:table-cell office:value-type="string">
            <text:p>126</text:p>
          </table:table-cell>
          <table:table-cell office:value-type="string">
            <text:p>reviewed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1:24:50.527Z</text:p>
          </table:table-cell>
          <table:table-cell office:value-type="string">
            <text:p>56.832</text:p>
          </table:table-cell>
          <table:table-cell office:value-type="string">
            <text:p>-155.642</text:p>
          </table:table-cell>
          <table:table-cell office:value-type="string">
            <text:p>0.2</text:p>
          </table:table-cell>
          <table:table-cell office:value-type="string">
            <text:p>2.3</text:p>
          </table:table-cell>
          <table:table-cell office:value-type="string">
            <text:p>ml</text:p>
          </table:table-cell>
          <table:table-cell office:value-type="string">
            <text:p>35</text:p>
          </table:table-cell>
          <table:table-cell office:value-type="string">
            <text:p>121</text:p>
          </table:table-cell>
          <table:table-cell office:value-type="string">
            <text:p>0.9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qlaoj</text:p>
          </table:table-cell>
          <table:table-cell office:value-type="string">
            <text:p>2026-07-11T21:41:38.040Z</text:p>
          </table:table-cell>
          <table:table-cell office:value-type="string">
            <text:p>90 km W of Akhiok, Alaska</text:p>
          </table:table-cell>
          <table:table-cell office:value-type="string">
            <text:p>earthquake</text:p>
          </table:table-cell>
          <table:table-cell office:value-type="string">
            <text:p>3.8</text:p>
          </table:table-cell>
          <table:table-cell office:value-type="string">
            <text:p>2.2103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1:20:49.200Z</text:p>
          </table:table-cell>
          <table:table-cell office:value-type="string">
            <text:p>38.79666519165</text:p>
          </table:table-cell>
          <table:table-cell office:value-type="string">
            <text:p>-122.81566619873</text:p>
          </table:table-cell>
          <table:table-cell office:value-type="string">
            <text:p>3.25</text:p>
          </table:table-cell>
          <table:table-cell office:value-type="string">
            <text:p>0.78</text:p>
          </table:table-cell>
          <table:table-cell office:value-type="string">
            <text:p>md</text:p>
          </table:table-cell>
          <table:table-cell office:value-type="string">
            <text:p>12</text:p>
          </table:table-cell>
          <table:table-cell office:value-type="string">
            <text:p>93</text:p>
          </table:table-cell>
          <table:table-cell office:value-type="string">
            <text:p>0.01289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121</text:p>
          </table:table-cell>
          <table:table-cell office:value-type="string">
            <text:p>2026-07-11T21:22:23.119Z</text:p>
          </table:table-cell>
          <table:table-cell office:value-type="string">
            <text:p>6 km WNW of The Geysers, CA</text:p>
          </table:table-cell>
          <table:table-cell office:value-type="string">
            <text:p>earthquake</text:p>
          </table:table-cell>
          <table:table-cell office:value-type="string">
            <text:p>0.38</text:p>
          </table:table-cell>
          <table:table-cell office:value-type="string">
            <text:p>0.620000005</text:p>
          </table:table-cell>
          <table:table-cell office:value-type="string">
            <text:p>0.05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1:19:25.410Z</text:p>
          </table:table-cell>
          <table:table-cell office:value-type="string">
            <text:p>19.307666778564</text:p>
          </table:table-cell>
          <table:table-cell office:value-type="string">
            <text:p>-155.21549987793</text:p>
          </table:table-cell>
          <table:table-cell office:value-type="string">
            <text:p>0.99000000953674</text:p>
          </table:table-cell>
          <table:table-cell office:value-type="string">
            <text:p>1.73</text:p>
          </table:table-cell>
          <table:table-cell office:value-type="string">
            <text:p>md</text:p>
          </table:table-cell>
          <table:table-cell office:value-type="string">
            <text:p>35</text:p>
          </table:table-cell>
          <table:table-cell office:value-type="string">
            <text:p>180</text:p>
          </table:table-cell>
          <table:table-cell office:value-type="string">
            <text:p>0.02768</text:p>
          </table:table-cell>
          <table:table-cell office:value-type="string">
            <text:p>0.200000003</text:p>
          </table:table-cell>
          <table:table-cell office:value-type="string">
            <text:p>hv</text:p>
          </table:table-cell>
          <table:table-cell office:value-type="string">
            <text:p>hv75000981</text:p>
          </table:table-cell>
          <table:table-cell office:value-type="string">
            <text:p>2026-07-11T21:23:30.770Z</text:p>
          </table:table-cell>
          <table:table-cell office:value-type="string">
            <text:p>15 km S of Volcano, Hawaii</text:p>
          </table:table-cell>
          <table:table-cell office:value-type="string">
            <text:p>earthquake</text:p>
          </table:table-cell>
          <table:table-cell office:value-type="string">
            <text:p>0.31</text:p>
          </table:table-cell>
          <table:table-cell office:value-type="string">
            <text:p>0.379999995</text:p>
          </table:table-cell>
          <table:table-cell office:value-type="string">
            <text:p>0.12751632856661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21:15:10.110Z</text:p>
          </table:table-cell>
          <table:table-cell office:value-type="string">
            <text:p>38.798000335693</text:p>
          </table:table-cell>
          <table:table-cell office:value-type="string">
            <text:p>-122.81600189209</text:p>
          </table:table-cell>
          <table:table-cell office:value-type="string">
            <text:p>3.3800001144409</text:p>
          </table:table-cell>
          <table:table-cell office:value-type="string">
            <text:p>0.75</text:p>
          </table:table-cell>
          <table:table-cell office:value-type="string">
            <text:p>md</text:p>
          </table:table-cell>
          <table:table-cell office:value-type="string">
            <text:p>14</text:p>
          </table:table-cell>
          <table:table-cell office:value-type="string">
            <text:p>96</text:p>
          </table:table-cell>
          <table:table-cell office:value-type="string">
            <text:p>0.01398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116</text:p>
          </table:table-cell>
          <table:table-cell office:value-type="string">
            <text:p>2026-07-11T21:16:47.909Z</text:p>
          </table:table-cell>
          <table:table-cell office:value-type="string">
            <text:p>6 km WNW of The Geysers, CA</text:p>
          </table:table-cell>
          <table:table-cell office:value-type="string">
            <text:p>earthquake</text:p>
          </table:table-cell>
          <table:table-cell office:value-type="string">
            <text:p>0.37</text:p>
          </table:table-cell>
          <table:table-cell office:value-type="string">
            <text:p>0.790000021</text:p>
          </table:table-cell>
          <table:table-cell office:value-type="string">
            <text:p>0.34</text:p>
          </table:table-cell>
          <table:table-cell office:value-type="string">
            <text:p>1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1:10:58.170Z</text:p>
          </table:table-cell>
          <table:table-cell office:value-type="string">
            <text:p>38.797164916992</text:p>
          </table:table-cell>
          <table:table-cell office:value-type="string">
            <text:p>-122.81566619873</text:p>
          </table:table-cell>
          <table:table-cell office:value-type="string">
            <text:p>3.8699998855591</text:p>
          </table:table-cell>
          <table:table-cell office:value-type="string">
            <text:p>0.29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90</text:p>
          </table:table-cell>
          <table:table-cell office:value-type="string">
            <text:p>0.01322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111</text:p>
          </table:table-cell>
          <table:table-cell office:value-type="string">
            <text:p>2026-07-11T21:12:32.874Z</text:p>
          </table:table-cell>
          <table:table-cell office:value-type="string">
            <text:p>6 km WNW of The Geysers, CA</text:p>
          </table:table-cell>
          <table:table-cell office:value-type="string">
            <text:p>earthquake</text:p>
          </table:table-cell>
          <table:table-cell office:value-type="string">
            <text:p>0.55</text:p>
          </table:table-cell>
          <table:table-cell office:value-type="string">
            <text:p>1.69000006</text:p>
          </table:table-cell>
          <table:table-cell office:value-type="string">
            <text:p>0.11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0:45:02.900Z</text:p>
          </table:table-cell>
          <table:table-cell office:value-type="string">
            <text:p>19.317167282104</text:p>
          </table:table-cell>
          <table:table-cell office:value-type="string">
            <text:p>-155.92582702637</text:p>
          </table:table-cell>
          <table:table-cell office:value-type="string">
            <text:p>14.810000419617</text:p>
          </table:table-cell>
          <table:table-cell office:value-type="string">
            <text:p>2.7</text:p>
          </table:table-cell>
          <table:table-cell office:value-type="string">
            <text:p>ml</text:p>
          </table:table-cell>
          <table:table-cell office:value-type="string">
            <text:p>41</text:p>
          </table:table-cell>
          <table:table-cell office:value-type="string">
            <text:p>230</text:p>
          </table:table-cell>
          <table:table-cell office:value-type="string">
            <text:p>0.07572</text:p>
          </table:table-cell>
          <table:table-cell office:value-type="string">
            <text:p>0.360000014</text:p>
          </table:table-cell>
          <table:table-cell office:value-type="string">
            <text:p>hv</text:p>
          </table:table-cell>
          <table:table-cell office:value-type="string">
            <text:p>hv75000976</text:p>
          </table:table-cell>
          <table:table-cell office:value-type="string">
            <text:p>2026-07-11T22:29:23.805Z</text:p>
          </table:table-cell>
          <table:table-cell office:value-type="string">
            <text:p>16 km SSW of Honaunau-Napoopoo, Hawaii</text:p>
          </table:table-cell>
          <table:table-cell office:value-type="string">
            <text:p>earthquake</text:p>
          </table:table-cell>
          <table:table-cell office:value-type="string">
            <text:p>1.21</text:p>
          </table:table-cell>
          <table:table-cell office:value-type="string">
            <text:p>2.3900001</text:p>
          </table:table-cell>
          <table:table-cell office:value-type="string">
            <text:p>0.34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20:34:41.698Z</text:p>
          </table:table-cell>
          <table:table-cell office:value-type="string">
            <text:p>59.084</text:p>
          </table:table-cell>
          <table:table-cell office:value-type="string">
            <text:p>-152.266</text:p>
          </table:table-cell>
          <table:table-cell office:value-type="string">
            <text:p>77.8</text:p>
          </table:table-cell>
          <table:table-cell office:value-type="string">
            <text:p>2</text:p>
          </table:table-cell>
          <table:table-cell office:value-type="string">
            <text:p>ml</text:p>
          </table:table-cell>
          <table:table-cell office:value-type="string">
            <text:p>13</text:p>
          </table:table-cell>
          <table:table-cell office:value-type="string">
            <text:p>138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ak</text:p>
          </table:table-cell>
          <table:table-cell office:value-type="string">
            <text:p>aka2026nqjjcu</text:p>
          </table:table-cell>
          <table:table-cell office:value-type="string">
            <text:p>2026-07-11T20:36:08.969Z</text:p>
          </table:table-cell>
          <table:table-cell office:value-type="string">
            <text:p>36 km SSW of Nanwalek, Alaska</text:p>
          </table:table-cell>
          <table:table-cell office:value-type="string">
            <text:p>earthquake</text:p>
          </table:table-cell>
          <table:table-cell office:value-type="string">
            <text:p>8</text:p>
          </table:table-cell>
          <table:table-cell office:value-type="string">
            <text:p>7.6557</text:p>
          </table:table-cell>
          <table:table-cell office:value-type="string">
            <text:p>0.4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20:33:31.190Z</text:p>
          </table:table-cell>
          <table:table-cell office:value-type="string">
            <text:p>35.308166666667</text:p>
          </table:table-cell>
          <table:table-cell office:value-type="string">
            <text:p>-117.80683333333</text:p>
          </table:table-cell>
          <table:table-cell office:value-type="string">
            <text:p>7.6</text:p>
          </table:table-cell>
          <table:table-cell office:value-type="string">
            <text:p>1.16</text:p>
          </table:table-cell>
          <table:table-cell office:value-type="string">
            <text:p>ml</text:p>
          </table:table-cell>
          <table:table-cell office:value-type="string">
            <text:p>39</text:p>
          </table:table-cell>
          <table:table-cell office:value-type="string">
            <text:p>58</text:p>
          </table:table-cell>
          <table:table-cell office:value-type="string">
            <text:p>0.05167</text:p>
          </table:table-cell>
          <table:table-cell office:value-type="string">
            <text:p>0.17</text:p>
          </table:table-cell>
          <table:table-cell office:value-type="string">
            <text:p>ci</text:p>
          </table:table-cell>
          <table:table-cell office:value-type="string">
            <text:p>ci41291631</text:p>
          </table:table-cell>
          <table:table-cell office:value-type="string">
            <text:p>2026-07-11T20:37:00.623Z</text:p>
          </table:table-cell>
          <table:table-cell office:value-type="string">
            <text:p>17 km WSW of Johannesburg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5</text:p>
          </table:table-cell>
          <table:table-cell office:value-type="string">
            <text:p>0.1773331264824</text:p>
          </table:table-cell>
          <table:table-cell office:value-type="string">
            <text:p>21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20:24:00.200Z</text:p>
          </table:table-cell>
          <table:table-cell office:value-type="string">
            <text:p>38.829833984375</text:p>
          </table:table-cell>
          <table:table-cell office:value-type="string">
            <text:p>-122.79816436768</text:p>
          </table:table-cell>
          <table:table-cell office:value-type="string">
            <text:p>1.6900000572205</text:p>
          </table:table-cell>
          <table:table-cell office:value-type="string">
            <text:p>0.7</text:p>
          </table:table-cell>
          <table:table-cell office:value-type="string">
            <text:p>md</text:p>
          </table:table-cell>
          <table:table-cell office:value-type="string">
            <text:p>11</text:p>
          </table:table-cell>
          <table:table-cell office:value-type="string">
            <text:p>79</text:p>
          </table:table-cell>
          <table:table-cell office:value-type="string">
            <text:p>0.01052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091</text:p>
          </table:table-cell>
          <table:table-cell office:value-type="string">
            <text:p>2026-07-11T20:25:37.746Z</text:p>
          </table:table-cell>
          <table:table-cell office:value-type="string">
            <text:p>7 km W of Cobb, CA</text:p>
          </table:table-cell>
          <table:table-cell office:value-type="string">
            <text:p>earthquake</text:p>
          </table:table-cell>
          <table:table-cell office:value-type="string">
            <text:p>0.35</text:p>
          </table:table-cell>
          <table:table-cell office:value-type="string">
            <text:p>0.819999993</text:p>
          </table:table-cell>
          <table:table-cell office:value-type="string">
            <text:p>0.17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0:19:58.710Z</text:p>
          </table:table-cell>
          <table:table-cell office:value-type="string">
            <text:p>31.527</text:p>
          </table:table-cell>
          <table:table-cell office:value-type="string">
            <text:p>-104.154</text:p>
          </table:table-cell>
          <table:table-cell office:value-type="string">
            <text:p>4.0935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31</text:p>
          </table:table-cell>
          <table:table-cell office:value-type="string">
            <text:p>72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oedgd</text:p>
          </table:table-cell>
          <table:table-cell office:value-type="string">
            <text:p>2026-07-11T21:00:40.357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648462772369</text:p>
          </table:table-cell>
          <table:table-cell office:value-type="string">
            <text:p>0.2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20:19:53.380Z</text:p>
          </table:table-cell>
          <table:table-cell office:value-type="string">
            <text:p>38.828834533691</text:p>
          </table:table-cell>
          <table:table-cell office:value-type="string">
            <text:p>-122.79866790772</text:p>
          </table:table-cell>
          <table:table-cell office:value-type="string">
            <text:p>1.6499999761581</text:p>
          </table:table-cell>
          <table:table-cell office:value-type="string">
            <text:p>1.31</text:p>
          </table:table-cell>
          <table:table-cell office:value-type="string">
            <text:p>md</text:p>
          </table:table-cell>
          <table:table-cell office:value-type="string">
            <text:p>26</text:p>
          </table:table-cell>
          <table:table-cell office:value-type="string">
            <text:p>51</text:p>
          </table:table-cell>
          <table:table-cell office:value-type="string">
            <text:p>0.01043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086</text:p>
          </table:table-cell>
          <table:table-cell office:value-type="string">
            <text:p>2026-07-11T20:52:23.585Z</text:p>
          </table:table-cell>
          <table:table-cell office:value-type="string">
            <text:p>7 km W of Cobb, CA</text:p>
          </table:table-cell>
          <table:table-cell office:value-type="string">
            <text:p>earthquake</text:p>
          </table:table-cell>
          <table:table-cell office:value-type="string">
            <text:p>0.22</text:p>
          </table:table-cell>
          <table:table-cell office:value-type="string">
            <text:p>0.289999992</text:p>
          </table:table-cell>
          <table:table-cell office:value-type="string">
            <text:p>0.17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0:19:37.800Z</text:p>
          </table:table-cell>
          <table:table-cell office:value-type="string">
            <text:p>38.82833480835</text:p>
          </table:table-cell>
          <table:table-cell office:value-type="string">
            <text:p>-122.79933166504</text:p>
          </table:table-cell>
          <table:table-cell office:value-type="string">
            <text:p>1.7200000286102</text:p>
          </table:table-cell>
          <table:table-cell office:value-type="string">
            <text:p>1.03</text:p>
          </table:table-cell>
          <table:table-cell office:value-type="string">
            <text:p>md</text:p>
          </table:table-cell>
          <table:table-cell office:value-type="string">
            <text:p>21</text:p>
          </table:table-cell>
          <table:table-cell office:value-type="string">
            <text:p>34</text:p>
          </table:table-cell>
          <table:table-cell office:value-type="string">
            <text:p>0.009733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4081</text:p>
          </table:table-cell>
          <table:table-cell office:value-type="string">
            <text:p>2026-07-11T20:21:12.886Z</text:p>
          </table:table-cell>
          <table:table-cell office:value-type="string">
            <text:p>7 km W of Cobb, CA</text:p>
          </table:table-cell>
          <table:table-cell office:value-type="string">
            <text:p>earthquake</text:p>
          </table:table-cell>
          <table:table-cell office:value-type="string">
            <text:p>0.2</text:p>
          </table:table-cell>
          <table:table-cell office:value-type="string">
            <text:p>0.370000005</text:p>
          </table:table-cell>
          <table:table-cell office:value-type="string">
            <text:p>0.19</text:p>
          </table:table-cell>
          <table:table-cell office:value-type="string">
            <text:p>2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0:17:44.079Z</text:p>
          </table:table-cell>
          <table:table-cell office:value-type="string">
            <text:p>32.063</text:p>
          </table:table-cell>
          <table:table-cell office:value-type="string">
            <text:p>-103.707</text:p>
          </table:table-cell>
          <table:table-cell office:value-type="string">
            <text:p>4.5658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26</text:p>
          </table:table-cell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0.4</text:p>
          </table:table-cell>
          <table:table-cell office:value-type="string">
            <text:p>tx</text:p>
          </table:table-cell>
          <table:table-cell office:value-type="string">
            <text:p>tx2026nodyvs</text:p>
          </table:table-cell>
          <table:table-cell office:value-type="string">
            <text:p>2026-07-11T20:22:20.844Z</text:p>
          </table:table-cell>
          <table:table-cell office:value-type="string">
            <text:p>38 km ESE of Malaga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1103794574738</text:p>
          </table:table-cell>
          <table:table-cell office:value-type="string">
            <text:p>0.2</text:p>
          </table:table-cell>
          <table:table-cell office:value-type="string">
            <text:p>16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20:14:07.160Z</text:p>
          </table:table-cell>
          <table:table-cell office:value-type="string">
            <text:p>38.817665100098</text:p>
          </table:table-cell>
          <table:table-cell office:value-type="string">
            <text:p>-122.84866333008</text:p>
          </table:table-cell>
          <table:table-cell office:value-type="string">
            <text:p>2.8800001144409</text:p>
          </table:table-cell>
          <table:table-cell office:value-type="string">
            <text:p>0.72</text:p>
          </table:table-cell>
          <table:table-cell office:value-type="string">
            <text:p>md</text:p>
          </table:table-cell>
          <table:table-cell office:value-type="string">
            <text:p>9</text:p>
          </table:table-cell>
          <table:table-cell office:value-type="string">
            <text:p>115</text:p>
          </table:table-cell>
          <table:table-cell office:value-type="string">
            <text:p>0.01177</text:p>
          </table:table-cell>
          <table:table-cell office:value-type="string">
            <text:p>0.05</text:p>
          </table:table-cell>
          <table:table-cell office:value-type="string">
            <text:p>nc</text:p>
          </table:table-cell>
          <table:table-cell office:value-type="string">
            <text:p>nc75394076</text:p>
          </table:table-cell>
          <table:table-cell office:value-type="string">
            <text:p>2026-07-11T20:15:43.528Z</text:p>
          </table:table-cell>
          <table:table-cell office:value-type="string">
            <text:p>9 km WNW of The Geysers, CA</text:p>
          </table:table-cell>
          <table:table-cell office:value-type="string">
            <text:p>earthquake</text:p>
          </table:table-cell>
          <table:table-cell office:value-type="string">
            <text:p>0.73</text:p>
          </table:table-cell>
          <table:table-cell office:value-type="string">
            <text:p>1.45000005</text:p>
          </table:table-cell>
          <table:table-cell office:value-type="string">
            <text:p>0.1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20:10:13.030Z</text:p>
          </table:table-cell>
          <table:table-cell office:value-type="string">
            <text:p>31.641</text:p>
          </table:table-cell>
          <table:table-cell office:value-type="string">
            <text:p>-104.286</text:p>
          </table:table-cell>
          <table:table-cell office:value-type="string">
            <text:p>4.8067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26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0.4</text:p>
          </table:table-cell>
          <table:table-cell office:value-type="string">
            <text:p>tx</text:p>
          </table:table-cell>
          <table:table-cell office:value-type="string">
            <text:p>tx2026nodusr</text:p>
          </table:table-cell>
          <table:table-cell office:value-type="string">
            <text:p>2026-07-11T20:15:54.967Z</text:p>
          </table:table-cell>
          <table:table-cell office:value-type="string">
            <text:p>59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898996591568</text:p>
          </table:table-cell>
          <table:table-cell office:value-type="string">
            <text:p>0.1</text:p>
          </table:table-cell>
          <table:table-cell office:value-type="string">
            <text:p>18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20:07:44.120Z</text:p>
          </table:table-cell>
          <table:table-cell office:value-type="string">
            <text:p>61.787</text:p>
          </table:table-cell>
          <table:table-cell office:value-type="string">
            <text:p>-148.614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  <table:table-cell office:value-type="string">
            <text:p>ml</text:p>
          </table:table-cell>
          <table:table-cell office:value-type="string">
            <text:p>41</text:p>
          </table:table-cell>
          <table:table-cell office:value-type="string">
            <text:p>49</text:p>
          </table:table-cell>
          <table:table-cell office:value-type="string">
            <text:p>0.1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qilsh</text:p>
          </table:table-cell>
          <table:table-cell office:value-type="string">
            <text:p>2026-07-11T20:32:33.573Z</text:p>
          </table:table-cell>
          <table:table-cell office:value-type="string">
            <text:p>8 km E of Sutton-Alpine, Alaska</text:p>
          </table:table-cell>
          <table:table-cell office:value-type="string">
            <text:p>earthquake</text:p>
          </table:table-cell>
          <table:table-cell office:value-type="string">
            <text:p>2.7</text:p>
          </table:table-cell>
          <table:table-cell office:value-type="string">
            <text:p>2.09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9:58:40.633Z</text:p>
          </table:table-cell>
          <table:table-cell office:value-type="string">
            <text:p>61.779</text:p>
          </table:table-cell>
          <table:table-cell office:value-type="string">
            <text:p>-148.667</text:p>
          </table:table-cell>
          <table:table-cell office:value-type="string">
            <text:p>5</text:p>
          </table:table-cell>
          <table:table-cell office:value-type="string">
            <text:p>1.8</text:p>
          </table:table-cell>
          <table:table-cell office:value-type="string">
            <text:p>ml</text:p>
          </table:table-cell>
          <table:table-cell office:value-type="string">
            <text:p>14</text:p>
          </table:table-cell>
          <table:table-cell office:value-type="string">
            <text:p>132</text:p>
          </table:table-cell>
          <table:table-cell office:value-type="string">
            <text:p>0.1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qidws</text:p>
          </table:table-cell>
          <table:table-cell office:value-type="string">
            <text:p>2026-07-11T20:00:55.988Z</text:p>
          </table:table-cell>
          <table:table-cell office:value-type="string">
            <text:p>5 km E of Sutton-Alpine, Alaska</text:p>
          </table:table-cell>
          <table:table-cell office:value-type="string">
            <text:p>earthquake</text:p>
          </table:table-cell>
          <table:table-cell office:value-type="string">
            <text:p>3.7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9:56:19.301Z</text:p>
          </table:table-cell>
          <table:table-cell office:value-type="string">
            <text:p>59.955</text:p>
          </table:table-cell>
          <table:table-cell office:value-type="string">
            <text:p>-153.275</text:p>
          </table:table-cell>
          <table:table-cell office:value-type="string">
            <text:p>145.3</text:p>
          </table:table-cell>
          <table:table-cell office:value-type="string">
            <text:p>2.2</text:p>
          </table:table-cell>
          <table:table-cell office:value-type="string">
            <text:p>ml</text:p>
          </table:table-cell>
          <table:table-cell office:value-type="string">
            <text:p>84</text:p>
          </table:table-cell>
          <table:table-cell office:value-type="string">
            <text:p>44</text:p>
          </table:table-cell>
          <table:table-cell office:value-type="string">
            <text:p>0.1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qibuy</text:p>
          </table:table-cell>
          <table:table-cell office:value-type="string">
            <text:p>2026-07-11T20:22:43.040Z</text:p>
          </table:table-cell>
          <table:table-cell office:value-type="string">
            <text:p>50 km ENE of Pedro Bay, Alaska</text:p>
          </table:table-cell>
          <table:table-cell office:value-type="string">
            <text:p>earthquake</text:p>
          </table:table-cell>
          <table:table-cell office:value-type="string">
            <text:p>3.6</text:p>
          </table:table-cell>
          <table:table-cell office:value-type="string">
            <text:p>2.1445</text:p>
          </table:table-cell>
          <table:table-cell office:value-type="string">
            <text:p>0.3</text:p>
          </table:table-cell>
          <table:table-cell office:value-type="string">
            <text:p>36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9:53:55.610Z</text:p>
          </table:table-cell>
          <table:table-cell office:value-type="string">
            <text:p>38.822498321533</text:p>
          </table:table-cell>
          <table:table-cell office:value-type="string">
            <text:p>-122.79550170898</text:p>
          </table:table-cell>
          <table:table-cell office:value-type="string">
            <text:p>2.2799999713898</text:p>
          </table:table-cell>
          <table:table-cell office:value-type="string">
            <text:p>1.04</text:p>
          </table:table-cell>
          <table:table-cell office:value-type="string">
            <text:p>md</text:p>
          </table:table-cell>
          <table:table-cell office:value-type="string">
            <text:p>22</text:p>
          </table:table-cell>
          <table:table-cell office:value-type="string">
            <text:p>32</text:p>
          </table:table-cell>
          <table:table-cell office:value-type="string">
            <text:p>0.01142</text:p>
          </table:table-cell>
          <table:table-cell office:value-type="string">
            <text:p>0.05</text:p>
          </table:table-cell>
          <table:table-cell office:value-type="string">
            <text:p>nc</text:p>
          </table:table-cell>
          <table:table-cell office:value-type="string">
            <text:p>nc75394071</text:p>
          </table:table-cell>
          <table:table-cell office:value-type="string">
            <text:p>2026-07-11T19:55:32.277Z</text:p>
          </table:table-cell>
          <table:table-cell office:value-type="string">
            <text:p>6 km NW of The Geysers, CA</text:p>
          </table:table-cell>
          <table:table-cell office:value-type="string">
            <text:p>earthquake</text:p>
          </table:table-cell>
          <table:table-cell office:value-type="string">
            <text:p>0.24</text:p>
          </table:table-cell>
          <table:table-cell office:value-type="string">
            <text:p>0.469999999</text:p>
          </table:table-cell>
          <table:table-cell office:value-type="string">
            <text:p>0.15</text:p>
          </table:table-cell>
          <table:table-cell office:value-type="string">
            <text:p>2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9:52:11.283Z</text:p>
          </table:table-cell>
          <table:table-cell office:value-type="string">
            <text:p>-7.2807</text:p>
          </table:table-cell>
          <table:table-cell office:value-type="string">
            <text:p>129.2308</text:p>
          </table:table-cell>
          <table:table-cell office:value-type="string">
            <text:p>124.45</text:p>
          </table:table-cell>
          <table:table-cell office:value-type="string">
            <text:p>4.2</text:p>
          </table:table-cell>
          <table:table-cell office:value-type="string">
            <text:p>mb</text:p>
          </table:table-cell>
          <table:table-cell office:value-type="string">
            <text:p>20</text:p>
          </table:table-cell>
          <table:table-cell office:value-type="string">
            <text:p>114</text:p>
          </table:table-cell>
          <table:table-cell office:value-type="string">
            <text:p>5.273</text:p>
          </table:table-cell>
          <table:table-cell office:value-type="string">
            <text:p>0.94</text:p>
          </table:table-cell>
          <table:table-cell office:value-type="string">
            <text:p>us</text:p>
          </table:table-cell>
          <table:table-cell office:value-type="string">
            <text:p>us7000szru</text:p>
          </table:table-cell>
          <table:table-cell office:value-type="string">
            <text:p>2026-07-11T20:16:13.040Z</text:p>
          </table:table-cell>
          <table:table-cell office:value-type="string">
            <text:p>281 km ENE of Lospalos, Timor Leste</text:p>
          </table:table-cell>
          <table:table-cell office:value-type="string">
            <text:p>earthquake</text:p>
          </table:table-cell>
          <table:table-cell office:value-type="string">
            <text:p>6.94</text:p>
          </table:table-cell>
          <table:table-cell office:value-type="string">
            <text:p>9.095</text:p>
          </table:table-cell>
          <table:table-cell office:value-type="string">
            <text:p>0.141</text:p>
          </table:table-cell>
          <table:table-cell office:value-type="string">
            <text:p>14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19:34:37.040Z</text:p>
          </table:table-cell>
          <table:table-cell office:value-type="string">
            <text:p>63.022</text:p>
          </table:table-cell>
          <table:table-cell office:value-type="string">
            <text:p>-150.734</text:p>
          </table:table-cell>
          <table:table-cell office:value-type="string">
            <text:p>126.3</text:p>
          </table:table-cell>
          <table:table-cell office:value-type="string">
            <text:p>2.2</text:p>
          </table:table-cell>
          <table:table-cell office:value-type="string">
            <text:p>ml</text:p>
          </table:table-cell>
          <table:table-cell office:value-type="string">
            <text:p>72</text:p>
          </table:table-cell>
          <table:table-cell office:value-type="string">
            <text:p>49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ak</text:p>
          </table:table-cell>
          <table:table-cell office:value-type="string">
            <text:p>aka2026nqhjao</text:p>
          </table:table-cell>
          <table:table-cell office:value-type="string">
            <text:p>2026-07-11T20:04:06.040Z</text:p>
          </table:table-cell>
          <table:table-cell office:value-type="string">
            <text:p>58 km N of Petersville, Alaska</text:p>
          </table:table-cell>
          <table:table-cell office:value-type="string">
            <text:p>earthquake</text:p>
          </table:table-cell>
          <table:table-cell office:value-type="string">
            <text:p>2.6</text:p>
          </table:table-cell>
          <table:table-cell office:value-type="string">
            <text:p>2.4102</text:p>
          </table:table-cell>
          <table:table-cell office:value-type="string">
            <text:p>0.2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8:53:11.479Z</text:p>
          </table:table-cell>
          <table:table-cell office:value-type="string">
            <text:p>38.5361</text:p>
          </table:table-cell>
          <table:table-cell office:value-type="string">
            <text:p>-118.163</text:p>
          </table:table-cell>
          <table:table-cell office:value-type="string">
            <text:p>9.487</text:p>
          </table:table-cell>
          <table:table-cell office:value-type="string">
            <text:p>2.15</text:p>
          </table:table-cell>
          <table:table-cell office:value-type="string">
            <text:p>ml</text:p>
          </table:table-cell>
          <table:table-cell office:value-type="string">
            <text:p>15</text:p>
          </table:table-cell>
          <table:table-cell office:value-type="string">
            <text:p>89</text:p>
          </table:table-cell>
          <table:table-cell office:value-type="string">
            <text:p>0.267</text:p>
          </table:table-cell>
          <table:table-cell office:value-type="string">
            <text:p>0.1024</text:p>
          </table:table-cell>
          <table:table-cell office:value-type="string">
            <text:p>nn</text:p>
          </table:table-cell>
          <table:table-cell office:value-type="string">
            <text:p>nn00921486</text:p>
          </table:table-cell>
          <table:table-cell office:value-type="string">
            <text:p>2026-07-12T05:34:15.274Z</text:p>
          </table:table-cell>
          <table:table-cell office:value-type="string">
            <text:p>16 km NNW of Mina, Nevada</text:p>
          </table:table-cell>
          <table:table-cell office:value-type="string">
            <text:p>earthquake</text:p>
          </table:table-cell>
          <table:table-cell office:value-type="string">
            <text:p/>
          </table:table-cell>
          <table:table-cell office:value-type="string">
            <text:p>1.9172</text:p>
          </table:table-cell>
          <table:table-cell office:value-type="string">
            <text:p>0.28</text:p>
          </table:table-cell>
          <table:table-cell office:value-type="string">
            <text:p>13</text:p>
          </table:table-cell>
          <table:table-cell office:value-type="string">
            <text:p>reviewed</text:p>
          </table:table-cell>
          <table:table-cell office:value-type="string">
            <text:p>nn</text:p>
          </table:table-cell>
          <table:table-cell office:value-type="string">
            <text:p>nn</text:p>
          </table:table-cell>
        </table:table-row>
        <table:table-row>
          <table:table-cell office:value-type="string">
            <text:p>2026-07-11T18:51:44.463Z</text:p>
          </table:table-cell>
          <table:table-cell office:value-type="string">
            <text:p>62.884</text:p>
          </table:table-cell>
          <table:table-cell office:value-type="string">
            <text:p>-149.081</text:p>
          </table:table-cell>
          <table:table-cell office:value-type="string">
            <text:p>67.2</text:p>
          </table:table-cell>
          <table:table-cell office:value-type="string">
            <text:p>2.3</text:p>
          </table:table-cell>
          <table:table-cell office:value-type="string">
            <text:p>ml</text:p>
          </table:table-cell>
          <table:table-cell office:value-type="string">
            <text:p>46</text:p>
          </table:table-cell>
          <table:table-cell office:value-type="string">
            <text:p>47</text:p>
          </table:table-cell>
          <table:table-cell office:value-type="string">
            <text:p>0.7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qfxvq</text:p>
          </table:table-cell>
          <table:table-cell office:value-type="string">
            <text:p>2026-07-11T18:53:35.171Z</text:p>
          </table:table-cell>
          <table:table-cell office:value-type="string">
            <text:p>56 km S of Cantwell, Alaska</text:p>
          </table:table-cell>
          <table:table-cell office:value-type="string">
            <text:p>earthquake</text:p>
          </table:table-cell>
          <table:table-cell office:value-type="string">
            <text:p>3.8</text:p>
          </table:table-cell>
          <table:table-cell office:value-type="string">
            <text:p>5.7386</text:p>
          </table:table-cell>
          <table:table-cell office:value-type="string">
            <text:p>0.4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8:50:49.730Z</text:p>
          </table:table-cell>
          <table:table-cell office:value-type="string">
            <text:p>19.061500549316</text:p>
          </table:table-cell>
          <table:table-cell office:value-type="string">
            <text:p>-155.33949279785</text:p>
          </table:table-cell>
          <table:table-cell office:value-type="string">
            <text:p>31.790000915527</text:p>
          </table:table-cell>
          <table:table-cell office:value-type="string">
            <text:p>1.76</text:p>
          </table:table-cell>
          <table:table-cell office:value-type="string">
            <text:p>md</text:p>
          </table:table-cell>
          <table:table-cell office:value-type="string">
            <text:p>17</text:p>
          </table:table-cell>
          <table:table-cell office:value-type="string">
            <text:p>264</text:p>
          </table:table-cell>
          <table:table-cell office:value-type="string">
            <text:p>0.1489</text:p>
          </table:table-cell>
          <table:table-cell office:value-type="string">
            <text:p>0.119999997</text:p>
          </table:table-cell>
          <table:table-cell office:value-type="string">
            <text:p>hv</text:p>
          </table:table-cell>
          <table:table-cell office:value-type="string">
            <text:p>hv75000941</text:p>
          </table:table-cell>
          <table:table-cell office:value-type="string">
            <text:p>2026-07-11T18:54:49.050Z</text:p>
          </table:table-cell>
          <table:table-cell office:value-type="string">
            <text:p>21 km SE of Pāhala, Hawaii</text:p>
          </table:table-cell>
          <table:table-cell office:value-type="string">
            <text:p>earthquake</text:p>
          </table:table-cell>
          <table:table-cell office:value-type="string">
            <text:p>1.72</text:p>
          </table:table-cell>
          <table:table-cell office:value-type="string">
            <text:p>1.11000001</text:p>
          </table:table-cell>
          <table:table-cell office:value-type="string">
            <text:p>0.16628229811587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18:48:05.010Z</text:p>
          </table:table-cell>
          <table:table-cell office:value-type="string">
            <text:p>38.819999694824</text:p>
          </table:table-cell>
          <table:table-cell office:value-type="string">
            <text:p>-122.811668396</text:p>
          </table:table-cell>
          <table:table-cell office:value-type="string">
            <text:p>2.8800001144409</text:p>
          </table:table-cell>
          <table:table-cell office:value-type="string">
            <text:p>0.75</text:p>
          </table:table-cell>
          <table:table-cell office:value-type="string">
            <text:p>md</text:p>
          </table:table-cell>
          <table:table-cell office:value-type="string">
            <text:p>10</text:p>
          </table:table-cell>
          <table:table-cell office:value-type="string">
            <text:p>119</text:p>
          </table:table-cell>
          <table:table-cell office:value-type="string">
            <text:p>0.01754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036</text:p>
          </table:table-cell>
          <table:table-cell office:value-type="string">
            <text:p>2026-07-11T18:49:42.989Z</text:p>
          </table:table-cell>
          <table:table-cell office:value-type="string">
            <text:p>7 km NW of The Geysers, CA</text:p>
          </table:table-cell>
          <table:table-cell office:value-type="string">
            <text:p>earthquake</text:p>
          </table:table-cell>
          <table:table-cell office:value-type="string">
            <text:p>0.43</text:p>
          </table:table-cell>
          <table:table-cell office:value-type="string">
            <text:p>1.23000002</text:p>
          </table:table-cell>
          <table:table-cell office:value-type="string">
            <text:p>0.17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8:09:33.905Z</text:p>
          </table:table-cell>
          <table:table-cell office:value-type="string">
            <text:p>55.911</text:p>
          </table:table-cell>
          <table:table-cell office:value-type="string">
            <text:p>-159.857</text:p>
          </table:table-cell>
          <table:table-cell office:value-type="string">
            <text:p>2.1</text:p>
          </table:table-cell>
          <table:table-cell office:value-type="string">
            <text:p>2.3</text:p>
          </table:table-cell>
          <table:table-cell office:value-type="string">
            <text:p>ml</text:p>
          </table:table-cell>
          <table:table-cell office:value-type="string">
            <text:p>22</text:p>
          </table:table-cell>
          <table:table-cell office:value-type="string">
            <text:p>171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qengt</text:p>
          </table:table-cell>
          <table:table-cell office:value-type="string">
            <text:p>2026-07-11T18:11:39.786Z</text:p>
          </table:table-cell>
          <table:table-cell office:value-type="string">
            <text:p>23 km W of Ivanof Bay, Alaska</text:p>
          </table:table-cell>
          <table:table-cell office:value-type="string">
            <text:p>earthquake</text:p>
          </table:table-cell>
          <table:table-cell office:value-type="string">
            <text:p>13.8</text:p>
          </table:table-cell>
          <table:table-cell office:value-type="string">
            <text:p>4.295</text:p>
          </table:table-cell>
          <table:table-cell office:value-type="string">
            <text:p>0.2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8:05:20.220Z</text:p>
          </table:table-cell>
          <table:table-cell office:value-type="string">
            <text:p>38.836833953857</text:p>
          </table:table-cell>
          <table:table-cell office:value-type="string">
            <text:p>-122.80149841309</text:p>
          </table:table-cell>
          <table:table-cell office:value-type="string">
            <text:p>1.960000038147</text:p>
          </table:table-cell>
          <table:table-cell office:value-type="string">
            <text:p>0.46</text:p>
          </table:table-cell>
          <table:table-cell office:value-type="string">
            <text:p>md</text:p>
          </table:table-cell>
          <table:table-cell office:value-type="string">
            <text:p>11</text:p>
          </table:table-cell>
          <table:table-cell office:value-type="string">
            <text:p>74</text:p>
          </table:table-cell>
          <table:table-cell office:value-type="string">
            <text:p>0.008852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4026</text:p>
          </table:table-cell>
          <table:table-cell office:value-type="string">
            <text:p>2026-07-11T18:06:58.654Z</text:p>
          </table:table-cell>
          <table:table-cell office:value-type="string">
            <text:p>7 km WNW of Cobb, CA</text:p>
          </table:table-cell>
          <table:table-cell office:value-type="string">
            <text:p>earthquake</text:p>
          </table:table-cell>
          <table:table-cell office:value-type="string">
            <text:p>0.33</text:p>
          </table:table-cell>
          <table:table-cell office:value-type="string">
            <text:p>0.930000007</text:p>
          </table:table-cell>
          <table:table-cell office:value-type="string">
            <text:p>0.23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8:01:41.367Z</text:p>
          </table:table-cell>
          <table:table-cell office:value-type="string">
            <text:p>62.072</text:p>
          </table:table-cell>
          <table:table-cell office:value-type="string">
            <text:p>-150.966</text:p>
          </table:table-cell>
          <table:table-cell office:value-type="string">
            <text:p>5</text:p>
          </table:table-cell>
          <table:table-cell office:value-type="string">
            <text:p>1.7</text:p>
          </table:table-cell>
          <table:table-cell office:value-type="string">
            <text:p>ml</text:p>
          </table:table-cell>
          <table:table-cell office:value-type="string">
            <text:p>17</text:p>
          </table:table-cell>
          <table:table-cell office:value-type="string">
            <text:p>85</text:p>
          </table:table-cell>
          <table:table-cell office:value-type="string">
            <text:p>0.3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qeghg</text:p>
          </table:table-cell>
          <table:table-cell office:value-type="string">
            <text:p>2026-07-11T18:03:17.324Z</text:p>
          </table:table-cell>
          <table:table-cell office:value-type="string">
            <text:p>24 km ENE of Skwentna, Alaska</text:p>
          </table:table-cell>
          <table:table-cell office:value-type="string">
            <text:p>earthquake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7:49:31.928Z</text:p>
          </table:table-cell>
          <table:table-cell office:value-type="string">
            <text:p>4.9407</text:p>
          </table:table-cell>
          <table:table-cell office:value-type="string">
            <text:p>125.2447</text:p>
          </table:table-cell>
          <table:table-cell office:value-type="string">
            <text:p>61.682</text:p>
          </table:table-cell>
          <table:table-cell office:value-type="string">
            <text:p>5.2</text:p>
          </table:table-cell>
          <table:table-cell office:value-type="string">
            <text:p>mb</text:p>
          </table:table-cell>
          <table:table-cell office:value-type="string">
            <text:p>91</text:p>
          </table:table-cell>
          <table:table-cell office:value-type="string">
            <text:p>43</text:p>
          </table:table-cell>
          <table:table-cell office:value-type="string">
            <text:p>2.141</text:p>
          </table:table-cell>
          <table:table-cell office:value-type="string">
            <text:p>0.68</text:p>
          </table:table-cell>
          <table:table-cell office:value-type="string">
            <text:p>us</text:p>
          </table:table-cell>
          <table:table-cell office:value-type="string">
            <text:p>us7000szri</text:p>
          </table:table-cell>
          <table:table-cell office:value-type="string">
            <text:p>2026-07-11T18:07:48.040Z</text:p>
          </table:table-cell>
          <table:table-cell office:value-type="string">
            <text:p>56 km SSW of Sarangani, Philippines</text:p>
          </table:table-cell>
          <table:table-cell office:value-type="string">
            <text:p>earthquake</text:p>
          </table:table-cell>
          <table:table-cell office:value-type="string">
            <text:p>9.53</text:p>
          </table:table-cell>
          <table:table-cell office:value-type="string">
            <text:p>6.795</text:p>
          </table:table-cell>
          <table:table-cell office:value-type="string">
            <text:p>0.043</text:p>
          </table:table-cell>
          <table:table-cell office:value-type="string">
            <text:p>176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17:42:43.402Z</text:p>
          </table:table-cell>
          <table:table-cell office:value-type="string">
            <text:p>60.789</text:p>
          </table:table-cell>
          <table:table-cell office:value-type="string">
            <text:p>-151.08</text:p>
          </table:table-cell>
          <table:table-cell office:value-type="string">
            <text:p>64.8</text:p>
          </table:table-cell>
          <table:table-cell office:value-type="string">
            <text:p>1.4</text:p>
          </table:table-cell>
          <table:table-cell office:value-type="string">
            <text:p>ml</text:p>
          </table:table-cell>
          <table:table-cell office:value-type="string">
            <text:p>26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qdpzp</text:p>
          </table:table-cell>
          <table:table-cell office:value-type="string">
            <text:p>2026-07-11T17:44:18.395Z</text:p>
          </table:table-cell>
          <table:table-cell office:value-type="string">
            <text:p>15 km NE of Nikiski, Alaska</text:p>
          </table:table-cell>
          <table:table-cell office:value-type="string">
            <text:p>earthquake</text:p>
          </table:table-cell>
          <table:table-cell office:value-type="string">
            <text:p>3.8</text:p>
          </table:table-cell>
          <table:table-cell office:value-type="string">
            <text:p>5.8564</text:p>
          </table:table-cell>
          <table:table-cell office:value-type="string">
            <text:p>0.7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7:40:09.869Z</text:p>
          </table:table-cell>
          <table:table-cell office:value-type="string">
            <text:p>37.4669</text:p>
          </table:table-cell>
          <table:table-cell office:value-type="string">
            <text:p>-116.7</text:p>
          </table:table-cell>
          <table:table-cell office:value-type="string">
            <text:p>14.537</text:p>
          </table:table-cell>
          <table:table-cell office:value-type="string">
            <text:p>3.03</text:p>
          </table:table-cell>
          <table:table-cell office:value-type="string">
            <text:p>ml</text:p>
          </table:table-cell>
          <table:table-cell office:value-type="string">
            <text:p>25</text:p>
          </table:table-cell>
          <table:table-cell office:value-type="string">
            <text:p>154</text:p>
          </table:table-cell>
          <table:table-cell office:value-type="string">
            <text:p>0.272</text:p>
          </table:table-cell>
          <table:table-cell office:value-type="string">
            <text:p>0.145</text:p>
          </table:table-cell>
          <table:table-cell office:value-type="string">
            <text:p>nn</text:p>
          </table:table-cell>
          <table:table-cell office:value-type="string">
            <text:p>nn00921481</text:p>
          </table:table-cell>
          <table:table-cell office:value-type="string">
            <text:p>2026-07-11T18:14:43.040Z</text:p>
          </table:table-cell>
          <table:table-cell office:value-type="string">
            <text:p>54 km ESE of Goldfield, Nevada</text:p>
          </table:table-cell>
          <table:table-cell office:value-type="string">
            <text:p>earthquake</text:p>
          </table:table-cell>
          <table:table-cell office:value-type="string">
            <text:p/>
          </table:table-cell>
          <table:table-cell office:value-type="string">
            <text:p>1.3763</text:p>
          </table:table-cell>
          <table:table-cell office:value-type="string">
            <text:p>0.19</text:p>
          </table:table-cell>
          <table:table-cell office:value-type="string">
            <text:p>11</text:p>
          </table:table-cell>
          <table:table-cell office:value-type="string">
            <text:p>reviewed</text:p>
          </table:table-cell>
          <table:table-cell office:value-type="string">
            <text:p>nn</text:p>
          </table:table-cell>
          <table:table-cell office:value-type="string">
            <text:p>nn</text:p>
          </table:table-cell>
        </table:table-row>
        <table:table-row>
          <table:table-cell office:value-type="string">
            <text:p>2026-07-11T17:37:36.210Z</text:p>
          </table:table-cell>
          <table:table-cell office:value-type="string">
            <text:p>35.646666666667</text:p>
          </table:table-cell>
          <table:table-cell office:value-type="string">
            <text:p>-117.45716666667</text:p>
          </table:table-cell>
          <table:table-cell office:value-type="string">
            <text:p>5.95</text:p>
          </table:table-cell>
          <table:table-cell office:value-type="string">
            <text:p>0.52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57</text:p>
          </table:table-cell>
          <table:table-cell office:value-type="string">
            <text:p>0.03288</text:p>
          </table:table-cell>
          <table:table-cell office:value-type="string">
            <text:p>0.17</text:p>
          </table:table-cell>
          <table:table-cell office:value-type="string">
            <text:p>ci</text:p>
          </table:table-cell>
          <table:table-cell office:value-type="string">
            <text:p>ci41291567</text:p>
          </table:table-cell>
          <table:table-cell office:value-type="string">
            <text:p>2026-07-11T17:41:03.925Z</text:p>
          </table:table-cell>
          <table:table-cell office:value-type="string">
            <text:p>14 km SSW of Searles Valley, CA</text:p>
          </table:table-cell>
          <table:table-cell office:value-type="string">
            <text:p>earthquake</text:p>
          </table:table-cell>
          <table:table-cell office:value-type="string">
            <text:p>0.27</text:p>
          </table:table-cell>
          <table:table-cell office:value-type="string">
            <text:p>0.52</text:p>
          </table:table-cell>
          <table:table-cell office:value-type="string">
            <text:p>0.18568783737854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7:37:30.250Z</text:p>
          </table:table-cell>
          <table:table-cell office:value-type="string">
            <text:p>55.478666666667</text:p>
          </table:table-cell>
          <table:table-cell office:value-type="string">
            <text:p>-161.80633333333</text:p>
          </table:table-cell>
          <table:table-cell office:value-type="string">
            <text:p>8.19</text:p>
          </table:table-cell>
          <table:table-cell office:value-type="string">
            <text:p>0.74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181</text:p>
          </table:table-cell>
          <table:table-cell office:value-type="string">
            <text:p>0.06873</text:p>
          </table:table-cell>
          <table:table-cell office:value-type="string">
            <text:p>0.09</text:p>
          </table:table-cell>
          <table:table-cell office:value-type="string">
            <text:p>av</text:p>
          </table:table-cell>
          <table:table-cell office:value-type="string">
            <text:p>av94302673</text:p>
          </table:table-cell>
          <table:table-cell office:value-type="string">
            <text:p>2026-07-12T05:01:46.110Z</text:p>
          </table:table-cell>
          <table:table-cell office:value-type="string">
            <text:p>56 km NE of King Cove, Alaska</text:p>
          </table:table-cell>
          <table:table-cell office:value-type="string">
            <text:p>earthquake</text:p>
          </table:table-cell>
          <table:table-cell office:value-type="string">
            <text:p>0.47</text:p>
          </table:table-cell>
          <table:table-cell office:value-type="string">
            <text:p>0.98</text:p>
          </table:table-cell>
          <table:table-cell office:value-type="string">
            <text:p>0.17812623635073</text:p>
          </table:table-cell>
          <table:table-cell office:value-type="string">
            <text:p>6</text:p>
          </table:table-cell>
          <table:table-cell office:value-type="string">
            <text:p>reviewed</text:p>
          </table:table-cell>
          <table:table-cell office:value-type="string">
            <text:p>av</text:p>
          </table:table-cell>
          <table:table-cell office:value-type="string">
            <text:p>av</text:p>
          </table:table-cell>
        </table:table-row>
        <table:table-row>
          <table:table-cell office:value-type="string">
            <text:p>2026-07-11T17:32:42.300Z</text:p>
          </table:table-cell>
          <table:table-cell office:value-type="string">
            <text:p>30.911</text:p>
          </table:table-cell>
          <table:table-cell office:value-type="string">
            <text:p>-103.614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  <table:table-cell office:value-type="string">
            <text:p>ml</text:p>
          </table:table-cell>
          <table:table-cell office:value-type="string">
            <text:p>9</text:p>
          </table:table-cell>
          <table:table-cell office:value-type="string">
            <text:p>23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tx</text:p>
          </table:table-cell>
          <table:table-cell office:value-type="string">
            <text:p>tx2026nnypgf</text:p>
          </table:table-cell>
          <table:table-cell office:value-type="string">
            <text:p>2026-07-11T17:36:06.712Z</text:p>
          </table:table-cell>
          <table:table-cell office:value-type="string">
            <text:p>14 km ESE of Balmorhea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7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7:30:48.130Z</text:p>
          </table:table-cell>
          <table:table-cell office:value-type="string">
            <text:p>36.607166290283</text:p>
          </table:table-cell>
          <table:table-cell office:value-type="string">
            <text:p>-121.20766448975</text:p>
          </table:table-cell>
          <table:table-cell office:value-type="string">
            <text:p>6.0900001525879</text:p>
          </table:table-cell>
          <table:table-cell office:value-type="string">
            <text:p>1.74</text:p>
          </table:table-cell>
          <table:table-cell office:value-type="string">
            <text:p>md</text:p>
          </table:table-cell>
          <table:table-cell office:value-type="string">
            <text:p>18</text:p>
          </table:table-cell>
          <table:table-cell office:value-type="string">
            <text:p>149</text:p>
          </table:table-cell>
          <table:table-cell office:value-type="string">
            <text:p>0.03967</text:p>
          </table:table-cell>
          <table:table-cell office:value-type="string">
            <text:p>0.06</text:p>
          </table:table-cell>
          <table:table-cell office:value-type="string">
            <text:p>nc</text:p>
          </table:table-cell>
          <table:table-cell office:value-type="string">
            <text:p>nc75394011</text:p>
          </table:table-cell>
          <table:table-cell office:value-type="string">
            <text:p>2026-07-11T18:12:22.474Z</text:p>
          </table:table-cell>
          <table:table-cell office:value-type="string">
            <text:p>10 km NW of Pinnacles, CA</text:p>
          </table:table-cell>
          <table:table-cell office:value-type="string">
            <text:p>earthquake</text:p>
          </table:table-cell>
          <table:table-cell office:value-type="string">
            <text:p>0.38</text:p>
          </table:table-cell>
          <table:table-cell office:value-type="string">
            <text:p>0.829999983</text:p>
          </table:table-cell>
          <table:table-cell office:value-type="string">
            <text:p>0.17</text:p>
          </table:table-cell>
          <table:table-cell office:value-type="string">
            <text:p>2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7:27:21.050Z</text:p>
          </table:table-cell>
          <table:table-cell office:value-type="string">
            <text:p>19.923833847046</text:p>
          </table:table-cell>
          <table:table-cell office:value-type="string">
            <text:p>-155.52033996582</text:p>
          </table:table-cell>
          <table:table-cell office:value-type="string">
            <text:p>35.590000152588</text:p>
          </table:table-cell>
          <table:table-cell office:value-type="string">
            <text:p>1.88</text:p>
          </table:table-cell>
          <table:table-cell office:value-type="string">
            <text:p>md</text:p>
          </table:table-cell>
          <table:table-cell office:value-type="string">
            <text:p>20</text:p>
          </table:table-cell>
          <table:table-cell office:value-type="string">
            <text:p>255</text:p>
          </table:table-cell>
          <table:table-cell office:value-type="string">
            <text:p>0.1591</text:p>
          </table:table-cell>
          <table:table-cell office:value-type="string">
            <text:p>0.189999998</text:p>
          </table:table-cell>
          <table:table-cell office:value-type="string">
            <text:p>hv</text:p>
          </table:table-cell>
          <table:table-cell office:value-type="string">
            <text:p>hv75000906</text:p>
          </table:table-cell>
          <table:table-cell office:value-type="string">
            <text:p>2026-07-11T17:30:57.530Z</text:p>
          </table:table-cell>
          <table:table-cell office:value-type="string">
            <text:p>18 km SSW of Honoka‘a, Hawaii</text:p>
          </table:table-cell>
          <table:table-cell office:value-type="string">
            <text:p>earthquake</text:p>
          </table:table-cell>
          <table:table-cell office:value-type="string">
            <text:p>0.88</text:p>
          </table:table-cell>
          <table:table-cell office:value-type="string">
            <text:p>1.23000002</text:p>
          </table:table-cell>
          <table:table-cell office:value-type="string">
            <text:p>0.085197040593894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17:13:06.570Z</text:p>
          </table:table-cell>
          <table:table-cell office:value-type="string">
            <text:p>38.80033493042</text:p>
          </table:table-cell>
          <table:table-cell office:value-type="string">
            <text:p>-122.75133514404</text:p>
          </table:table-cell>
          <table:table-cell office:value-type="string">
            <text:p>2.4300000667572</text:p>
          </table:table-cell>
          <table:table-cell office:value-type="string">
            <text:p>0.84</text:p>
          </table:table-cell>
          <table:table-cell office:value-type="string">
            <text:p>md</text:p>
          </table:table-cell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0.006552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3991</text:p>
          </table:table-cell>
          <table:table-cell office:value-type="string">
            <text:p>2026-07-11T17:14:43.264Z</text:p>
          </table:table-cell>
          <table:table-cell office:value-type="string">
            <text:p>3 km N of The Geysers, CA</text:p>
          </table:table-cell>
          <table:table-cell office:value-type="string">
            <text:p>earthquake</text:p>
          </table:table-cell>
          <table:table-cell office:value-type="string">
            <text:p>0.3</text:p>
          </table:table-cell>
          <table:table-cell office:value-type="string">
            <text:p>0.670000017</text:p>
          </table:table-cell>
          <table:table-cell office:value-type="string">
            <text:p>0.14</text:p>
          </table:table-cell>
          <table:table-cell office:value-type="string">
            <text:p>12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7:12:53.374Z</text:p>
          </table:table-cell>
          <table:table-cell office:value-type="string">
            <text:p>58.183</text:p>
          </table:table-cell>
          <table:table-cell office:value-type="string">
            <text:p>-155.366</text:p>
          </table:table-cell>
          <table:table-cell office:value-type="string">
            <text:p>4.7</text:p>
          </table:table-cell>
          <table:table-cell office:value-type="string">
            <text:p>0.6</text:p>
          </table:table-cell>
          <table:table-cell office:value-type="string">
            <text:p>ml</text:p>
          </table:table-cell>
          <table:table-cell office:value-type="string">
            <text:p>12</text:p>
          </table:table-cell>
          <table:table-cell office:value-type="string">
            <text:p>63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ak</text:p>
          </table:table-cell>
          <table:table-cell office:value-type="string">
            <text:p>aka2026nqcqdh</text:p>
          </table:table-cell>
          <table:table-cell office:value-type="string">
            <text:p>2026-07-11T17:13:53.992Z</text:p>
          </table:table-cell>
          <table:table-cell office:value-type="string">
            <text:p>87 km NW of Karluk, Alaska</text:p>
          </table:table-cell>
          <table:table-cell office:value-type="string">
            <text:p>earthquake</text:p>
          </table:table-cell>
          <table:table-cell office:value-type="string">
            <text:p>5.8</text:p>
          </table:table-cell>
          <table:table-cell office:value-type="string">
            <text:p>14.7017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7:10:40.840Z</text:p>
          </table:table-cell>
          <table:table-cell office:value-type="string">
            <text:p>33.486333333333</text:p>
          </table:table-cell>
          <table:table-cell office:value-type="string">
            <text:p>-116.481</text:p>
          </table:table-cell>
          <table:table-cell office:value-type="string">
            <text:p>12.34</text:p>
          </table:table-cell>
          <table:table-cell office:value-type="string">
            <text:p>0.75</text:p>
          </table:table-cell>
          <table:table-cell office:value-type="string">
            <text:p>ml</text:p>
          </table:table-cell>
          <table:table-cell office:value-type="string">
            <text:p>36</text:p>
          </table:table-cell>
          <table:table-cell office:value-type="string">
            <text:p>59</text:p>
          </table:table-cell>
          <table:table-cell office:value-type="string">
            <text:p>0.1016</text:p>
          </table:table-cell>
          <table:table-cell office:value-type="string">
            <text:p>0.19</text:p>
          </table:table-cell>
          <table:table-cell office:value-type="string">
            <text:p>ci</text:p>
          </table:table-cell>
          <table:table-cell office:value-type="string">
            <text:p>ci41291527</text:p>
          </table:table-cell>
          <table:table-cell office:value-type="string">
            <text:p>2026-07-11T17:14:09.603Z</text:p>
          </table:table-cell>
          <table:table-cell office:value-type="string">
            <text:p>19 km ESE of Anza, CA</text:p>
          </table:table-cell>
          <table:table-cell office:value-type="string">
            <text:p>earthquake</text:p>
          </table:table-cell>
          <table:table-cell office:value-type="string">
            <text:p>0.22</text:p>
          </table:table-cell>
          <table:table-cell office:value-type="string">
            <text:p>0.56</text:p>
          </table:table-cell>
          <table:table-cell office:value-type="string">
            <text:p>0.18139956556902</text:p>
          </table:table-cell>
          <table:table-cell office:value-type="string">
            <text:p>1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7:00:24.660Z</text:p>
          </table:table-cell>
          <table:table-cell office:value-type="string">
            <text:p>36.588500976562</text:p>
          </table:table-cell>
          <table:table-cell office:value-type="string">
            <text:p>-121.21966552734</text:p>
          </table:table-cell>
          <table:table-cell office:value-type="string">
            <text:p>5.7399997711182</text:p>
          </table:table-cell>
          <table:table-cell office:value-type="string">
            <text:p>2.03</text:p>
          </table:table-cell>
          <table:table-cell office:value-type="string">
            <text:p>md</text:p>
          </table:table-cell>
          <table:table-cell office:value-type="string">
            <text:p>43</text:p>
          </table:table-cell>
          <table:table-cell office:value-type="string">
            <text:p>37</text:p>
          </table:table-cell>
          <table:table-cell office:value-type="string">
            <text:p>0.03228</text:p>
          </table:table-cell>
          <table:table-cell office:value-type="string">
            <text:p>0.27</text:p>
          </table:table-cell>
          <table:table-cell office:value-type="string">
            <text:p>nc</text:p>
          </table:table-cell>
          <table:table-cell office:value-type="string">
            <text:p>nc75393971</text:p>
          </table:table-cell>
          <table:table-cell office:value-type="string">
            <text:p>2026-07-11T17:22:20.150Z</text:p>
          </table:table-cell>
          <table:table-cell office:value-type="string">
            <text:p>9 km NW of Pinnacles, CA</text:p>
          </table:table-cell>
          <table:table-cell office:value-type="string">
            <text:p>earthquake</text:p>
          </table:table-cell>
          <table:table-cell office:value-type="string">
            <text:p>0.36</text:p>
          </table:table-cell>
          <table:table-cell office:value-type="string">
            <text:p>1.24000001</text:p>
          </table:table-cell>
          <table:table-cell office:value-type="string">
            <text:p>0.18</text:p>
          </table:table-cell>
          <table:table-cell office:value-type="string">
            <text:p>35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6:49:52.637Z</text:p>
          </table:table-cell>
          <table:table-cell office:value-type="string">
            <text:p>31.648</text:p>
          </table:table-cell>
          <table:table-cell office:value-type="string">
            <text:p>-104.358</text:p>
          </table:table-cell>
          <table:table-cell office:value-type="string">
            <text:p>4.4456</text:p>
          </table:table-cell>
          <table:table-cell office:value-type="string">
            <text:p>0.7</text:p>
          </table:table-cell>
          <table:table-cell office:value-type="string">
            <text:p>ml</text:p>
          </table:table-cell>
          <table:table-cell office:value-type="string">
            <text:p>15</text:p>
          </table:table-cell>
          <table:table-cell office:value-type="string">
            <text:p>71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xehd</text:p>
          </table:table-cell>
          <table:table-cell office:value-type="string">
            <text:p>2026-07-11T17:07:20.408Z</text:p>
          </table:table-cell>
          <table:table-cell office:value-type="string">
            <text:p>58 km S of Whites City, New Mexico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4056662321091</text:p>
          </table:table-cell>
          <table:table-cell office:value-type="string">
            <text:p>0.2</text:p>
          </table:table-cell>
          <table:table-cell office:value-type="string">
            <text:p>13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6:44:00.700Z</text:p>
          </table:table-cell>
          <table:table-cell office:value-type="string">
            <text:p>34.897333333333</text:p>
          </table:table-cell>
          <table:table-cell office:value-type="string">
            <text:p>-119.61033333333</text:p>
          </table:table-cell>
          <table:table-cell office:value-type="string">
            <text:p>9.32</text:p>
          </table:table-cell>
          <table:table-cell office:value-type="string">
            <text:p>1.11</text:p>
          </table:table-cell>
          <table:table-cell office:value-type="string">
            <text:p>ml</text:p>
          </table:table-cell>
          <table:table-cell office:value-type="string">
            <text:p>27</text:p>
          </table:table-cell>
          <table:table-cell office:value-type="string">
            <text:p>54</text:p>
          </table:table-cell>
          <table:table-cell office:value-type="string">
            <text:p>0.06915</text:p>
          </table:table-cell>
          <table:table-cell office:value-type="string">
            <text:p>0.21</text:p>
          </table:table-cell>
          <table:table-cell office:value-type="string">
            <text:p>ci</text:p>
          </table:table-cell>
          <table:table-cell office:value-type="string">
            <text:p>ci41291511</text:p>
          </table:table-cell>
          <table:table-cell office:value-type="string">
            <text:p>2026-07-11T16:47:30.810Z</text:p>
          </table:table-cell>
          <table:table-cell office:value-type="string">
            <text:p>26 km SW of Maricopa, CA</text:p>
          </table:table-cell>
          <table:table-cell office:value-type="string">
            <text:p>earthquake</text:p>
          </table:table-cell>
          <table:table-cell office:value-type="string">
            <text:p>0.33</text:p>
          </table:table-cell>
          <table:table-cell office:value-type="string">
            <text:p>0.77</text:p>
          </table:table-cell>
          <table:table-cell office:value-type="string">
            <text:p>0.20829290480242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6:41:45.420Z</text:p>
          </table:table-cell>
          <table:table-cell office:value-type="string">
            <text:p>38.837501525879</text:p>
          </table:table-cell>
          <table:table-cell office:value-type="string">
            <text:p>-122.81099700928</text:p>
          </table:table-cell>
          <table:table-cell office:value-type="string">
            <text:p>1.9900000095367</text:p>
          </table:table-cell>
          <table:table-cell office:value-type="string">
            <text:p>0.7</text:p>
          </table:table-cell>
          <table:table-cell office:value-type="string">
            <text:p>md</text:p>
          </table:table-cell>
          <table:table-cell office:value-type="string">
            <text:p>14</text:p>
          </table:table-cell>
          <table:table-cell office:value-type="string">
            <text:p>57</text:p>
          </table:table-cell>
          <table:table-cell office:value-type="string">
            <text:p>0.0141</text:p>
          </table:table-cell>
          <table:table-cell office:value-type="string">
            <text:p>0.04</text:p>
          </table:table-cell>
          <table:table-cell office:value-type="string">
            <text:p>nc</text:p>
          </table:table-cell>
          <table:table-cell office:value-type="string">
            <text:p>nc75393966</text:p>
          </table:table-cell>
          <table:table-cell office:value-type="string">
            <text:p>2026-07-11T16:43:22.057Z</text:p>
          </table:table-cell>
          <table:table-cell office:value-type="string">
            <text:p>8 km WNW of Cobb, CA</text:p>
          </table:table-cell>
          <table:table-cell office:value-type="string">
            <text:p>earthquake</text:p>
          </table:table-cell>
          <table:table-cell office:value-type="string">
            <text:p>0.29</text:p>
          </table:table-cell>
          <table:table-cell office:value-type="string">
            <text:p>0.800000012</text:p>
          </table:table-cell>
          <table:table-cell office:value-type="string">
            <text:p>0.06</text:p>
          </table:table-cell>
          <table:table-cell office:value-type="string">
            <text:p>13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6:38:44.003Z</text:p>
          </table:table-cell>
          <table:table-cell office:value-type="string">
            <text:p>64.736</text:p>
          </table:table-cell>
          <table:table-cell office:value-type="string">
            <text:p>-149.833</text:p>
          </table:table-cell>
          <table:table-cell office:value-type="string">
            <text:p>12.2</text:p>
          </table:table-cell>
          <table:table-cell office:value-type="string">
            <text:p>1.2</text:p>
          </table:table-cell>
          <table:table-cell office:value-type="string">
            <text:p>ml</text:p>
          </table:table-cell>
          <table:table-cell office:value-type="string">
            <text:p>12</text:p>
          </table:table-cell>
          <table:table-cell office:value-type="string">
            <text:p>14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ak</text:p>
          </table:table-cell>
          <table:table-cell office:value-type="string">
            <text:p>aka2026nqbmnn</text:p>
          </table:table-cell>
          <table:table-cell office:value-type="string">
            <text:p>2026-07-11T16:40:27.644Z</text:p>
          </table:table-cell>
          <table:table-cell office:value-type="string">
            <text:p>37 km WNW of Four Mile Road, Alaska</text:p>
          </table:table-cell>
          <table:table-cell office:value-type="string">
            <text:p>earthquake</text:p>
          </table:table-cell>
          <table:table-cell office:value-type="string">
            <text:p>5.8</text:p>
          </table:table-cell>
          <table:table-cell office:value-type="string">
            <text:p>3.2014</text:p>
          </table:table-cell>
          <table:table-cell office:value-type="string">
            <text:p>0.3</text:p>
          </table:table-cell>
          <table:table-cell office:value-type="string">
            <text:p>5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6:32:05.260Z</text:p>
          </table:table-cell>
          <table:table-cell office:value-type="string">
            <text:p>34.004666666667</text:p>
          </table:table-cell>
          <table:table-cell office:value-type="string">
            <text:p>-117.21566666667</text:p>
          </table:table-cell>
          <table:table-cell office:value-type="string">
            <text:p>2.99</text:p>
          </table:table-cell>
          <table:table-cell office:value-type="string">
            <text:p>1.03</text:p>
          </table:table-cell>
          <table:table-cell office:value-type="string">
            <text:p>ml</text:p>
          </table:table-cell>
          <table:table-cell office:value-type="string">
            <text:p>46</text:p>
          </table:table-cell>
          <table:table-cell office:value-type="string">
            <text:p>44</text:p>
          </table:table-cell>
          <table:table-cell office:value-type="string">
            <text:p>0.06734</text:p>
          </table:table-cell>
          <table:table-cell office:value-type="string">
            <text:p>0.22</text:p>
          </table:table-cell>
          <table:table-cell office:value-type="string">
            <text:p>ci</text:p>
          </table:table-cell>
          <table:table-cell office:value-type="string">
            <text:p>ci41291503</text:p>
          </table:table-cell>
          <table:table-cell office:value-type="string">
            <text:p>2026-07-11T16:35:27.572Z</text:p>
          </table:table-cell>
          <table:table-cell office:value-type="string">
            <text:p>6 km SE of Loma Linda, CA</text:p>
          </table:table-cell>
          <table:table-cell office:value-type="string">
            <text:p>earthquake</text:p>
          </table:table-cell>
          <table:table-cell office:value-type="string">
            <text:p>0.18</text:p>
          </table:table-cell>
          <table:table-cell office:value-type="string">
            <text:p>0.31</text:p>
          </table:table-cell>
          <table:table-cell office:value-type="string">
            <text:p>0.22221322290217</text:p>
          </table:table-cell>
          <table:table-cell office:value-type="string">
            <text:p>2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6:27:17.130Z</text:p>
          </table:table-cell>
          <table:table-cell office:value-type="string">
            <text:p>38.831665039062</text:p>
          </table:table-cell>
          <table:table-cell office:value-type="string">
            <text:p>-122.81266784668</text:p>
          </table:table-cell>
          <table:table-cell office:value-type="string">
            <text:p>1.3799999952316</text:p>
          </table:table-cell>
          <table:table-cell office:value-type="string">
            <text:p>0.85</text:p>
          </table:table-cell>
          <table:table-cell office:value-type="string">
            <text:p>md</text:p>
          </table:table-cell>
          <table:table-cell office:value-type="string">
            <text:p>20</text:p>
          </table:table-cell>
          <table:table-cell office:value-type="string">
            <text:p>51</text:p>
          </table:table-cell>
          <table:table-cell office:value-type="string">
            <text:p>0.008503</text:p>
          </table:table-cell>
          <table:table-cell office:value-type="string">
            <text:p>0.05</text:p>
          </table:table-cell>
          <table:table-cell office:value-type="string">
            <text:p>nc</text:p>
          </table:table-cell>
          <table:table-cell office:value-type="string">
            <text:p>nc75393961</text:p>
          </table:table-cell>
          <table:table-cell office:value-type="string">
            <text:p>2026-07-11T16:28:52.925Z</text:p>
          </table:table-cell>
          <table:table-cell office:value-type="string">
            <text:p>8 km NW of The Geysers, CA</text:p>
          </table:table-cell>
          <table:table-cell office:value-type="string">
            <text:p>earthquake</text:p>
          </table:table-cell>
          <table:table-cell office:value-type="string">
            <text:p>0.22</text:p>
          </table:table-cell>
          <table:table-cell office:value-type="string">
            <text:p>0.449999988</text:p>
          </table:table-cell>
          <table:table-cell office:value-type="string">
            <text:p>0.23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6:15:47.775Z</text:p>
          </table:table-cell>
          <table:table-cell office:value-type="string">
            <text:p>31.497</text:p>
          </table:table-cell>
          <table:table-cell office:value-type="string">
            <text:p>-104.323</text:p>
          </table:table-cell>
          <table:table-cell office:value-type="string">
            <text:p>0.9558</text:p>
          </table:table-cell>
          <table:table-cell office:value-type="string">
            <text:p>0.8</text:p>
          </table:table-cell>
          <table:table-cell office:value-type="string">
            <text:p>ml</text:p>
          </table:table-cell>
          <table:table-cell office:value-type="string">
            <text:p>11</text:p>
          </table:table-cell>
          <table:table-cell office:value-type="string">
            <text:p>235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tx</text:p>
          </table:table-cell>
          <table:table-cell office:value-type="string">
            <text:p>tx2026nnwavf</text:p>
          </table:table-cell>
          <table:table-cell office:value-type="string">
            <text:p>2026-07-11T17:01:58.645Z</text:p>
          </table:table-cell>
          <table:table-cell office:value-type="string">
            <text:p>54 km W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3.5567150115967</text:p>
          </table:table-cell>
          <table:table-cell office:value-type="string">
            <text:p>0.2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6:10:28.460Z</text:p>
          </table:table-cell>
          <table:table-cell office:value-type="string">
            <text:p>38.833667755127</text:p>
          </table:table-cell>
          <table:table-cell office:value-type="string">
            <text:p>-122.79650115967</text:p>
          </table:table-cell>
          <table:table-cell office:value-type="string">
            <text:p>2.079999923706</text:p>
          </table:table-cell>
          <table:table-cell office:value-type="string">
            <text:p>0.75</text:p>
          </table:table-cell>
          <table:table-cell office:value-type="string">
            <text:p>md</text:p>
          </table:table-cell>
          <table:table-cell office:value-type="string">
            <text:p>13</text:p>
          </table:table-cell>
          <table:table-cell office:value-type="string">
            <text:p>68</text:p>
          </table:table-cell>
          <table:table-cell office:value-type="string">
            <text:p>0.006748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3956</text:p>
          </table:table-cell>
          <table:table-cell office:value-type="string">
            <text:p>2026-07-11T16:12:03.442Z</text:p>
          </table:table-cell>
          <table:table-cell office:value-type="string">
            <text:p>6 km WNW of Cobb, CA</text:p>
          </table:table-cell>
          <table:table-cell office:value-type="string">
            <text:p>earthquake</text:p>
          </table:table-cell>
          <table:table-cell office:value-type="string">
            <text:p>0.31</text:p>
          </table:table-cell>
          <table:table-cell office:value-type="string">
            <text:p>0.550000012</text:p>
          </table:table-cell>
          <table:table-cell office:value-type="string">
            <text:p>0.19</text:p>
          </table:table-cell>
          <table:table-cell office:value-type="string">
            <text:p>14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6:08:33.681Z</text:p>
          </table:table-cell>
          <table:table-cell office:value-type="string">
            <text:p>31.524</text:p>
          </table:table-cell>
          <table:table-cell office:value-type="string">
            <text:p>-104.16</text:p>
          </table:table-cell>
          <table:table-cell office:value-type="string">
            <text:p>3.9324</text:p>
          </table:table-cell>
          <table:table-cell office:value-type="string">
            <text:p>1.4</text:p>
          </table:table-cell>
          <table:table-cell office:value-type="string">
            <text:p>ml</text:p>
          </table:table-cell>
          <table:table-cell office:value-type="string">
            <text:p>29</text:p>
          </table:table-cell>
          <table:table-cell office:value-type="string">
            <text:p>73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vutc</text:p>
          </table:table-cell>
          <table:table-cell office:value-type="string">
            <text:p>2026-07-11T16:11:49.160Z</text:p>
          </table:table-cell>
          <table:table-cell office:value-type="string">
            <text:p>41 km W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1252797842026</text:p>
          </table:table-cell>
          <table:table-cell office:value-type="string">
            <text:p>0.3</text:p>
          </table:table-cell>
          <table:table-cell office:value-type="string">
            <text:p>20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6:00:56.276Z</text:p>
          </table:table-cell>
          <table:table-cell office:value-type="string">
            <text:p>63.131</text:p>
          </table:table-cell>
          <table:table-cell office:value-type="string">
            <text:p>-150.362</text:p>
          </table:table-cell>
          <table:table-cell office:value-type="string">
            <text:p>107.6</text:p>
          </table:table-cell>
          <table:table-cell office:value-type="string">
            <text:p>3.6</text:p>
          </table:table-cell>
          <table:table-cell office:value-type="string">
            <text:p>ml</text:p>
          </table:table-cell>
          <table:table-cell office:value-type="string">
            <text:p>192</text:p>
          </table:table-cell>
          <table:table-cell office:value-type="string">
            <text:p>25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qafsx</text:p>
          </table:table-cell>
          <table:table-cell office:value-type="string">
            <text:p>2026-07-12T00:28:37.236Z</text:p>
          </table:table-cell>
          <table:table-cell office:value-type="string">
            <text:p>73 km NNE of Petersville, Alaska</text:p>
          </table:table-cell>
          <table:table-cell office:value-type="string">
            <text:p>earthquake</text:p>
          </table:table-cell>
          <table:table-cell office:value-type="string">
            <text:p>1.9</text:p>
          </table:table-cell>
          <table:table-cell office:value-type="string">
            <text:p>2.1432</text:p>
          </table:table-cell>
          <table:table-cell office:value-type="string">
            <text:p>0.2</text:p>
          </table:table-cell>
          <table:table-cell office:value-type="string">
            <text:p>132</text:p>
          </table:table-cell>
          <table:table-cell office:value-type="string">
            <text:p>reviewed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5:57:06.090Z</text:p>
          </table:table-cell>
          <table:table-cell office:value-type="string">
            <text:p>38.832000732422</text:p>
          </table:table-cell>
          <table:table-cell office:value-type="string">
            <text:p>-122.79233551025</text:p>
          </table:table-cell>
          <table:table-cell office:value-type="string">
            <text:p>1.7000000476837</text:p>
          </table:table-cell>
          <table:table-cell office:value-type="string">
            <text:p>1.03</text:p>
          </table:table-cell>
          <table:table-cell office:value-type="string">
            <text:p>md</text:p>
          </table:table-cell>
          <table:table-cell office:value-type="string">
            <text:p>13</text:p>
          </table:table-cell>
          <table:table-cell office:value-type="string">
            <text:p>74</text:p>
          </table:table-cell>
          <table:table-cell office:value-type="string">
            <text:p>0.006585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3951</text:p>
          </table:table-cell>
          <table:table-cell office:value-type="string">
            <text:p>2026-07-11T15:58:43.652Z</text:p>
          </table:table-cell>
          <table:table-cell office:value-type="string">
            <text:p>6 km W of Cobb, CA</text:p>
          </table:table-cell>
          <table:table-cell office:value-type="string">
            <text:p>earthquake</text:p>
          </table:table-cell>
          <table:table-cell office:value-type="string">
            <text:p>0.28</text:p>
          </table:table-cell>
          <table:table-cell office:value-type="string">
            <text:p>0.600000024</text:p>
          </table:table-cell>
          <table:table-cell office:value-type="string">
            <text:p>0.24</text:p>
          </table:table-cell>
          <table:table-cell office:value-type="string">
            <text:p>13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5:56:56.740Z</text:p>
          </table:table-cell>
          <table:table-cell office:value-type="string">
            <text:p>31.528</text:p>
          </table:table-cell>
          <table:table-cell office:value-type="string">
            <text:p>-104.156</text:p>
          </table:table-cell>
          <table:table-cell office:value-type="string">
            <text:p>4.4623</text:p>
          </table:table-cell>
          <table:table-cell office:value-type="string">
            <text:p>1.6</text:p>
          </table:table-cell>
          <table:table-cell office:value-type="string">
            <text:p>ml</text:p>
          </table:table-cell>
          <table:table-cell office:value-type="string">
            <text:p>31</text:p>
          </table:table-cell>
          <table:table-cell office:value-type="string">
            <text:p>73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vkis</text:p>
          </table:table-cell>
          <table:table-cell office:value-type="string">
            <text:p>2026-07-11T17:00:31.770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0636415481567</text:p>
          </table:table-cell>
          <table:table-cell office:value-type="string">
            <text:p>0.2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5:51:57.930Z</text:p>
          </table:table-cell>
          <table:table-cell office:value-type="string">
            <text:p>33.490833333333</text:p>
          </table:table-cell>
          <table:table-cell office:value-type="string">
            <text:p>-116.44116666667</text:p>
          </table:table-cell>
          <table:table-cell office:value-type="string">
            <text:p>13.7</text:p>
          </table:table-cell>
          <table:table-cell office:value-type="string">
            <text:p>0.52</text:p>
          </table:table-cell>
          <table:table-cell office:value-type="string">
            <text:p>ml</text:p>
          </table:table-cell>
          <table:table-cell office:value-type="string">
            <text:p>24</text:p>
          </table:table-cell>
          <table:table-cell office:value-type="string">
            <text:p>75</text:p>
          </table:table-cell>
          <table:table-cell office:value-type="string">
            <text:p>0.1346</text:p>
          </table:table-cell>
          <table:table-cell office:value-type="string">
            <text:p>0.17</text:p>
          </table:table-cell>
          <table:table-cell office:value-type="string">
            <text:p>ci</text:p>
          </table:table-cell>
          <table:table-cell office:value-type="string">
            <text:p>ci41291463</text:p>
          </table:table-cell>
          <table:table-cell office:value-type="string">
            <text:p>2026-07-11T15:55:28.908Z</text:p>
          </table:table-cell>
          <table:table-cell office:value-type="string">
            <text:p>23 km ESE of Anza, CA</text:p>
          </table:table-cell>
          <table:table-cell office:value-type="string">
            <text:p>earthquake</text:p>
          </table:table-cell>
          <table:table-cell office:value-type="string">
            <text:p>0.23</text:p>
          </table:table-cell>
          <table:table-cell office:value-type="string">
            <text:p>0.7</text:p>
          </table:table-cell>
          <table:table-cell office:value-type="string">
            <text:p>0.1687559641784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5:49:20.857Z</text:p>
          </table:table-cell>
          <table:table-cell office:value-type="string">
            <text:p>31.526</text:p>
          </table:table-cell>
          <table:table-cell office:value-type="string">
            <text:p>-104.164</text:p>
          </table:table-cell>
          <table:table-cell office:value-type="string">
            <text:p>3.7249</text:p>
          </table:table-cell>
          <table:table-cell office:value-type="string">
            <text:p>2.1</text:p>
          </table:table-cell>
          <table:table-cell office:value-type="string">
            <text:p>ml</text:p>
          </table:table-cell>
          <table:table-cell office:value-type="string">
            <text:p>40</text:p>
          </table:table-cell>
          <table:table-cell office:value-type="string">
            <text:p>74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veeg</text:p>
          </table:table-cell>
          <table:table-cell office:value-type="string">
            <text:p>2026-07-11T16:01:13.655Z</text:p>
          </table:table-cell>
          <table:table-cell office:value-type="string">
            <text:p>42 km W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0.99801301956177</text:p>
          </table:table-cell>
          <table:table-cell office:value-type="string">
            <text:p>0.3</text:p>
          </table:table-cell>
          <table:table-cell office:value-type="string">
            <text:p>28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5:45:37.136Z</text:p>
          </table:table-cell>
          <table:table-cell office:value-type="string">
            <text:p>31.547</text:p>
          </table:table-cell>
          <table:table-cell office:value-type="string">
            <text:p>-104.139</text:p>
          </table:table-cell>
          <table:table-cell office:value-type="string">
            <text:p>9.599</text:p>
          </table:table-cell>
          <table:table-cell office:value-type="string">
            <text:p>2.8</text:p>
          </table:table-cell>
          <table:table-cell office:value-type="string">
            <text:p>ml</text:p>
          </table:table-cell>
          <table:table-cell office:value-type="string">
            <text:p>36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0.1</text:p>
          </table:table-cell>
          <table:table-cell office:value-type="string">
            <text:p>tx</text:p>
          </table:table-cell>
          <table:table-cell office:value-type="string">
            <text:p>tx2026nnvatr</text:p>
          </table:table-cell>
          <table:table-cell office:value-type="string">
            <text:p>2026-07-11T16:04:18.618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.47612658560188</text:p>
          </table:table-cell>
          <table:table-cell office:value-type="string">
            <text:p>0.40924767441012</text:p>
          </table:table-cell>
          <table:table-cell office:value-type="string">
            <text:p>0.2</text:p>
          </table:table-cell>
          <table:table-cell office:value-type="string">
            <text:p>29</text:p>
          </table:table-cell>
          <table:table-cell office:value-type="string">
            <text:p>reviewed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5:43:51.790Z</text:p>
          </table:table-cell>
          <table:table-cell office:value-type="string">
            <text:p>33.476</text:p>
          </table:table-cell>
          <table:table-cell office:value-type="string">
            <text:p>-116.4515</text:p>
          </table:table-cell>
          <table:table-cell office:value-type="string">
            <text:p>13.02</text:p>
          </table:table-cell>
          <table:table-cell office:value-type="string">
            <text:p>0.62</text:p>
          </table:table-cell>
          <table:table-cell office:value-type="string">
            <text:p>ml</text:p>
          </table:table-cell>
          <table:table-cell office:value-type="string">
            <text:p>18</text:p>
          </table:table-cell>
          <table:table-cell office:value-type="string">
            <text:p>71</text:p>
          </table:table-cell>
          <table:table-cell office:value-type="string">
            <text:p>0.1273</text:p>
          </table:table-cell>
          <table:table-cell office:value-type="string">
            <text:p>0.11</text:p>
          </table:table-cell>
          <table:table-cell office:value-type="string">
            <text:p>ci</text:p>
          </table:table-cell>
          <table:table-cell office:value-type="string">
            <text:p>ci41291455</text:p>
          </table:table-cell>
          <table:table-cell office:value-type="string">
            <text:p>2026-07-11T15:47:24.767Z</text:p>
          </table:table-cell>
          <table:table-cell office:value-type="string">
            <text:p>22 km ESE of Anza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58</text:p>
          </table:table-cell>
          <table:table-cell office:value-type="string">
            <text:p>0.27878776532105</text:p>
          </table:table-cell>
          <table:table-cell office:value-type="string">
            <text:p>10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5:36:45.760Z</text:p>
          </table:table-cell>
          <table:table-cell office:value-type="string">
            <text:p>33.3745</text:p>
          </table:table-cell>
          <table:table-cell office:value-type="string">
            <text:p>-116.42283333333</text:p>
          </table:table-cell>
          <table:table-cell office:value-type="string">
            <text:p>10.27</text:p>
          </table:table-cell>
          <table:table-cell office:value-type="string">
            <text:p>1.08</text:p>
          </table:table-cell>
          <table:table-cell office:value-type="string">
            <text:p>ml</text:p>
          </table:table-cell>
          <table:table-cell office:value-type="string">
            <text:p>61</text:p>
          </table:table-cell>
          <table:table-cell office:value-type="string">
            <text:p>41</text:p>
          </table:table-cell>
          <table:table-cell office:value-type="string">
            <text:p>0.06665</text:p>
          </table:table-cell>
          <table:table-cell office:value-type="string">
            <text:p>0.22</text:p>
          </table:table-cell>
          <table:table-cell office:value-type="string">
            <text:p>ci</text:p>
          </table:table-cell>
          <table:table-cell office:value-type="string">
            <text:p>ci41291447</text:p>
          </table:table-cell>
          <table:table-cell office:value-type="string">
            <text:p>2026-07-11T15:40:07.036Z</text:p>
          </table:table-cell>
          <table:table-cell office:value-type="string">
            <text:p>14 km NNW of Borrego Springs, CA</text:p>
          </table:table-cell>
          <table:table-cell office:value-type="string">
            <text:p>earthquake</text:p>
          </table:table-cell>
          <table:table-cell office:value-type="string">
            <text:p>0.17</text:p>
          </table:table-cell>
          <table:table-cell office:value-type="string">
            <text:p>0.37</text:p>
          </table:table-cell>
          <table:table-cell office:value-type="string">
            <text:p>0.22897416435112</text:p>
          </table:table-cell>
          <table:table-cell office:value-type="string">
            <text:p>28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5:33:52.940Z</text:p>
          </table:table-cell>
          <table:table-cell office:value-type="string">
            <text:p>19.222499847412</text:p>
          </table:table-cell>
          <table:table-cell office:value-type="string">
            <text:p>-155.24349975586</text:p>
          </table:table-cell>
          <table:table-cell office:value-type="string">
            <text:p>44.29999923706</text:p>
          </table:table-cell>
          <table:table-cell office:value-type="string">
            <text:p>1.78</text:p>
          </table:table-cell>
          <table:table-cell office:value-type="string">
            <text:p>md</text:p>
          </table:table-cell>
          <table:table-cell office:value-type="string">
            <text:p>17</text:p>
          </table:table-cell>
          <table:table-cell office:value-type="string">
            <text:p>254</text:p>
          </table:table-cell>
          <table:table-cell office:value-type="string">
            <text:p>0.09506</text:p>
          </table:table-cell>
          <table:table-cell office:value-type="string">
            <text:p>0.109999999</text:p>
          </table:table-cell>
          <table:table-cell office:value-type="string">
            <text:p>hv</text:p>
          </table:table-cell>
          <table:table-cell office:value-type="string">
            <text:p>hv75000846</text:p>
          </table:table-cell>
          <table:table-cell office:value-type="string">
            <text:p>2026-07-11T15:37:17.020Z</text:p>
          </table:table-cell>
          <table:table-cell office:value-type="string">
            <text:p>24 km S of Volcano, Hawaii</text:p>
          </table:table-cell>
          <table:table-cell office:value-type="string">
            <text:p>earthquake</text:p>
          </table:table-cell>
          <table:table-cell office:value-type="string">
            <text:p>1.28</text:p>
          </table:table-cell>
          <table:table-cell office:value-type="string">
            <text:p>0.910000026</text:p>
          </table:table-cell>
          <table:table-cell office:value-type="string">
            <text:p>0.13222933971278</text:p>
          </table:table-cell>
          <table:table-cell office:value-type="string">
            <text:p>16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15:33:17.598Z</text:p>
          </table:table-cell>
          <table:table-cell office:value-type="string">
            <text:p>-15.3141</text:p>
          </table:table-cell>
          <table:table-cell office:value-type="string">
            <text:p>-173.293</text:p>
          </table:table-cell>
          <table:table-cell office:value-type="string">
            <text:p>10</text:p>
          </table:table-cell>
          <table:table-cell office:value-type="string">
            <text:p>5.1</text:p>
          </table:table-cell>
          <table:table-cell office:value-type="string">
            <text:p>mb</text:p>
          </table:table-cell>
          <table:table-cell office:value-type="string">
            <text:p>58</text:p>
          </table:table-cell>
          <table:table-cell office:value-type="string">
            <text:p>129</text:p>
          </table:table-cell>
          <table:table-cell office:value-type="string">
            <text:p>19.596</text:p>
          </table:table-cell>
          <table:table-cell office:value-type="string">
            <text:p>1.07</text:p>
          </table:table-cell>
          <table:table-cell office:value-type="string">
            <text:p>us</text:p>
          </table:table-cell>
          <table:table-cell office:value-type="string">
            <text:p>us7000szr0</text:p>
          </table:table-cell>
          <table:table-cell office:value-type="string">
            <text:p>2026-07-11T16:20:11.040Z</text:p>
          </table:table-cell>
          <table:table-cell office:value-type="string">
            <text:p>89 km NE of Hihifo, Tonga</text:p>
          </table:table-cell>
          <table:table-cell office:value-type="string">
            <text:p>earthquake</text:p>
          </table:table-cell>
          <table:table-cell office:value-type="string">
            <text:p>15.14</text:p>
          </table:table-cell>
          <table:table-cell office:value-type="string">
            <text:p>1.828</text:p>
          </table:table-cell>
          <table:table-cell office:value-type="string">
            <text:p>0.029</text:p>
          </table:table-cell>
          <table:table-cell office:value-type="string">
            <text:p>392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15:23:59.963Z</text:p>
          </table:table-cell>
          <table:table-cell office:value-type="string">
            <text:p>60.666</text:p>
          </table:table-cell>
          <table:table-cell office:value-type="string">
            <text:p>-147.711</text:p>
          </table:table-cell>
          <table:table-cell office:value-type="string">
            <text:p>19.2</text:p>
          </table:table-cell>
          <table:table-cell office:value-type="string">
            <text:p>1.4</text:p>
          </table:table-cell>
          <table:table-cell office:value-type="string">
            <text:p>ml</text:p>
          </table:table-cell>
          <table:table-cell office:value-type="string">
            <text:p>13</text:p>
          </table:table-cell>
          <table:table-cell office:value-type="string">
            <text:p>92</text:p>
          </table:table-cell>
          <table:table-cell office:value-type="string">
            <text:p>0.3</text:p>
          </table:table-cell>
          <table:table-cell office:value-type="string">
            <text:p>0.8</text:p>
          </table:table-cell>
          <table:table-cell office:value-type="string">
            <text:p>ak</text:p>
          </table:table-cell>
          <table:table-cell office:value-type="string">
            <text:p>aka2026npyzsi</text:p>
          </table:table-cell>
          <table:table-cell office:value-type="string">
            <text:p>2026-07-11T15:25:14.139Z</text:p>
          </table:table-cell>
          <table:table-cell office:value-type="string">
            <text:p>54 km ESE of Whittier, Alaska</text:p>
          </table:table-cell>
          <table:table-cell office:value-type="string">
            <text:p>earthquake</text:p>
          </table:table-cell>
          <table:table-cell office:value-type="string">
            <text:p>4.7</text:p>
          </table:table-cell>
          <table:table-cell office:value-type="string">
            <text:p>3.3408</text:p>
          </table:table-cell>
          <table:table-cell office:value-type="string">
            <text:p>0.1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5:20:27.190Z</text:p>
          </table:table-cell>
          <table:table-cell office:value-type="string">
            <text:p>34.141</text:p>
          </table:table-cell>
          <table:table-cell office:value-type="string">
            <text:p>-116.72666666667</text:p>
          </table:table-cell>
          <table:table-cell office:value-type="string">
            <text:p>4.44</text:p>
          </table:table-cell>
          <table:table-cell office:value-type="string">
            <text:p>1.94</text:p>
          </table:table-cell>
          <table:table-cell office:value-type="string">
            <text:p>ml</text:p>
          </table:table-cell>
          <table:table-cell office:value-type="string">
            <text:p>72</text:p>
          </table:table-cell>
          <table:table-cell office:value-type="string">
            <text:p>30</text:p>
          </table:table-cell>
          <table:table-cell office:value-type="string">
            <text:p>0.1213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431</text:p>
          </table:table-cell>
          <table:table-cell office:value-type="string">
            <text:p>2026-07-11T15:31:34.610Z</text:p>
          </table:table-cell>
          <table:table-cell office:value-type="string">
            <text:p>17 km NW of Morongo Valley, CA</text:p>
          </table:table-cell>
          <table:table-cell office:value-type="string">
            <text:p>earthquake</text:p>
          </table:table-cell>
          <table:table-cell office:value-type="string">
            <text:p>0.11</text:p>
          </table:table-cell>
          <table:table-cell office:value-type="string">
            <text:p>0.62</text:p>
          </table:table-cell>
          <table:table-cell office:value-type="string">
            <text:p>0.14901934221882</text:p>
          </table:table-cell>
          <table:table-cell office:value-type="string">
            <text:p>25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5:19:19.400Z</text:p>
          </table:table-cell>
          <table:table-cell office:value-type="string">
            <text:p>35.307666666667</text:p>
          </table:table-cell>
          <table:table-cell office:value-type="string">
            <text:p>-117.81483333333</text:p>
          </table:table-cell>
          <table:table-cell office:value-type="string">
            <text:p>7.74</text:p>
          </table:table-cell>
          <table:table-cell office:value-type="string">
            <text:p>0.79</text:p>
          </table:table-cell>
          <table:table-cell office:value-type="string">
            <text:p>ml</text:p>
          </table:table-cell>
          <table:table-cell office:value-type="string">
            <text:p>23</text:p>
          </table:table-cell>
          <table:table-cell office:value-type="string">
            <text:p>95</text:p>
          </table:table-cell>
          <table:table-cell office:value-type="string">
            <text:p>0.04748</text:p>
          </table:table-cell>
          <table:table-cell office:value-type="string">
            <text:p>0.21</text:p>
          </table:table-cell>
          <table:table-cell office:value-type="string">
            <text:p>ci</text:p>
          </table:table-cell>
          <table:table-cell office:value-type="string">
            <text:p>ci41291423</text:p>
          </table:table-cell>
          <table:table-cell office:value-type="string">
            <text:p>2026-07-11T15:22:46.267Z</text:p>
          </table:table-cell>
          <table:table-cell office:value-type="string">
            <text:p>18 km WSW of Johannesburg, CA</text:p>
          </table:table-cell>
          <table:table-cell office:value-type="string">
            <text:p>earthquake</text:p>
          </table:table-cell>
          <table:table-cell office:value-type="string">
            <text:p>0.31</text:p>
          </table:table-cell>
          <table:table-cell office:value-type="string">
            <text:p>0.61</text:p>
          </table:table-cell>
          <table:table-cell office:value-type="string">
            <text:p>0.2734603919414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5:18:41.810Z</text:p>
          </table:table-cell>
          <table:table-cell office:value-type="string">
            <text:p>38.799499511719</text:p>
          </table:table-cell>
          <table:table-cell office:value-type="string">
            <text:p>-122.76899719238</text:p>
          </table:table-cell>
          <table:table-cell office:value-type="string">
            <text:p>3.4500000476837</text:p>
          </table:table-cell>
          <table:table-cell office:value-type="string">
            <text:p>0.93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145</text:p>
          </table:table-cell>
          <table:table-cell office:value-type="string">
            <text:p>0.01608</text:p>
          </table:table-cell>
          <table:table-cell office:value-type="string">
            <text:p>0.01</text:p>
          </table:table-cell>
          <table:table-cell office:value-type="string">
            <text:p>nc</text:p>
          </table:table-cell>
          <table:table-cell office:value-type="string">
            <text:p>nc75393936</text:p>
          </table:table-cell>
          <table:table-cell office:value-type="string">
            <text:p>2026-07-11T15:20:18.441Z</text:p>
          </table:table-cell>
          <table:table-cell office:value-type="string">
            <text:p>3 km NNW of The Geysers, CA</text:p>
          </table:table-cell>
          <table:table-cell office:value-type="string">
            <text:p>earthquake</text:p>
          </table:table-cell>
          <table:table-cell office:value-type="string">
            <text:p>0.7</text:p>
          </table:table-cell>
          <table:table-cell office:value-type="string">
            <text:p>2.54999995</text:p>
          </table:table-cell>
          <table:table-cell office:value-type="string">
            <text:p>0.23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5:15:36.120Z</text:p>
          </table:table-cell>
          <table:table-cell office:value-type="string">
            <text:p>61.089</text:p>
          </table:table-cell>
          <table:table-cell office:value-type="string">
            <text:p>-147.708</text:p>
          </table:table-cell>
          <table:table-cell office:value-type="string">
            <text:p>26.9</text:p>
          </table:table-cell>
          <table:table-cell office:value-type="string">
            <text:p>0.4</text:p>
          </table:table-cell>
          <table:table-cell office:value-type="string">
            <text:p>ml</text:p>
          </table:table-cell>
          <table:table-cell office:value-type="string">
            <text:p>7</text:p>
          </table:table-cell>
          <table:table-cell office:value-type="string">
            <text:p>20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ak</text:p>
          </table:table-cell>
          <table:table-cell office:value-type="string">
            <text:p>aka2026npysli</text:p>
          </table:table-cell>
          <table:table-cell office:value-type="string">
            <text:p>2026-07-11T15:16:44.639Z</text:p>
          </table:table-cell>
          <table:table-cell office:value-type="string">
            <text:p>61 km WNW of Tatitlek, Alaska</text:p>
          </table:table-cell>
          <table:table-cell office:value-type="string">
            <text:p>earthquake</text:p>
          </table:table-cell>
          <table:table-cell office:value-type="string">
            <text:p>23.1</text:p>
          </table:table-cell>
          <table:table-cell office:value-type="string">
            <text:p>6.1591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4:54:28.718Z</text:p>
          </table:table-cell>
          <table:table-cell office:value-type="string">
            <text:p>55.993</text:p>
          </table:table-cell>
          <table:table-cell office:value-type="string">
            <text:p>-159.68</text:p>
          </table:table-cell>
          <table:table-cell office:value-type="string">
            <text:p>5</text:p>
          </table:table-cell>
          <table:table-cell office:value-type="string">
            <text:p>1.2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305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ak</text:p>
          </table:table-cell>
          <table:table-cell office:value-type="string">
            <text:p>aka2026npyacz</text:p>
          </table:table-cell>
          <table:table-cell office:value-type="string">
            <text:p>2026-07-11T14:55:33.627Z</text:p>
          </table:table-cell>
          <table:table-cell office:value-type="string">
            <text:p>15 km NW of Ivanof Bay, Alaska</text:p>
          </table:table-cell>
          <table:table-cell office:value-type="string">
            <text:p>earthquake</text:p>
          </table:table-cell>
          <table:table-cell office:value-type="string">
            <text:p>84.2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4:39:17.350Z</text:p>
          </table:table-cell>
          <table:table-cell office:value-type="string">
            <text:p>33.382333333333</text:p>
          </table:table-cell>
          <table:table-cell office:value-type="string">
            <text:p>-116.39733333333</text:p>
          </table:table-cell>
          <table:table-cell office:value-type="string">
            <text:p>10.63</text:p>
          </table:table-cell>
          <table:table-cell office:value-type="string">
            <text:p>0.36</text:p>
          </table:table-cell>
          <table:table-cell office:value-type="string">
            <text:p>ml</text:p>
          </table:table-cell>
          <table:table-cell office:value-type="string">
            <text:p>21</text:p>
          </table:table-cell>
          <table:table-cell office:value-type="string">
            <text:p>69</text:p>
          </table:table-cell>
          <table:table-cell office:value-type="string">
            <text:p>0.06094</text:p>
          </table:table-cell>
          <table:table-cell office:value-type="string">
            <text:p>0.11</text:p>
          </table:table-cell>
          <table:table-cell office:value-type="string">
            <text:p>ci</text:p>
          </table:table-cell>
          <table:table-cell office:value-type="string">
            <text:p>ci41291399</text:p>
          </table:table-cell>
          <table:table-cell office:value-type="string">
            <text:p>2026-07-11T14:42:47.649Z</text:p>
          </table:table-cell>
          <table:table-cell office:value-type="string">
            <text:p>14 km N of Borrego Springs, CA</text:p>
          </table:table-cell>
          <table:table-cell office:value-type="string">
            <text:p>earthquake</text:p>
          </table:table-cell>
          <table:table-cell office:value-type="string">
            <text:p>0.2</text:p>
          </table:table-cell>
          <table:table-cell office:value-type="string">
            <text:p>0.45</text:p>
          </table:table-cell>
          <table:table-cell office:value-type="string">
            <text:p>0.11571066586844</text:p>
          </table:table-cell>
          <table:table-cell office:value-type="string">
            <text:p>7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4:31:54.390Z</text:p>
          </table:table-cell>
          <table:table-cell office:value-type="string">
            <text:p>33.680666666667</text:p>
          </table:table-cell>
          <table:table-cell office:value-type="string">
            <text:p>-116.76766666667</text:p>
          </table:table-cell>
          <table:table-cell office:value-type="string">
            <text:p>19.32</text:p>
          </table:table-cell>
          <table:table-cell office:value-type="string">
            <text:p>0.4</text:p>
          </table:table-cell>
          <table:table-cell office:value-type="string">
            <text:p>ml</text:p>
          </table:table-cell>
          <table:table-cell office:value-type="string">
            <text:p>17</text:p>
          </table:table-cell>
          <table:table-cell office:value-type="string">
            <text:p>63</text:p>
          </table:table-cell>
          <table:table-cell office:value-type="string">
            <text:p>0.07875</text:p>
          </table:table-cell>
          <table:table-cell office:value-type="string">
            <text:p>0.12</text:p>
          </table:table-cell>
          <table:table-cell office:value-type="string">
            <text:p>ci</text:p>
          </table:table-cell>
          <table:table-cell office:value-type="string">
            <text:p>ci41291391</text:p>
          </table:table-cell>
          <table:table-cell office:value-type="string">
            <text:p>2026-07-11T14:35:13.788Z</text:p>
          </table:table-cell>
          <table:table-cell office:value-type="string">
            <text:p>8 km SW of Idyllwild, CA</text:p>
          </table:table-cell>
          <table:table-cell office:value-type="string">
            <text:p>earthquake</text:p>
          </table:table-cell>
          <table:table-cell office:value-type="string">
            <text:p>0.34</text:p>
          </table:table-cell>
          <table:table-cell office:value-type="string">
            <text:p>0.67</text:p>
          </table:table-cell>
          <table:table-cell office:value-type="string">
            <text:p>0.17297447030708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4:29:55.220Z</text:p>
          </table:table-cell>
          <table:table-cell office:value-type="string">
            <text:p>35.309666666667</text:p>
          </table:table-cell>
          <table:table-cell office:value-type="string">
            <text:p>-118.52983333333</text:p>
          </table:table-cell>
          <table:table-cell office:value-type="string">
            <text:p>3.43</text:p>
          </table:table-cell>
          <table:table-cell office:value-type="string">
            <text:p>1.19</text:p>
          </table:table-cell>
          <table:table-cell office:value-type="string">
            <text:p>ml</text:p>
          </table:table-cell>
          <table:table-cell office:value-type="string">
            <text:p>38</text:p>
          </table:table-cell>
          <table:table-cell office:value-type="string">
            <text:p>68</text:p>
          </table:table-cell>
          <table:table-cell office:value-type="string">
            <text:p>0.09106</text:p>
          </table:table-cell>
          <table:table-cell office:value-type="string">
            <text:p>0.17</text:p>
          </table:table-cell>
          <table:table-cell office:value-type="string">
            <text:p>ci</text:p>
          </table:table-cell>
          <table:table-cell office:value-type="string">
            <text:p>ci41291383</text:p>
          </table:table-cell>
          <table:table-cell office:value-type="string">
            <text:p>2026-07-11T14:33:27.582Z</text:p>
          </table:table-cell>
          <table:table-cell office:value-type="string">
            <text:p>21 km NNW of Tehachapi, CA</text:p>
          </table:table-cell>
          <table:table-cell office:value-type="string">
            <text:p>earthquake</text:p>
          </table:table-cell>
          <table:table-cell office:value-type="string">
            <text:p>0.18</text:p>
          </table:table-cell>
          <table:table-cell office:value-type="string">
            <text:p>0.8</text:p>
          </table:table-cell>
          <table:table-cell office:value-type="string">
            <text:p>0.17133901645391</text:p>
          </table:table-cell>
          <table:table-cell office:value-type="string">
            <text:p>20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4:16:18.470Z</text:p>
          </table:table-cell>
          <table:table-cell office:value-type="string">
            <text:p>30.574</text:p>
          </table:table-cell>
          <table:table-cell office:value-type="string">
            <text:p>-103.60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ml</text:p>
          </table:table-cell>
          <table:table-cell office:value-type="string">
            <text:p>7</text:p>
          </table:table-cell>
          <table:table-cell office:value-type="string">
            <text:p>148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tx</text:p>
          </table:table-cell>
          <table:table-cell office:value-type="string">
            <text:p>tx2026nnsbzz</text:p>
          </table:table-cell>
          <table:table-cell office:value-type="string">
            <text:p>2026-07-11T14:20:31.487Z</text:p>
          </table:table-cell>
          <table:table-cell office:value-type="string">
            <text:p>24 km NNE of Alpine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.9</text:p>
          </table:table-cell>
          <table:table-cell office:value-type="string">
            <text:p>7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4:10:41.960Z</text:p>
          </table:table-cell>
          <table:table-cell office:value-type="string">
            <text:p>38.842666625977</text:p>
          </table:table-cell>
          <table:table-cell office:value-type="string">
            <text:p>-122.88200378418</text:p>
          </table:table-cell>
          <table:table-cell office:value-type="string">
            <text:p>2.670000076294</text:p>
          </table:table-cell>
          <table:table-cell office:value-type="string">
            <text:p>0.24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182</text:p>
          </table:table-cell>
          <table:table-cell office:value-type="string">
            <text:p>0.004579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3911</text:p>
          </table:table-cell>
          <table:table-cell office:value-type="string">
            <text:p>2026-07-11T14:12:18.021Z</text:p>
          </table:table-cell>
          <table:table-cell office:value-type="string">
            <text:p>12 km ENE of Cloverdale, CA</text:p>
          </table:table-cell>
          <table:table-cell office:value-type="string">
            <text:p>earthquake</text:p>
          </table:table-cell>
          <table:table-cell office:value-type="string">
            <text:p>1.25</text:p>
          </table:table-cell>
          <table:table-cell office:value-type="string">
            <text:p>1.52999997</text:p>
          </table:table-cell>
          <table:table-cell office:value-type="string">
            <text:p>0.09</text:p>
          </table:table-cell>
          <table:table-cell office:value-type="string">
            <text:p>8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3:59:43.180Z</text:p>
          </table:table-cell>
          <table:table-cell office:value-type="string">
            <text:p>40.317501068115</text:p>
          </table:table-cell>
          <table:table-cell office:value-type="string">
            <text:p>-121.96083068848</text:p>
          </table:table-cell>
          <table:table-cell office:value-type="string">
            <text:p>2.6800000667572</text:p>
          </table:table-cell>
          <table:table-cell office:value-type="string">
            <text:p>1.98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206</text:p>
          </table:table-cell>
          <table:table-cell office:value-type="string">
            <text:p>0.1555</text:p>
          </table:table-cell>
          <table:table-cell office:value-type="string">
            <text:p>0.03</text:p>
          </table:table-cell>
          <table:table-cell office:value-type="string">
            <text:p>nc</text:p>
          </table:table-cell>
          <table:table-cell office:value-type="string">
            <text:p>nc75393906</text:p>
          </table:table-cell>
          <table:table-cell office:value-type="string">
            <text:p>2026-07-11T14:32:20.993Z</text:p>
          </table:table-cell>
          <table:table-cell office:value-type="string">
            <text:p>14 km SW of Manton, CA</text:p>
          </table:table-cell>
          <table:table-cell office:value-type="string">
            <text:p>earthquake</text:p>
          </table:table-cell>
          <table:table-cell office:value-type="string">
            <text:p>0.64</text:p>
          </table:table-cell>
          <table:table-cell office:value-type="string">
            <text:p>7.6500001</text:p>
          </table:table-cell>
          <table:table-cell office:value-type="string">
            <text:p>0.16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3:49:07.235Z</text:p>
          </table:table-cell>
          <table:table-cell office:value-type="string">
            <text:p>31.257</text:p>
          </table:table-cell>
          <table:table-cell office:value-type="string">
            <text:p>-103.568</text:p>
          </table:table-cell>
          <table:table-cell office:value-type="string">
            <text:p>15.7027</text:p>
          </table:table-cell>
          <table:table-cell office:value-type="string">
            <text:p>1.7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139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reqy</text:p>
          </table:table-cell>
          <table:table-cell office:value-type="string">
            <text:p>2026-07-11T14:00:14.753Z</text:p>
          </table:table-cell>
          <table:table-cell office:value-type="string">
            <text:p>12 km SSW of Lindsay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1.774158477783</text:p>
          </table:table-cell>
          <table:table-cell office:value-type="string">
            <text:p>0.6</text:p>
          </table:table-cell>
          <table:table-cell office:value-type="string">
            <text:p>6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3:35:49.236Z</text:p>
          </table:table-cell>
          <table:table-cell office:value-type="string">
            <text:p>60.693</text:p>
          </table:table-cell>
          <table:table-cell office:value-type="string">
            <text:p>-146.638</text:p>
          </table:table-cell>
          <table:table-cell office:value-type="string">
            <text:p>24.2</text:p>
          </table:table-cell>
          <table:table-cell office:value-type="string">
            <text:p>0.8</text:p>
          </table:table-cell>
          <table:table-cell office:value-type="string">
            <text:p>ml</text:p>
          </table:table-cell>
          <table:table-cell office:value-type="string">
            <text:p>5</text:p>
          </table:table-cell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string">
            <text:p>1.1</text:p>
          </table:table-cell>
          <table:table-cell office:value-type="string">
            <text:p>ak</text:p>
          </table:table-cell>
          <table:table-cell office:value-type="string">
            <text:p>aka2026npvjxt</text:p>
          </table:table-cell>
          <table:table-cell office:value-type="string">
            <text:p>2026-07-11T13:38:52.339Z</text:p>
          </table:table-cell>
          <table:table-cell office:value-type="string">
            <text:p>19 km S of Tatitlek, Alaska</text:p>
          </table:table-cell>
          <table:table-cell office:value-type="string">
            <text:p>earthquake</text:p>
          </table:table-cell>
          <table:table-cell office:value-type="string">
            <text:p>9.4</text:p>
          </table:table-cell>
          <table:table-cell office:value-type="string">
            <text:p>5.0189</text:p>
          </table:table-cell>
          <table:table-cell office:value-type="string">
            <text:p>0.3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3:31:41.510Z</text:p>
          </table:table-cell>
          <table:table-cell office:value-type="string">
            <text:p>19.418832778931</text:p>
          </table:table-cell>
          <table:table-cell office:value-type="string">
            <text:p>-155.59700012207</text:p>
          </table:table-cell>
          <table:table-cell office:value-type="string">
            <text:p>42.639999389648</text:p>
          </table:table-cell>
          <table:table-cell office:value-type="string">
            <text:p>1.85</text:p>
          </table:table-cell>
          <table:table-cell office:value-type="string">
            <text:p>md</text:p>
          </table:table-cell>
          <table:table-cell office:value-type="string">
            <text:p>19</text:p>
          </table:table-cell>
          <table:table-cell office:value-type="string">
            <text:p>70</text:p>
          </table:table-cell>
          <table:table-cell office:value-type="string">
            <text:p>0.03302</text:p>
          </table:table-cell>
          <table:table-cell office:value-type="string">
            <text:p>0.230000004</text:p>
          </table:table-cell>
          <table:table-cell office:value-type="string">
            <text:p>hv</text:p>
          </table:table-cell>
          <table:table-cell office:value-type="string">
            <text:p>hv75000771</text:p>
          </table:table-cell>
          <table:table-cell office:value-type="string">
            <text:p>2026-07-11T13:35:17.130Z</text:p>
          </table:table-cell>
          <table:table-cell office:value-type="string">
            <text:p>26 km NNW of Pāhala, Hawaii</text:p>
          </table:table-cell>
          <table:table-cell office:value-type="string">
            <text:p>earthquake</text:p>
          </table:table-cell>
          <table:table-cell office:value-type="string">
            <text:p>0.8</text:p>
          </table:table-cell>
          <table:table-cell office:value-type="string">
            <text:p>1.39999998</text:p>
          </table:table-cell>
          <table:table-cell office:value-type="string">
            <text:p>0.14732223088128</text:p>
          </table:table-cell>
          <table:table-cell office:value-type="string">
            <text:p>17</text:p>
          </table:table-cell>
          <table:table-cell office:value-type="string">
            <text:p>automatic</text:p>
          </table:table-cell>
          <table:table-cell office:value-type="string">
            <text:p>hv</text:p>
          </table:table-cell>
          <table:table-cell office:value-type="string">
            <text:p>hv</text:p>
          </table:table-cell>
        </table:table-row>
        <table:table-row>
          <table:table-cell office:value-type="string">
            <text:p>2026-07-11T13:27:19.090Z</text:p>
          </table:table-cell>
          <table:table-cell office:value-type="string">
            <text:p>33.649833333333</text:p>
          </table:table-cell>
          <table:table-cell office:value-type="string">
            <text:p>-116.7325</text:p>
          </table:table-cell>
          <table:table-cell office:value-type="string">
            <text:p>14.9</text:p>
          </table:table-cell>
          <table:table-cell office:value-type="string">
            <text:p>0.69</text:p>
          </table:table-cell>
          <table:table-cell office:value-type="string">
            <text:p>ml</text:p>
          </table:table-cell>
          <table:table-cell office:value-type="string">
            <text:p>42</text:p>
          </table:table-cell>
          <table:table-cell office:value-type="string">
            <text:p>37</text:p>
          </table:table-cell>
          <table:table-cell office:value-type="string">
            <text:p>0.05252</text:p>
          </table:table-cell>
          <table:table-cell office:value-type="string">
            <text:p>0.17</text:p>
          </table:table-cell>
          <table:table-cell office:value-type="string">
            <text:p>ci</text:p>
          </table:table-cell>
          <table:table-cell office:value-type="string">
            <text:p>ci41291319</text:p>
          </table:table-cell>
          <table:table-cell office:value-type="string">
            <text:p>2026-07-11T13:30:38.036Z</text:p>
          </table:table-cell>
          <table:table-cell office:value-type="string">
            <text:p>10 km S of Idyllwild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34</text:p>
          </table:table-cell>
          <table:table-cell office:value-type="string">
            <text:p>0.1345855747689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3:16:35.145Z</text:p>
          </table:table-cell>
          <table:table-cell office:value-type="string">
            <text:p>64.492</text:p>
          </table:table-cell>
          <table:table-cell office:value-type="string">
            <text:p>-149.442</text:p>
          </table:table-cell>
          <table:table-cell office:value-type="string">
            <text:p>5.2</text:p>
          </table:table-cell>
          <table:table-cell office:value-type="string">
            <text:p>1.7</text:p>
          </table:table-cell>
          <table:table-cell office:value-type="string">
            <text:p>ml</text:p>
          </table:table-cell>
          <table:table-cell office:value-type="string">
            <text:p>20</text:p>
          </table:table-cell>
          <table:table-cell office:value-type="string">
            <text:p>70</text:p>
          </table:table-cell>
          <table:table-cell office:value-type="string">
            <text:p>0.2</text:p>
          </table:table-cell>
          <table:table-cell office:value-type="string">
            <text:p>0.7</text:p>
          </table:table-cell>
          <table:table-cell office:value-type="string">
            <text:p>ak</text:p>
          </table:table-cell>
          <table:table-cell office:value-type="string">
            <text:p>aka2026nputgf</text:p>
          </table:table-cell>
          <table:table-cell office:value-type="string">
            <text:p>2026-07-11T13:18:00.000Z</text:p>
          </table:table-cell>
          <table:table-cell office:value-type="string">
            <text:p>18 km WSW of Nenana, Alaska</text:p>
          </table:table-cell>
          <table:table-cell office:value-type="string">
            <text:p>earthquake</text:p>
          </table:table-cell>
          <table:table-cell office:value-type="string">
            <text:p>3.5</text:p>
          </table:table-cell>
          <table:table-cell office:value-type="string">
            <text:p>3.1825</text:p>
          </table:table-cell>
          <table:table-cell office:value-type="string">
            <text:p>0.2</text:p>
          </table:table-cell>
          <table:table-cell office:value-type="string">
            <text:p>4</text:p>
          </table:table-cell>
          <table:table-cell office:value-type="string">
            <text:p>automatic</text:p>
          </table:table-cell>
          <table:table-cell office:value-type="string">
            <text:p>ak</text:p>
          </table:table-cell>
          <table:table-cell office:value-type="string">
            <text:p>ak</text:p>
          </table:table-cell>
        </table:table-row>
        <table:table-row>
          <table:table-cell office:value-type="string">
            <text:p>2026-07-11T13:15:58.813Z</text:p>
          </table:table-cell>
          <table:table-cell office:value-type="string">
            <text:p>51.1281</text:p>
          </table:table-cell>
          <table:table-cell office:value-type="string">
            <text:p>151.3975</text:p>
          </table:table-cell>
          <table:table-cell office:value-type="string">
            <text:p>426.609</text:p>
          </table:table-cell>
          <table:table-cell office:value-type="string">
            <text:p>4.6</text:p>
          </table:table-cell>
          <table:table-cell office:value-type="string">
            <text:p>mb</text:p>
          </table:table-cell>
          <table:table-cell office:value-type="string">
            <text:p>90</text:p>
          </table:table-cell>
          <table:table-cell office:value-type="string">
            <text:p>118</text:p>
          </table:table-cell>
          <table:table-cell office:value-type="string">
            <text:p>4.36</text:p>
          </table:table-cell>
          <table:table-cell office:value-type="string">
            <text:p>0.77</text:p>
          </table:table-cell>
          <table:table-cell office:value-type="string">
            <text:p>us</text:p>
          </table:table-cell>
          <table:table-cell office:value-type="string">
            <text:p>us7000szqn</text:p>
          </table:table-cell>
          <table:table-cell office:value-type="string">
            <text:p>2026-07-11T13:36:36.040Z</text:p>
          </table:table-cell>
          <table:table-cell office:value-type="string">
            <text:p>Sea of Okhotsk</text:p>
          </table:table-cell>
          <table:table-cell office:value-type="string">
            <text:p>earthquake</text:p>
          </table:table-cell>
          <table:table-cell office:value-type="string">
            <text:p>11.72</text:p>
          </table:table-cell>
          <table:table-cell office:value-type="string">
            <text:p>8.204</text:p>
          </table:table-cell>
          <table:table-cell office:value-type="string">
            <text:p>0.025</text:p>
          </table:table-cell>
          <table:table-cell office:value-type="string">
            <text:p>487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13:10:56.450Z</text:p>
          </table:table-cell>
          <table:table-cell office:value-type="string">
            <text:p>38.80016708374</text:p>
          </table:table-cell>
          <table:table-cell office:value-type="string">
            <text:p>-122.81866455078</text:p>
          </table:table-cell>
          <table:table-cell office:value-type="string">
            <text:p>2.9400000572205</text:p>
          </table:table-cell>
          <table:table-cell office:value-type="string">
            <text:p>1.04</text:p>
          </table:table-cell>
          <table:table-cell office:value-type="string">
            <text:p>md</text:p>
          </table:table-cell>
          <table:table-cell office:value-type="string">
            <text:p>18</text:p>
          </table:table-cell>
          <table:table-cell office:value-type="string">
            <text:p>80</text:p>
          </table:table-cell>
          <table:table-cell office:value-type="string">
            <text:p>0.01196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3891</text:p>
          </table:table-cell>
          <table:table-cell office:value-type="string">
            <text:p>2026-07-11T13:12:33.471Z</text:p>
          </table:table-cell>
          <table:table-cell office:value-type="string">
            <text:p>6 km WNW of The Geysers, CA</text:p>
          </table:table-cell>
          <table:table-cell office:value-type="string">
            <text:p>earthquake</text:p>
          </table:table-cell>
          <table:table-cell office:value-type="string">
            <text:p>0.29</text:p>
          </table:table-cell>
          <table:table-cell office:value-type="string">
            <text:p>0.50999999</text:p>
          </table:table-cell>
          <table:table-cell office:value-type="string">
            <text:p>0.22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3:00:39.540Z</text:p>
          </table:table-cell>
          <table:table-cell office:value-type="string">
            <text:p>38.818332672119</text:p>
          </table:table-cell>
          <table:table-cell office:value-type="string">
            <text:p>-122.80449676514</text:p>
          </table:table-cell>
          <table:table-cell office:value-type="string">
            <text:p>2.1500000953674</text:p>
          </table:table-cell>
          <table:table-cell office:value-type="string">
            <text:p>0.45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95</text:p>
          </table:table-cell>
          <table:table-cell office:value-type="string">
            <text:p>0.006673</text:p>
          </table:table-cell>
          <table:table-cell office:value-type="string">
            <text:p>0.02</text:p>
          </table:table-cell>
          <table:table-cell office:value-type="string">
            <text:p>nc</text:p>
          </table:table-cell>
          <table:table-cell office:value-type="string">
            <text:p>nc75393881</text:p>
          </table:table-cell>
          <table:table-cell office:value-type="string">
            <text:p>2026-07-11T13:02:17.527Z</text:p>
          </table:table-cell>
          <table:table-cell office:value-type="string">
            <text:p>6 km NW of The Geysers, CA</text:p>
          </table:table-cell>
          <table:table-cell office:value-type="string">
            <text:p>earthquake</text:p>
          </table:table-cell>
          <table:table-cell office:value-type="string">
            <text:p>0.44</text:p>
          </table:table-cell>
          <table:table-cell office:value-type="string">
            <text:p>0.939999998</text:p>
          </table:table-cell>
          <table:table-cell office:value-type="string">
            <text:p>0.29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2:59:09.630Z</text:p>
          </table:table-cell>
          <table:table-cell office:value-type="string">
            <text:p>60.060333333333</text:p>
          </table:table-cell>
          <table:table-cell office:value-type="string">
            <text:p>-153.02266666667</text:p>
          </table:table-cell>
          <table:table-cell office:value-type="string">
            <text:p>1.57</text:p>
          </table:table-cell>
          <table:table-cell office:value-type="string">
            <text:p>-0.48</text:p>
          </table:table-cell>
          <table:table-cell office:value-type="string">
            <text:p>ml</text:p>
          </table:table-cell>
          <table:table-cell office:value-type="string">
            <text:p>4</text:p>
          </table:table-cell>
          <table:table-cell office:value-type="string">
            <text:p>268</text:p>
          </table:table-cell>
          <table:table-cell office:value-type="string">
            <text:p>0.02075</text:p>
          </table:table-cell>
          <table:table-cell office:value-type="string">
            <text:p>0.25</text:p>
          </table:table-cell>
          <table:table-cell office:value-type="string">
            <text:p>av</text:p>
          </table:table-cell>
          <table:table-cell office:value-type="string">
            <text:p>av94302293</text:p>
          </table:table-cell>
          <table:table-cell office:value-type="string">
            <text:p>2026-07-12T07:26:24.020Z</text:p>
          </table:table-cell>
          <table:table-cell office:value-type="string">
            <text:p>67 km ENE of Pedro Bay, Alaska</text:p>
          </table:table-cell>
          <table:table-cell office:value-type="string">
            <text:p>earthquake</text:p>
          </table:table-cell>
          <table:table-cell office:value-type="string">
            <text:p>2.09</text:p>
          </table:table-cell>
          <table:table-cell office:value-type="string">
            <text:p>0.4</text:p>
          </table:table-cell>
          <table:table-cell office:value-type="string">
            <text:p>0.25888442908321</text:p>
          </table:table-cell>
          <table:table-cell office:value-type="string">
            <text:p>4</text:p>
          </table:table-cell>
          <table:table-cell office:value-type="string">
            <text:p>reviewed</text:p>
          </table:table-cell>
          <table:table-cell office:value-type="string">
            <text:p>av</text:p>
          </table:table-cell>
          <table:table-cell office:value-type="string">
            <text:p>av</text:p>
          </table:table-cell>
        </table:table-row>
        <table:table-row>
          <table:table-cell office:value-type="string">
            <text:p>2026-07-11T12:57:33.550Z</text:p>
          </table:table-cell>
          <table:table-cell office:value-type="string">
            <text:p>34.998166666667</text:p>
          </table:table-cell>
          <table:table-cell office:value-type="string">
            <text:p>-118.47516666667</text:p>
          </table:table-cell>
          <table:table-cell office:value-type="string">
            <text:p>3.06</text:p>
          </table:table-cell>
          <table:table-cell office:value-type="string">
            <text:p>1.08</text:p>
          </table:table-cell>
          <table:table-cell office:value-type="string">
            <text:p>ml</text:p>
          </table:table-cell>
          <table:table-cell office:value-type="string">
            <text:p>42</text:p>
          </table:table-cell>
          <table:table-cell office:value-type="string">
            <text:p>38</text:p>
          </table:table-cell>
          <table:table-cell office:value-type="string">
            <text:p>0.11</text:p>
          </table:table-cell>
          <table:table-cell office:value-type="string">
            <text:p>0.15</text:p>
          </table:table-cell>
          <table:table-cell office:value-type="string">
            <text:p>ci</text:p>
          </table:table-cell>
          <table:table-cell office:value-type="string">
            <text:p>ci41291303</text:p>
          </table:table-cell>
          <table:table-cell office:value-type="string">
            <text:p>2026-07-11T13:08:02.690Z</text:p>
          </table:table-cell>
          <table:table-cell office:value-type="string">
            <text:p>15 km S of Tehachapi, CA</text:p>
          </table:table-cell>
          <table:table-cell office:value-type="string">
            <text:p>earthquake</text:p>
          </table:table-cell>
          <table:table-cell office:value-type="string">
            <text:p>0.14</text:p>
          </table:table-cell>
          <table:table-cell office:value-type="string">
            <text:p>0.5</text:p>
          </table:table-cell>
          <table:table-cell office:value-type="string">
            <text:p>0.15752216453872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2:55:27.455Z</text:p>
          </table:table-cell>
          <table:table-cell office:value-type="string">
            <text:p>31.527</text:p>
          </table:table-cell>
          <table:table-cell office:value-type="string">
            <text:p>-104.165</text:p>
          </table:table-cell>
          <table:table-cell office:value-type="string">
            <text:p>4.2412</text:p>
          </table:table-cell>
          <table:table-cell office:value-type="string">
            <text:p>2</text:p>
          </table:table-cell>
          <table:table-cell office:value-type="string">
            <text:p>ml</text:p>
          </table:table-cell>
          <table:table-cell office:value-type="string">
            <text:p>32</text:p>
          </table:table-cell>
          <table:table-cell office:value-type="string">
            <text:p>73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string">
            <text:p>tx</text:p>
          </table:table-cell>
          <table:table-cell office:value-type="string">
            <text:p>tx2026nnpkjl</text:p>
          </table:table-cell>
          <table:table-cell office:value-type="string">
            <text:p>2026-07-11T13:02:36.732Z</text:p>
          </table:table-cell>
          <table:table-cell office:value-type="string">
            <text:p>42 km W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1086893081665</text:p>
          </table:table-cell>
          <table:table-cell office:value-type="string">
            <text:p>0.2</text:p>
          </table:table-cell>
          <table:table-cell office:value-type="string">
            <text:p>19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2:55:11.910Z</text:p>
          </table:table-cell>
          <table:table-cell office:value-type="string">
            <text:p>39.877834320068</text:p>
          </table:table-cell>
          <table:table-cell office:value-type="string">
            <text:p>-123.23867034912</text:p>
          </table:table-cell>
          <table:table-cell office:value-type="string">
            <text:p>9.960000038147</text:p>
          </table:table-cell>
          <table:table-cell office:value-type="string">
            <text:p>1.87</text:p>
          </table:table-cell>
          <table:table-cell office:value-type="string">
            <text:p>md</text:p>
          </table:table-cell>
          <table:table-cell office:value-type="string">
            <text:p>16</text:p>
          </table:table-cell>
          <table:table-cell office:value-type="string">
            <text:p>55</text:p>
          </table:table-cell>
          <table:table-cell office:value-type="string">
            <text:p>0.1113</text:p>
          </table:table-cell>
          <table:table-cell office:value-type="string">
            <text:p>0.07</text:p>
          </table:table-cell>
          <table:table-cell office:value-type="string">
            <text:p>nc</text:p>
          </table:table-cell>
          <table:table-cell office:value-type="string">
            <text:p>nc75393871</text:p>
          </table:table-cell>
          <table:table-cell office:value-type="string">
            <text:p>2026-07-11T13:32:28.616Z</text:p>
          </table:table-cell>
          <table:table-cell office:value-type="string">
            <text:p>9 km N of Covelo, CA</text:p>
          </table:table-cell>
          <table:table-cell office:value-type="string">
            <text:p>earthquake</text:p>
          </table:table-cell>
          <table:table-cell office:value-type="string">
            <text:p>0.25</text:p>
          </table:table-cell>
          <table:table-cell office:value-type="string">
            <text:p>0.850000024</text:p>
          </table:table-cell>
          <table:table-cell office:value-type="string">
            <text:p>0.14</text:p>
          </table:table-cell>
          <table:table-cell office:value-type="string">
            <text:p>11</text:p>
          </table:table-cell>
          <table:table-cell office:value-type="string">
            <text:p>automatic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</table:table-row>
        <table:table-row>
          <table:table-cell office:value-type="string">
            <text:p>2026-07-11T12:55:04.953Z</text:p>
          </table:table-cell>
          <table:table-cell office:value-type="string">
            <text:p>31.535</text:p>
          </table:table-cell>
          <table:table-cell office:value-type="string">
            <text:p>-104.15</text:p>
          </table:table-cell>
          <table:table-cell office:value-type="string">
            <text:p>4.5578</text:p>
          </table:table-cell>
          <table:table-cell office:value-type="string">
            <text:p>1.8</text:p>
          </table:table-cell>
          <table:table-cell office:value-type="string">
            <text:p>ml</text:p>
          </table:table-cell>
          <table:table-cell office:value-type="string">
            <text:p>15</text:p>
          </table:table-cell>
          <table:table-cell office:value-type="string">
            <text:p>155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pkab</text:p>
          </table:table-cell>
          <table:table-cell office:value-type="string">
            <text:p>2026-07-11T12:58:49.541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1.7499680519104</text:p>
          </table:table-cell>
          <table:table-cell office:value-type="string">
            <text:p>0.3</text:p>
          </table:table-cell>
          <table:table-cell office:value-type="string">
            <text:p>13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2:55:04.817Z</text:p>
          </table:table-cell>
          <table:table-cell office:value-type="string">
            <text:p>31.538</text:p>
          </table:table-cell>
          <table:table-cell office:value-type="string">
            <text:p>-104.146</text:p>
          </table:table-cell>
          <table:table-cell office:value-type="string">
            <text:p>5.6199</text:p>
          </table:table-cell>
          <table:table-cell office:value-type="string">
            <text:p>1.8</text:p>
          </table:table-cell>
          <table:table-cell office:value-type="string">
            <text:p>ml</text:p>
          </table:table-cell>
          <table:table-cell office:value-type="string">
            <text:p>19</text:p>
          </table:table-cell>
          <table:table-cell office:value-type="string">
            <text:p>71</text:p>
          </table:table-cell>
          <table:table-cell office:value-type="string">
            <text:p>0.1</text:p>
          </table:table-cell>
          <table:table-cell office:value-type="string">
            <text:p>0.3</text:p>
          </table:table-cell>
          <table:table-cell office:value-type="string">
            <text:p>tx</text:p>
          </table:table-cell>
          <table:table-cell office:value-type="string">
            <text:p>tx2026nnpjrx</text:p>
          </table:table-cell>
          <table:table-cell office:value-type="string">
            <text:p>2026-07-11T14:00:43.292Z</text:p>
          </table:table-cell>
          <table:table-cell office:value-type="string">
            <text:p>41 km NW of Toyah, Texas</text:p>
          </table:table-cell>
          <table:table-cell office:value-type="string">
            <text:p>earthquake</text:p>
          </table:table-cell>
          <table:table-cell office:value-type="string">
            <text:p>0</text:p>
          </table:table-cell>
          <table:table-cell office:value-type="string">
            <text:p>3.7349445819855</text:p>
          </table:table-cell>
          <table:table-cell office:value-type="string">
            <text:p>0.2</text:p>
          </table:table-cell>
          <table:table-cell office:value-type="string">
            <text:p>15</text:p>
          </table:table-cell>
          <table:table-cell office:value-type="string">
            <text:p>automatic</text:p>
          </table:table-cell>
          <table:table-cell office:value-type="string">
            <text:p>tx</text:p>
          </table:table-cell>
          <table:table-cell office:value-type="string">
            <text:p>tx</text:p>
          </table:table-cell>
        </table:table-row>
        <table:table-row>
          <table:table-cell office:value-type="string">
            <text:p>2026-07-11T12:48:30.711Z</text:p>
          </table:table-cell>
          <table:table-cell office:value-type="string">
            <text:p>-17.3108</text:p>
          </table:table-cell>
          <table:table-cell office:value-type="string">
            <text:p>166.7258</text:p>
          </table:table-cell>
          <table:table-cell office:value-type="string">
            <text:p>10</text:p>
          </table:table-cell>
          <table:table-cell office:value-type="string">
            <text:p>4.6</text:p>
          </table:table-cell>
          <table:table-cell office:value-type="string">
            <text:p>mb</text:p>
          </table:table-cell>
          <table:table-cell office:value-type="string">
            <text:p>25</text:p>
          </table:table-cell>
          <table:table-cell office:value-type="string">
            <text:p>129</text:p>
          </table:table-cell>
          <table:table-cell office:value-type="string">
            <text:p>3.964</text:p>
          </table:table-cell>
          <table:table-cell office:value-type="string">
            <text:p>1.12</text:p>
          </table:table-cell>
          <table:table-cell office:value-type="string">
            <text:p>us</text:p>
          </table:table-cell>
          <table:table-cell office:value-type="string">
            <text:p>us7000szqj</text:p>
          </table:table-cell>
          <table:table-cell office:value-type="string">
            <text:p>2026-07-11T13:25:43.040Z</text:p>
          </table:table-cell>
          <table:table-cell office:value-type="string">
            <text:p>152 km SSW of Lakatoro, Vanuatu</text:p>
          </table:table-cell>
          <table:table-cell office:value-type="string">
            <text:p>earthquake</text:p>
          </table:table-cell>
          <table:table-cell office:value-type="string">
            <text:p>12.17</text:p>
          </table:table-cell>
          <table:table-cell office:value-type="string">
            <text:p>1.915</text:p>
          </table:table-cell>
          <table:table-cell office:value-type="string">
            <text:p>0.129</text:p>
          </table:table-cell>
          <table:table-cell office:value-type="string">
            <text:p>18</text:p>
          </table:table-cell>
          <table:table-cell office:value-type="string">
            <text:p>reviewed</text:p>
          </table:table-cell>
          <table:table-cell office:value-type="string">
            <text:p>us</text:p>
          </table:table-cell>
          <table:table-cell office:value-type="string">
            <text:p>us</text:p>
          </table:table-cell>
        </table:table-row>
        <table:table-row>
          <table:table-cell office:value-type="string">
            <text:p>2026-07-11T12:46:21.820Z</text:p>
          </table:table-cell>
          <table:table-cell office:value-type="string">
            <text:p>33.974333333333</text:p>
          </table:table-cell>
          <table:table-cell office:value-type="string">
            <text:p>-116.85466666667</text:p>
          </table:table-cell>
          <table:table-cell office:value-type="string">
            <text:p>11.61</text:p>
          </table:table-cell>
          <table:table-cell office:value-type="string">
            <text:p>1.3</text:p>
          </table:table-cell>
          <table:table-cell office:value-type="string">
            <text:p>ml</text:p>
          </table:table-cell>
          <table:table-cell office:value-type="string">
            <text:p>70</text:p>
          </table:table-cell>
          <table:table-cell office:value-type="string">
            <text:p>19</text:p>
          </table:table-cell>
          <table:table-cell office:value-type="string">
            <text:p>0.07209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295</text:p>
          </table:table-cell>
          <table:table-cell office:value-type="string">
            <text:p>2026-07-11T12:56:56.120Z</text:p>
          </table:table-cell>
          <table:table-cell office:value-type="string">
            <text:p>6 km NNE of Banning, CA</text:p>
          </table:table-cell>
          <table:table-cell office:value-type="string">
            <text:p>earthquake</text:p>
          </table:table-cell>
          <table:table-cell office:value-type="string">
            <text:p>0.11</text:p>
          </table:table-cell>
          <table:table-cell office:value-type="string">
            <text:p>0.42</text:p>
          </table:table-cell>
          <table:table-cell office:value-type="string">
            <text:p>0.14151336358584</text:p>
          </table:table-cell>
          <table:table-cell office:value-type="string">
            <text:p>26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  <table:table-row>
          <table:table-cell office:value-type="string">
            <text:p>2026-07-11T12:43:48.980Z</text:p>
          </table:table-cell>
          <table:table-cell office:value-type="string">
            <text:p>54.554666666667</text:p>
          </table:table-cell>
          <table:table-cell office:value-type="string">
            <text:p>-164.7735</text:p>
          </table:table-cell>
          <table:table-cell office:value-type="string">
            <text:p>21.68</text:p>
          </table:table-cell>
          <table:table-cell office:value-type="string">
            <text:p>1.22</text:p>
          </table:table-cell>
          <table:table-cell office:value-type="string">
            <text:p>ml</text:p>
          </table:table-cell>
          <table:table-cell office:value-type="string">
            <text:p>5</text:p>
          </table:table-cell>
          <table:table-cell office:value-type="string">
            <text:p>222</text:p>
          </table:table-cell>
          <table:table-cell office:value-type="string">
            <text:p>0.03702</text:p>
          </table:table-cell>
          <table:table-cell office:value-type="string">
            <text:p>0.17</text:p>
          </table:table-cell>
          <table:table-cell office:value-type="string">
            <text:p>av</text:p>
          </table:table-cell>
          <table:table-cell office:value-type="string">
            <text:p>av93063889</text:p>
          </table:table-cell>
          <table:table-cell office:value-type="string">
            <text:p>2026-07-12T07:33:24.490Z</text:p>
          </table:table-cell>
          <table:table-cell office:value-type="string">
            <text:p>80 km NE of Akutan, Alaska</text:p>
          </table:table-cell>
          <table:table-cell office:value-type="string">
            <text:p>earthquake</text:p>
          </table:table-cell>
          <table:table-cell office:value-type="string">
            <text:p>1.26</text:p>
          </table:table-cell>
          <table:table-cell office:value-type="string">
            <text:p>0.74</text:p>
          </table:table-cell>
          <table:table-cell office:value-type="string">
            <text:p>0.22223289804805</text:p>
          </table:table-cell>
          <table:table-cell office:value-type="string">
            <text:p>5</text:p>
          </table:table-cell>
          <table:table-cell office:value-type="string">
            <text:p>reviewed</text:p>
          </table:table-cell>
          <table:table-cell office:value-type="string">
            <text:p>av</text:p>
          </table:table-cell>
          <table:table-cell office:value-type="string">
            <text:p>av</text:p>
          </table:table-cell>
        </table:table-row>
        <table:table-row>
          <table:table-cell office:value-type="string">
            <text:p>2026-07-11T12:13:15.000Z</text:p>
          </table:table-cell>
          <table:table-cell office:value-type="string">
            <text:p>52.076333333333</text:p>
          </table:table-cell>
          <table:table-cell office:value-type="string">
            <text:p>-176.09633333333</text:p>
          </table:table-cell>
          <table:table-cell office:value-type="string">
            <text:p>18.52</text:p>
          </table:table-cell>
          <table:table-cell office:value-type="string">
            <text:p>0.26</text:p>
          </table:table-cell>
          <table:table-cell office:value-type="string">
            <text:p>ml</text:p>
          </table:table-cell>
          <table:table-cell office:value-type="string">
            <text:p>6</text:p>
          </table:table-cell>
          <table:table-cell office:value-type="string">
            <text:p>122</text:p>
          </table:table-cell>
          <table:table-cell office:value-type="string">
            <text:p>0.02939</text:p>
          </table:table-cell>
          <table:table-cell office:value-type="string">
            <text:p>0.33</text:p>
          </table:table-cell>
          <table:table-cell office:value-type="string">
            <text:p>av</text:p>
          </table:table-cell>
          <table:table-cell office:value-type="string">
            <text:p>av94302213</text:p>
          </table:table-cell>
          <table:table-cell office:value-type="string">
            <text:p>2026-07-12T07:21:53.730Z</text:p>
          </table:table-cell>
          <table:table-cell office:value-type="string">
            <text:p>43 km ENE of Adak, Alaska</text:p>
          </table:table-cell>
          <table:table-cell office:value-type="string">
            <text:p>earthquake</text:p>
          </table:table-cell>
          <table:table-cell office:value-type="string">
            <text:p>2.63</text:p>
          </table:table-cell>
          <table:table-cell office:value-type="string">
            <text:p>1.99</text:p>
          </table:table-cell>
          <table:table-cell office:value-type="string">
            <text:p>0.29020856731244</text:p>
          </table:table-cell>
          <table:table-cell office:value-type="string">
            <text:p>6</text:p>
          </table:table-cell>
          <table:table-cell office:value-type="string">
            <text:p>reviewed</text:p>
          </table:table-cell>
          <table:table-cell office:value-type="string">
            <text:p>av</text:p>
          </table:table-cell>
          <table:table-cell office:value-type="string">
            <text:p>av</text:p>
          </table:table-cell>
        </table:table-row>
        <table:table-row>
          <table:table-cell office:value-type="string">
            <text:p>2026-07-11T12:07:55.770Z</text:p>
          </table:table-cell>
          <table:table-cell office:value-type="string">
            <text:p>33.944166666667</text:p>
          </table:table-cell>
          <table:table-cell office:value-type="string">
            <text:p>-116.70616666667</text:p>
          </table:table-cell>
          <table:table-cell office:value-type="string">
            <text:p>13.21</text:p>
          </table:table-cell>
          <table:table-cell office:value-type="string">
            <text:p>0.5</text:p>
          </table:table-cell>
          <table:table-cell office:value-type="string">
            <text:p>ml</text:p>
          </table:table-cell>
          <table:table-cell office:value-type="string">
            <text:p>29</text:p>
          </table:table-cell>
          <table:table-cell office:value-type="string">
            <text:p>56</text:p>
          </table:table-cell>
          <table:table-cell office:value-type="string">
            <text:p>0.1058</text:p>
          </table:table-cell>
          <table:table-cell office:value-type="string">
            <text:p>0.16</text:p>
          </table:table-cell>
          <table:table-cell office:value-type="string">
            <text:p>ci</text:p>
          </table:table-cell>
          <table:table-cell office:value-type="string">
            <text:p>ci41291287</text:p>
          </table:table-cell>
          <table:table-cell office:value-type="string">
            <text:p>2026-07-11T12:11:25.915Z</text:p>
          </table:table-cell>
          <table:table-cell office:value-type="string">
            <text:p>8 km ENE of Cabazon, CA</text:p>
          </table:table-cell>
          <table:table-cell office:value-type="string">
            <text:p>earthquake</text:p>
          </table:table-cell>
          <table:table-cell office:value-type="string">
            <text:p>0.19</text:p>
          </table:table-cell>
          <table:table-cell office:value-type="string">
            <text:p>0.65</text:p>
          </table:table-cell>
          <table:table-cell office:value-type="string">
            <text:p>0.31045332852058</text:p>
          </table:table-cell>
          <table:table-cell office:value-type="string">
            <text:p>9</text:p>
          </table:table-cell>
          <table:table-cell office:value-type="string">
            <text:p>automatic</text:p>
          </table:table-cell>
          <table:table-cell office:value-type="string">
            <text:p>ci</text:p>
          </table:table-cell>
          <table:table-cell office:value-type="string">
            <text:p>ci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dc="http://purl.org/dc/elements/1.1/" office:version="1.3">
  <office:meta>
    <dc:title>USGS all-day earthquake feed</dc:title>
    <dc:creator>markitdown showcase deterministic derivative</dc:creator>
    <dc:source>https://earthquake.usgs.gov/earthquakes/feed/v1.0/summary/all_day.csv</dc:source>
    <dc:language>en</dc:language>
  </office:meta>
</office:document-meta>
</file>