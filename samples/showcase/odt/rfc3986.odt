
<file path=META-INF/manifest.xml><?xml version="1.0" encoding="utf-8"?>
<manifest:manifest xmlns:manifest="urn:oasis:names:tc:opendocument:xmlns:manifest:1.0" manifest:version="1.3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office:version="1.3">
  <office:body>
    <office:text>
      <text:p/>
      <text:p/>
      <text:p/>
      <text:p/>
      <text:p/>
      <text:p/>
      <text:p>Network Working Group                                     T. Berners-Lee</text:p>
      <text:p>Request for Comments: 3986                                       W3C/MIT</text:p>
      <text:p>STD: 66                                                      R. Fielding</text:p>
      <text:p>Updates: 1738                                               Day Software</text:p>
      <text:p>Obsoletes: 2732, 2396, 1808                                  L. Masinter</text:p>
      <text:p>Category: Standards Track                                  Adobe Systems</text:p>
      <text:p>January 2005</text:p>
      <text:p/>
      <text:p/>
      <text:p>Uniform Resource Identifier (URI): Generic Syntax</text:p>
      <text:p/>
      <text:p>Status of This Memo</text:p>
      <text:p/>
      <text:p>This document specifies an Internet standards track protocol for the</text:p>
      <text:p>Internet community, and requests discussion and suggestions for</text:p>
      <text:p>improvements.  Please refer to the current edition of the "Internet</text:p>
      <text:p>Official Protocol Standards" (STD 1) for the standardization state</text:p>
      <text:p>and status of this protocol.  Distribution of this memo is unlimited.</text:p>
      <text:p/>
      <text:p>Copyright Notice</text:p>
      <text:p/>
      <text:p>Copyright (C) The Internet Society (2005).</text:p>
      <text:p/>
      <text:p>Abstract</text:p>
      <text:p/>
      <text:p>A Uniform Resource Identifier (URI) is a compact sequence of</text:p>
      <text:p>characters that identifies an abstract or physical resource.  This</text:p>
      <text:p>specification defines the generic URI syntax and a process for</text:p>
      <text:p>resolving URI references that might be in relative form, along with</text:p>
      <text:p>guidelines and security considerations for the use of URIs on the</text:p>
      <text:p>Internet.  The URI syntax defines a grammar that is a superset of all</text:p>
      <text:p>valid URIs, allowing an implementation to parse the common components</text:p>
      <text:p>of a URI reference without knowing the scheme-specific requirements</text:p>
      <text:p>of every possible identifier.  This specification does not define a</text:p>
      <text:p>generative grammar for URIs; that task is performed by the individual</text:p>
      <text:p>specifications of each URI scheme.</text:p>
      <text:p/>
      <text:p/>
      <text:p/>
      <text:p/>
      <text:p/>
      <text:p/>
      <text:p/>
      <text:p/>
      <text:p/>
      <text:p/>
      <text:p/>
      <text:p/>
      <text:p/>
      <text:p/>
      <text:p/>
      <text:p>Berners-Lee, et al.         Standards Track                     [Page 1]</text:p>
      <text:p/>
      <text:p/>
      <text:p>RFC 3986                   URI Generic Syntax               January 2005</text:p>
      <text:p/>
      <text:p/>
      <text:p>Table of Contents</text:p>
      <text:p/>
      <text:h text:outline-level="2">1.  Introduction . . . . . . . . . . . . . . . . . . . . . . . . .  4</text:h>
      <text:h text:outline-level="2">1.1.  Overview of URIs . . . . . . . . . . . . . . . . . . . .  4</text:h>
      <text:h text:outline-level="2">1.1.1.  Generic Syntax . . . . . . . . . . . . . . . . .  6</text:h>
      <text:h text:outline-level="2">1.1.2.  Examples . . . . . . . . . . . . . . . . . . . .  7</text:h>
      <text:h text:outline-level="2">1.1.3.  URI, URL, and URN  . . . . . . . . . . . . . . .  7</text:h>
      <text:h text:outline-level="2">1.2.  Design Considerations  . . . . . . . . . . . . . . . . .  8</text:h>
      <text:h text:outline-level="2">1.2.1.  Transcription  . . . . . . . . . . . . . . . . .  8</text:h>
      <text:h text:outline-level="2">1.2.2.  Separating Identification from Interaction . . .  9</text:h>
      <text:h text:outline-level="2">1.2.3.  Hierarchical Identifiers . . . . . . . . . . . . 10</text:h>
      <text:h text:outline-level="2">1.3.  Syntax Notation  . . . . . . . . . . . . . . . . . . . . 11</text:h>
      <text:h text:outline-level="2">2.  Characters . . . . . . . . . . . . . . . . . . . . . . . . . . 11</text:h>
      <text:h text:outline-level="2">2.1.  Percent-Encoding . . . . . . . . . . . . . . . . . . . . 12</text:h>
      <text:h text:outline-level="2">2.2.  Reserved Characters  . . . . . . . . . . . . . . . . . . 12</text:h>
      <text:h text:outline-level="2">2.3.  Unreserved Characters  . . . . . . . . . . . . . . . . . 13</text:h>
      <text:h text:outline-level="2">2.4.  When to Encode or Decode . . . . . . . . . . . . . . . . 14</text:h>
      <text:h text:outline-level="2">2.5.  Identifying Data . . . . . . . . . . . . . . . . . . . . 14</text:h>
      <text:h text:outline-level="2">3.  Syntax Components  . . . . . . . . . . . . . . . . . . . . . . 16</text:h>
      <text:h text:outline-level="2">3.1.  Scheme . . . . . . . . . . . . . . . . . . . . . . . . . 17</text:h>
      <text:h text:outline-level="2">3.2.  Authority  . . . . . . . . . . . . . . . . . . . . . . . 17</text:h>
      <text:h text:outline-level="2">3.2.1.  User Information . . . . . . . . . . . . . . . . 18</text:h>
      <text:h text:outline-level="2">3.2.2.  Host . . . . . . . . . . . . . . . . . . . . . . 18</text:h>
      <text:h text:outline-level="2">3.2.3.  Port . . . . . . . . . . . . . . . . . . . . . . 22</text:h>
      <text:h text:outline-level="2">3.3.  Path . . . . . . . . . . . . . . . . . . . . . . . . . . 22</text:h>
      <text:h text:outline-level="2">3.4.  Query  . . . . . . . . . . . . . . . . . . . . . . . . . 23</text:h>
      <text:h text:outline-level="2">3.5.  Fragment . . . . . . . . . . . . . . . . . . . . . . . . 24</text:h>
      <text:h text:outline-level="2">4.  Usage  . . . . . . . . . . . . . . . . . . . . . . . . . . . . 25</text:h>
      <text:h text:outline-level="2">4.1.  URI Reference  . . . . . . . . . . . . . . . . . . . . . 25</text:h>
      <text:h text:outline-level="2">4.2.  Relative Reference . . . . . . . . . . . . . . . . . . . 26</text:h>
      <text:h text:outline-level="2">4.3.  Absolute URI . . . . . . . . . . . . . . . . . . . . . . 27</text:h>
      <text:h text:outline-level="2">4.4.  Same-Document Reference  . . . . . . . . . . . . . . . . 27</text:h>
      <text:h text:outline-level="2">4.5.  Suffix Reference . . . . . . . . . . . . . . . . . . . . 27</text:h>
      <text:h text:outline-level="2">5.  Reference Resolution . . . . . . . . . . . . . . . . . . . . . 28</text:h>
      <text:h text:outline-level="2">5.1.  Establishing a Base URI  . . . . . . . . . . . . . . . . 28</text:h>
      <text:h text:outline-level="2">5.1.1.  Base URI Embedded in Content . . . . . . . . . . 29</text:h>
      <text:h text:outline-level="2">5.1.2.  Base URI from the Encapsulating Entity . . . . . 29</text:h>
      <text:h text:outline-level="2">5.1.3.  Base URI from the Retrieval URI  . . . . . . . . 30</text:h>
      <text:h text:outline-level="2">5.1.4.  Default Base URI . . . . . . . . . . . . . . . . 30</text:h>
      <text:h text:outline-level="2">5.2.  Relative Resolution  . . . . . . . . . . . . . . . . . . 30</text:h>
      <text:h text:outline-level="2">5.2.1.  Pre-parse the Base URI . . . . . . . . . . . . . 31</text:h>
      <text:h text:outline-level="2">5.2.2.  Transform References . . . . . . . . . . . . . . 31</text:h>
      <text:h text:outline-level="2">5.2.3.  Merge Paths  . . . . . . . . . . . . . . . . . . 32</text:h>
      <text:h text:outline-level="2">5.2.4.  Remove Dot Segments  . . . . . . . . . . . . . . 33</text:h>
      <text:h text:outline-level="2">5.3.  Component Recomposition  . . . . . . . . . . . . . . . . 35</text:h>
      <text:h text:outline-level="2">5.4.  Reference Resolution Examples  . . . . . . . . . . . . . 35</text:h>
      <text:h text:outline-level="2">5.4.1.  Normal Examples  . . . . . . . . . . . . . . . . 36</text:h>
      <text:h text:outline-level="2">5.4.2.  Abnormal Examples  . . . . . . . . . . . . . . . 36</text:h>
      <text:p/>
      <text:p/>
      <text:p/>
      <text:p>Berners-Lee, et al.         Standards Track                     [Page 2]</text:p>
      <text:p/>
      <text:p/>
      <text:p>RFC 3986                   URI Generic Syntax               January 2005</text:p>
      <text:p/>
      <text:p/>
      <text:h text:outline-level="2">6.  Normalization and Comparison . . . . . . . . . . . . . . . . . 38</text:h>
      <text:h text:outline-level="2">6.1.  Equivalence  . . . . . . . . . . . . . . . . . . . . . . 38</text:h>
      <text:h text:outline-level="2">6.2.  Comparison Ladder  . . . . . . . . . . . . . . . . . . . 39</text:h>
      <text:h text:outline-level="2">6.2.1.  Simple String Comparison . . . . . . . . . . . . 39</text:h>
      <text:h text:outline-level="2">6.2.2.  Syntax-Based Normalization . . . . . . . . . . . 40</text:h>
      <text:h text:outline-level="2">6.2.3.  Scheme-Based Normalization . . . . . . . . . . . 41</text:h>
      <text:h text:outline-level="2">6.2.4.  Protocol-Based Normalization . . . . . . . . . . 42</text:h>
      <text:h text:outline-level="2">7.  Security Considerations  . . . . . . . . . . . . . . . . . . . 43</text:h>
      <text:h text:outline-level="2">7.1.  Reliability and Consistency  . . . . . . . . . . . . . . 43</text:h>
      <text:h text:outline-level="2">7.2.  Malicious Construction . . . . . . . . . . . . . . . . . 43</text:h>
      <text:h text:outline-level="2">7.3.  Back-End Transcoding . . . . . . . . . . . . . . . . . . 44</text:h>
      <text:h text:outline-level="2">7.4.  Rare IP Address Formats  . . . . . . . . . . . . . . . . 45</text:h>
      <text:h text:outline-level="2">7.5.  Sensitive Information  . . . . . . . . . . . . . . . . . 45</text:h>
      <text:h text:outline-level="2">7.6.  Semantic Attacks . . . . . . . . . . . . . . . . . . . . 45</text:h>
      <text:h text:outline-level="2">8.  IANA Considerations  . . . . . . . . . . . . . . . . . . . . . 46</text:h>
      <text:h text:outline-level="2">9.  Acknowledgements . . . . . . . . . . . . . . . . . . . . . . . 46</text:h>
      <text:h text:outline-level="2">10. References . . . . . . . . . . . . . . . . . . . . . . . . . . 46</text:h>
      <text:h text:outline-level="2">10.1. Normative References . . . . . . . . . . . . . . . . . . 46</text:h>
      <text:h text:outline-level="2">10.2. Informative References . . . . . . . . . . . . . . . . . 47</text:h>
      <text:p>A.  Collected ABNF for URI . . . . . . . . . . . . . . . . . . . . 49</text:p>
      <text:p>B.  Parsing a URI Reference with a Regular Expression  . . . . . . 50</text:p>
      <text:p>C.  Delimiting a URI in Context  . . . . . . . . . . . . . . . . . 51</text:p>
      <text:p>D.  Changes from RFC 2396  . . . . . . . . . . . . . . . . . . . . 53</text:p>
      <text:p>D.1.  Additions  . . . . . . . . . . . . . . . . . . . . . . . 53</text:p>
      <text:p>D.2.  Modifications  . . . . . . . . . . . . . . . . . . . . . 53</text:p>
      <text:p>Index  . . . . . . . . . . . . . . . . . . . . . . . . . . . . . . 56</text:p>
      <text:p>Authors' Addresses . . . . . . . . . . . . . . . . . . . . . . . . 60</text:p>
      <text:p>Full Copyright Statement . . . . . . . . . . . . . . . . . . . . . 61</text:p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>Berners-Lee, et al.         Standards Track                     [Page 3]</text:p>
      <text:p/>
      <text:p/>
      <text:p>RFC 3986                   URI Generic Syntax               January 2005</text:p>
      <text:p/>
      <text:p/>
      <text:h text:outline-level="2">1.  Introduction</text:h>
      <text:p/>
      <text:p>A Uniform Resource Identifier (URI) provides a simple and extensible</text:p>
      <text:p>means for identifying a resource.  This specification of URI syntax</text:p>
      <text:p>and semantics is derived from concepts introduced by the World Wide</text:p>
      <text:p>Web global information initiative, whose use of these identifiers</text:p>
      <text:p>dates from 1990 and is described in "Universal Resource Identifiers</text:p>
      <text:p>in WWW" [RFC1630].  The syntax is designed to meet the</text:p>
      <text:p>recommendations laid out in "Functional Recommendations for Internet</text:p>
      <text:p>Resource Locators" [RFC1736] and "Functional Requirements for Uniform</text:p>
      <text:p>Resource Names" [RFC1737].</text:p>
      <text:p/>
      <text:p>This document obsoletes [RFC2396], which merged "Uniform Resource</text:p>
      <text:p>Locators" [RFC1738] and "Relative Uniform Resource Locators"</text:p>
      <text:p>[RFC1808] in order to define a single, generic syntax for all URIs.</text:p>
      <text:p>It obsoletes [RFC2732], which introduced syntax for an IPv6 address.</text:p>
      <text:p>It excludes portions of RFC 1738 that defined the specific syntax of</text:p>
      <text:p>individual URI schemes; those portions will be updated as separate</text:p>
      <text:p>documents.  The process for registration of new URI schemes is</text:p>
      <text:p>defined separately by [BCP35].  Advice for designers of new URI</text:p>
      <text:p>schemes can be found in [RFC2718].  All significant changes from RFC</text:p>
      <text:h text:outline-level="2">2396 are noted in Appendix D.</text:h>
      <text:p/>
      <text:p>This specification uses the terms "character" and "coded character</text:p>
      <text:p>set" in accordance with the definitions provided in [BCP19], and</text:p>
      <text:p>"character encoding" in place of what [BCP19] refers to as a</text:p>
      <text:p>"charset".</text:p>
      <text:p/>
      <text:h text:outline-level="2">1.1.  Overview of URIs</text:h>
      <text:p/>
      <text:p>URIs are characterized as follows:</text:p>
      <text:p/>
      <text:p>Uniform</text:p>
      <text:p/>
      <text:p>Uniformity provides several benefits.  It allows different types</text:p>
      <text:p>of resource identifiers to be used in the same context, even when</text:p>
      <text:p>the mechanisms used to access those resources may differ.  It</text:p>
      <text:p>allows uniform semantic interpretation of common syntactic</text:p>
      <text:p>conventions across different types of resource identifiers.  It</text:p>
      <text:p>allows introduction of new types of resource identifiers without</text:p>
      <text:p>interfering with the way that existing identifiers are used.  It</text:p>
      <text:p>allows the identifiers to be reused in many different contexts,</text:p>
      <text:p>thus permitting new applications or protocols to leverage a pre-</text:p>
      <text:p>existing, large, and widely used set of resource identifiers.</text:p>
      <text:p/>
      <text:p/>
      <text:p/>
      <text:p/>
      <text:p/>
      <text:p/>
      <text:p/>
      <text:p>Berners-Lee, et al.         Standards Track                     [Page 4]</text:p>
      <text:p/>
      <text:p/>
      <text:p>RFC 3986                   URI Generic Syntax               January 2005</text:p>
      <text:p/>
      <text:p/>
      <text:p>Resource</text:p>
      <text:p/>
      <text:p>This specification does not limit the scope of what might be a</text:p>
      <text:p>resource; rather, the term "resource" is used in a general sense</text:p>
      <text:p>for whatever might be identified by a URI.  Familiar examples</text:p>
      <text:p>include an electronic document, an image, a source of information</text:p>
      <text:p>with a consistent purpose (e.g., "today's weather report for Los</text:p>
      <text:p>Angeles"), a service (e.g., an HTTP-to-SMS gateway), and a</text:p>
      <text:p>collection of other resources.  A resource is not necessarily</text:p>
      <text:p>accessible via the Internet; e.g., human beings, corporations, and</text:p>
      <text:p>bound books in a library can also be resources.  Likewise,</text:p>
      <text:p>abstract concepts can be resources, such as the operators and</text:p>
      <text:p>operands of a mathematical equation, the types of a relationship</text:p>
      <text:p>(e.g., "parent" or "employee"), or numeric values (e.g., zero,</text:p>
      <text:p>one, and infinity).</text:p>
      <text:p/>
      <text:p>Identifier</text:p>
      <text:p/>
      <text:p>An identifier embodies the information required to distinguish</text:p>
      <text:p>what is being identified from all other things within its scope of</text:p>
      <text:p>identification.  Our use of the terms "identify" and "identifying"</text:p>
      <text:p>refer to this purpose of distinguishing one resource from all</text:p>
      <text:p>other resources, regardless of how that purpose is accomplished</text:p>
      <text:p>(e.g., by name, address, or context).  These terms should not be</text:p>
      <text:p>mistaken as an assumption that an identifier defines or embodies</text:p>
      <text:p>the identity of what is referenced, though that may be the case</text:p>
      <text:p>for some identifiers.  Nor should it be assumed that a system</text:p>
      <text:p>using URIs will access the resource identified: in many cases,</text:p>
      <text:p>URIs are used to denote resources without any intention that they</text:p>
      <text:p>be accessed.  Likewise, the "one" resource identified might not be</text:p>
      <text:p>singular in nature (e.g., a resource might be a named set or a</text:p>
      <text:p>mapping that varies over time).</text:p>
      <text:p/>
      <text:p>A URI is an identifier consisting of a sequence of characters</text:p>
      <text:p>matching the syntax rule named &lt;URI&gt; in Section 3.  It enables</text:p>
      <text:p>uniform identification of resources via a separately defined</text:p>
      <text:p>extensible set of naming schemes (Section 3.1).  How that</text:p>
      <text:p>identification is accomplished, assigned, or enabled is delegated to</text:p>
      <text:p>each scheme specification.</text:p>
      <text:p/>
      <text:p>This specification does not place any limits on the nature of a</text:p>
      <text:p>resource, the reasons why an application might seek to refer to a</text:p>
      <text:p>resource, or the kinds of systems that might use URIs for the sake of</text:p>
      <text:p>identifying resources.  This specification does not require that a</text:p>
      <text:p>URI persists in identifying the same resource over time, though that</text:p>
      <text:p>is a common goal of all URI schemes.  Nevertheless, nothing in this</text:p>
      <text:p/>
      <text:p/>
      <text:p/>
      <text:p/>
      <text:p/>
      <text:p>Berners-Lee, et al.         Standards Track                     [Page 5]</text:p>
      <text:p/>
      <text:p/>
      <text:p>RFC 3986                   URI Generic Syntax               January 2005</text:p>
      <text:p/>
      <text:p/>
      <text:p>specification prevents an application from limiting itself to</text:p>
      <text:p>particular types of resources, or to a subset of URIs that maintains</text:p>
      <text:p>characteristics desired by that application.</text:p>
      <text:p/>
      <text:p>URIs have a global scope and are interpreted consistently regardless</text:p>
      <text:p>of context, though the result of that interpretation may be in</text:p>
      <text:p>relation to the end-user's context.  For example, "http://localhost/"</text:p>
      <text:p>has the same interpretation for every user of that reference, even</text:p>
      <text:p>though the network interface corresponding to "localhost" may be</text:p>
      <text:p>different for each end-user: interpretation is independent of access.</text:p>
      <text:p>However, an action made on the basis of that reference will take</text:p>
      <text:p>place in relation to the end-user's context, which implies that an</text:p>
      <text:p>action intended to refer to a globally unique thing must use a URI</text:p>
      <text:p>that distinguishes that resource from all other things.  URIs that</text:p>
      <text:p>identify in relation to the end-user's local context should only be</text:p>
      <text:p>used when the context itself is a defining aspect of the resource,</text:p>
      <text:p>such as when an on-line help manual refers to a file on the end-</text:p>
      <text:p>user's file system (e.g., "file:///etc/hosts").</text:p>
      <text:p/>
      <text:h text:outline-level="2">1.1.1.  Generic Syntax</text:h>
      <text:p/>
      <text:p>Each URI begins with a scheme name, as defined in Section 3.1, that</text:p>
      <text:p>refers to a specification for assigning identifiers within that</text:p>
      <text:p>scheme.  As such, the URI syntax is a federated and extensible naming</text:p>
      <text:p>system wherein each scheme's specification may further restrict the</text:p>
      <text:p>syntax and semantics of identifiers using that scheme.</text:p>
      <text:p/>
      <text:p>This specification defines those elements of the URI syntax that are</text:p>
      <text:p>required of all URI schemes or are common to many URI schemes.  It</text:p>
      <text:p>thus defines the syntax and semantics needed to implement a scheme-</text:p>
      <text:p>independent parsing mechanism for URI references, by which the</text:p>
      <text:p>scheme-dependent handling of a URI can be postponed until the</text:p>
      <text:p>scheme-dependent semantics are needed.  Likewise, protocols and data</text:p>
      <text:p>formats that make use of URI references can refer to this</text:p>
      <text:p>specification as a definition for the range of syntax allowed for all</text:p>
      <text:p>URIs, including those schemes that have yet to be defined.  This</text:p>
      <text:p>decouples the evolution of identification schemes from the evolution</text:p>
      <text:p>of protocols, data formats, and implementations that make use of</text:p>
      <text:p>URIs.</text:p>
      <text:p/>
      <text:p>A parser of the generic URI syntax can parse any URI reference into</text:p>
      <text:p>its major components.  Once the scheme is determined, further</text:p>
      <text:p>scheme-specific parsing can be performed on the components.  In other</text:p>
      <text:p>words, the URI generic syntax is a superset of the syntax of all URI</text:p>
      <text:p>schemes.</text:p>
      <text:p/>
      <text:p/>
      <text:p/>
      <text:p/>
      <text:p/>
      <text:p/>
      <text:p>Berners-Lee, et al.         Standards Track                     [Page 6]</text:p>
      <text:p/>
      <text:p/>
      <text:p>RFC 3986                   URI Generic Syntax               January 2005</text:p>
      <text:p/>
      <text:p/>
      <text:h text:outline-level="2">1.1.2.  Examples</text:h>
      <text:p/>
      <text:p>The following example URIs illustrate several URI schemes and</text:p>
      <text:p>variations in their common syntax components:</text:p>
      <text:p/>
      <text:p>ftp://ftp.is.co.za/rfc/rfc1808.txt</text:p>
      <text:p/>
      <text:p>http://www.ietf.org/rfc/rfc2396.txt</text:p>
      <text:p/>
      <text:p>ldap://[2001:db8::7]/c=GB?objectClass?one</text:p>
      <text:p/>
      <text:p>mailto:John.Doe@example.com</text:p>
      <text:p/>
      <text:p>news:comp.infosystems.www.servers.unix</text:p>
      <text:p/>
      <text:p>tel:+1-816-555-1212</text:p>
      <text:p/>
      <text:p>telnet://192.0.2.16:80/</text:p>
      <text:p/>
      <text:p>urn:oasis:names:specification:docbook:dtd:xml:4.1.2</text:p>
      <text:p/>
      <text:p/>
      <text:h text:outline-level="2">1.1.3.  URI, URL, and URN</text:h>
      <text:p/>
      <text:p>A URI can be further classified as a locator, a name, or both.  The</text:p>
      <text:p>term "Uniform Resource Locator" (URL) refers to the subset of URIs</text:p>
      <text:p>that, in addition to identifying a resource, provide a means of</text:p>
      <text:p>locating the resource by describing its primary access mechanism</text:p>
      <text:p>(e.g., its network "location").  The term "Uniform Resource Name"</text:p>
      <text:p>(URN) has been used historically to refer to both URIs under the</text:p>
      <text:p>"urn" scheme [RFC2141], which are required to remain globally unique</text:p>
      <text:p>and persistent even when the resource ceases to exist or becomes</text:p>
      <text:p>unavailable, and to any other URI with the properties of a name.</text:p>
      <text:p/>
      <text:p>An individual scheme does not have to be classified as being just one</text:p>
      <text:p>of "name" or "locator".  Instances of URIs from any given scheme may</text:p>
      <text:p>have the characteristics of names or locators or both, often</text:p>
      <text:p>depending on the persistence and care in the assignment of</text:p>
      <text:p>identifiers by the naming authority, rather than on any quality of</text:p>
      <text:p>the scheme.  Future specifications and related documentation should</text:p>
      <text:p>use the general term "URI" rather than the more restrictive terms</text:p>
      <text:p>"URL" and "URN" [RFC3305].</text:p>
      <text:p/>
      <text:p/>
      <text:p/>
      <text:p/>
      <text:p/>
      <text:p/>
      <text:p/>
      <text:p/>
      <text:p/>
      <text:p>Berners-Lee, et al.         Standards Track                     [Page 7]</text:p>
      <text:p/>
      <text:p/>
      <text:p>RFC 3986                   URI Generic Syntax               January 2005</text:p>
      <text:p/>
      <text:p/>
      <text:h text:outline-level="2">1.2.  Design Considerations</text:h>
      <text:p/>
      <text:h text:outline-level="2">1.2.1.  Transcription</text:h>
      <text:p/>
      <text:p>The URI syntax has been designed with global transcription as one of</text:p>
      <text:p>its main considerations.  A URI is a sequence of characters from a</text:p>
      <text:p>very limited set: the letters of the basic Latin alphabet, digits,</text:p>
      <text:p>and a few special characters.  A URI may be represented in a variety</text:p>
      <text:p>of ways; e.g., ink on paper, pixels on a screen, or a sequence of</text:p>
      <text:p>character encoding octets.  The interpretation of a URI depends only</text:p>
      <text:p>on the characters used and not on how those characters are</text:p>
      <text:p>represented in a network protocol.</text:p>
      <text:p/>
      <text:p>The goal of transcription can be described by a simple scenario.</text:p>
      <text:p>Imagine two colleagues, Sam and Kim, sitting in a pub at an</text:p>
      <text:p>international conference and exchanging research ideas.  Sam asks Kim</text:p>
      <text:p>for a location to get more information, so Kim writes the URI for the</text:p>
      <text:p>research site on a napkin.  Upon returning home, Sam takes out the</text:p>
      <text:p>napkin and types the URI into a computer, which then retrieves the</text:p>
      <text:p>information to which Kim referred.</text:p>
      <text:p/>
      <text:p>There are several design considerations revealed by the scenario:</text:p>
      <text:p/>
      <text:p>o  A URI is a sequence of characters that is not always represented</text:p>
      <text:p>as a sequence of octets.</text:p>
      <text:p/>
      <text:p>o  A URI might be transcribed from a non-network source and thus</text:p>
      <text:p>should consist of characters that are most likely able to be</text:p>
      <text:p>entered into a computer, within the constraints imposed by</text:p>
      <text:p>keyboards (and related input devices) across languages and</text:p>
      <text:p>locales.</text:p>
      <text:p/>
      <text:p>o  A URI often has to be remembered by people, and it is easier for</text:p>
      <text:p>people to remember a URI when it consists of meaningful or</text:p>
      <text:p>familiar components.</text:p>
      <text:p/>
      <text:p>These design considerations are not always in alignment.  For</text:p>
      <text:p>example, it is often the case that the most meaningful name for a URI</text:p>
      <text:p>component would require characters that cannot be typed into some</text:p>
      <text:p>systems.  The ability to transcribe a resource identifier from one</text:p>
      <text:p>medium to another has been considered more important than having a</text:p>
      <text:p>URI consist of the most meaningful of components.</text:p>
      <text:p/>
      <text:p>In local or regional contexts and with improving technology, users</text:p>
      <text:p>might benefit from being able to use a wider range of characters;</text:p>
      <text:p>such use is not defined by this specification.  Percent-encoded</text:p>
      <text:p>octets (Section 2.1) may be used within a URI to represent characters</text:p>
      <text:p>outside the range of the US-ASCII coded character set if this</text:p>
      <text:p/>
      <text:p/>
      <text:p/>
      <text:p>Berners-Lee, et al.         Standards Track                     [Page 8]</text:p>
      <text:p/>
      <text:p/>
      <text:p>RFC 3986                   URI Generic Syntax               January 2005</text:p>
      <text:p/>
      <text:p/>
      <text:p>representation is allowed by the scheme or by the protocol element in</text:p>
      <text:p>which the URI is referenced.  Such a definition should specify the</text:p>
      <text:p>character encoding used to map those characters to octets prior to</text:p>
      <text:p>being percent-encoded for the URI.</text:p>
      <text:p/>
      <text:h text:outline-level="2">1.2.2.  Separating Identification from Interaction</text:h>
      <text:p/>
      <text:p>A common misunderstanding of URIs is that they are only used to refer</text:p>
      <text:p>to accessible resources.  The URI itself only provides</text:p>
      <text:p>identification; access to the resource is neither guaranteed nor</text:p>
      <text:p>implied by the presence of a URI.  Instead, any operation associated</text:p>
      <text:p>with a URI reference is defined by the protocol element, data format</text:p>
      <text:p>attribute, or natural language text in which it appears.</text:p>
      <text:p/>
      <text:p>Given a URI, a system may attempt to perform a variety of operations</text:p>
      <text:p>on the resource, as might be characterized by words such as "access",</text:p>
      <text:p>"update", "replace", or "find attributes".  Such operations are</text:p>
      <text:p>defined by the protocols that make use of URIs, not by this</text:p>
      <text:p>specification.  However, we do use a few general terms for describing</text:p>
      <text:p>common operations on URIs.  URI "resolution" is the process of</text:p>
      <text:p>determining an access mechanism and the appropriate parameters</text:p>
      <text:p>necessary to dereference a URI; this resolution may require several</text:p>
      <text:p>iterations.  To use that access mechanism to perform an action on the</text:p>
      <text:p>URI's resource is to "dereference" the URI.</text:p>
      <text:p/>
      <text:p>When URIs are used within information retrieval systems to identify</text:p>
      <text:p>sources of information, the most common form of URI dereference is</text:p>
      <text:p>"retrieval": making use of a URI in order to retrieve a</text:p>
      <text:p>representation of its associated resource.  A "representation" is a</text:p>
      <text:p>sequence of octets, along with representation metadata describing</text:p>
      <text:p>those octets, that constitutes a record of the state of the resource</text:p>
      <text:p>at the time when the representation is generated.  Retrieval is</text:p>
      <text:p>achieved by a process that might include using the URI as a cache key</text:p>
      <text:p>to check for a locally cached representation, resolution of the URI</text:p>
      <text:p>to determine an appropriate access mechanism (if any), and</text:p>
      <text:p>dereference of the URI for the sake of applying a retrieval</text:p>
      <text:p>operation.  Depending on the protocols used to perform the retrieval,</text:p>
      <text:p>additional information might be supplied about the resource (resource</text:p>
      <text:p>metadata) and its relation to other resources.</text:p>
      <text:p/>
      <text:p>URI references in information retrieval systems are designed to be</text:p>
      <text:p>late-binding: the result of an access is generally determined when it</text:p>
      <text:p>is accessed and may vary over time or due to other aspects of the</text:p>
      <text:p>interaction.  These references are created in order to be used in the</text:p>
      <text:p>future: what is being identified is not some specific result that was</text:p>
      <text:p>obtained in the past, but rather some characteristic that is expected</text:p>
      <text:p>to be true for future results.  In such cases, the resource referred</text:p>
      <text:p>to by the URI is actually a sameness of characteristics as observed</text:p>
      <text:p/>
      <text:p/>
      <text:p/>
      <text:p>Berners-Lee, et al.         Standards Track                     [Page 9]</text:p>
      <text:p/>
      <text:p/>
      <text:p>RFC 3986                   URI Generic Syntax               January 2005</text:p>
      <text:p/>
      <text:p/>
      <text:p>over time, perhaps elucidated by additional comments or assertions</text:p>
      <text:p>made by the resource provider.</text:p>
      <text:p/>
      <text:p>Although many URI schemes are named after protocols, this does not</text:p>
      <text:p>imply that use of these URIs will result in access to the resource</text:p>
      <text:p>via the named protocol.  URIs are often used simply for the sake of</text:p>
      <text:p>identification.  Even when a URI is used to retrieve a representation</text:p>
      <text:p>of a resource, that access might be through gateways, proxies,</text:p>
      <text:p>caches, and name resolution services that are independent of the</text:p>
      <text:p>protocol associated with the scheme name.  The resolution of some</text:p>
      <text:p>URIs may require the use of more than one protocol (e.g., both DNS</text:p>
      <text:p>and HTTP are typically used to access an "http" URI's origin server</text:p>
      <text:p>when a representation isn't found in a local cache).</text:p>
      <text:p/>
      <text:h text:outline-level="2">1.2.3.  Hierarchical Identifiers</text:h>
      <text:p/>
      <text:p>The URI syntax is organized hierarchically, with components listed in</text:p>
      <text:p>order of decreasing significance from left to right.  For some URI</text:p>
      <text:p>schemes, the visible hierarchy is limited to the scheme itself:</text:p>
      <text:p>everything after the scheme component delimiter (":") is considered</text:p>
      <text:p>opaque to URI processing.  Other URI schemes make the hierarchy</text:p>
      <text:p>explicit and visible to generic parsing algorithms.</text:p>
      <text:p/>
      <text:p>The generic syntax uses the slash ("/"), question mark ("?"), and</text:p>
      <text:p>number sign ("#") characters to delimit components that are</text:p>
      <text:p>significant to the generic parser's hierarchical interpretation of an</text:p>
      <text:p>identifier.  In addition to aiding the readability of such</text:p>
      <text:p>identifiers through the consistent use of familiar syntax, this</text:p>
      <text:p>uniform representation of hierarchy across naming schemes allows</text:p>
      <text:p>scheme-independent references to be made relative to that hierarchy.</text:p>
      <text:p/>
      <text:p>It is often the case that a group or "tree" of documents has been</text:p>
      <text:p>constructed to serve a common purpose, wherein the vast majority of</text:p>
      <text:p>URI references in these documents point to resources within the tree</text:p>
      <text:p>rather than outside it.  Similarly, documents located at a particular</text:p>
      <text:p>site are much more likely to refer to other resources at that site</text:p>
      <text:p>than to resources at remote sites.  Relative referencing of URIs</text:p>
      <text:p>allows document trees to be partially independent of their location</text:p>
      <text:p>and access scheme.  For instance, it is possible for a single set of</text:p>
      <text:p>hypertext documents to be simultaneously accessible and traversable</text:p>
      <text:p>via each of the "file", "http", and "ftp" schemes if the documents</text:p>
      <text:p>refer to each other with relative references.  Furthermore, such</text:p>
      <text:p>document trees can be moved, as a whole, without changing any of the</text:p>
      <text:p>relative references.</text:p>
      <text:p/>
      <text:p>A relative reference (Section 4.2) refers to a resource by describing</text:p>
      <text:p>the difference within a hierarchical name space between the reference</text:p>
      <text:p>context and the target URI.  The reference resolution algorithm,</text:p>
      <text:p/>
      <text:p/>
      <text:p/>
      <text:p>Berners-Lee, et al.         Standards Track                    [Page 10]</text:p>
      <text:p/>
      <text:p/>
      <text:p>RFC 3986                   URI Generic Syntax               January 2005</text:p>
      <text:p/>
      <text:p/>
      <text:p>presented in Section 5, defines how such a reference is transformed</text:p>
      <text:p>to the target URI.  As relative references can only be used within</text:p>
      <text:p>the context of a hierarchical URI, designers of new URI schemes</text:p>
      <text:p>should use a syntax consistent with the generic syntax's hierarchical</text:p>
      <text:p>components unless there are compelling reasons to forbid relative</text:p>
      <text:p>referencing within that scheme.</text:p>
      <text:p/>
      <text:p>NOTE: Previous specifications used the terms "partial URI" and</text:p>
      <text:p>"relative URI" to denote a relative reference to a URI.  As some</text:p>
      <text:p>readers misunderstood those terms to mean that relative URIs are a</text:p>
      <text:p>subset of URIs rather than a method of referencing URIs, this</text:p>
      <text:p>specification simply refers to them as relative references.</text:p>
      <text:p/>
      <text:p>All URI references are parsed by generic syntax parsers when used.</text:p>
      <text:p>However, because hierarchical processing has no effect on an absolute</text:p>
      <text:p>URI used in a reference unless it contains one or more dot-segments</text:p>
      <text:p>(complete path segments of "." or "..", as described in Section 3.3),</text:p>
      <text:p>URI scheme specifications can define opaque identifiers by</text:p>
      <text:p>disallowing use of slash characters, question mark characters, and</text:p>
      <text:p>the URIs "scheme:." and "scheme:..".</text:p>
      <text:p/>
      <text:h text:outline-level="2">1.3.  Syntax Notation</text:h>
      <text:p/>
      <text:p>This specification uses the Augmented Backus-Naur Form (ABNF)</text:p>
      <text:p>notation of [RFC2234], including the following core ABNF syntax rules</text:p>
      <text:p>defined by that specification: ALPHA (letters), CR (carriage return),</text:p>
      <text:p>DIGIT (decimal digits), DQUOTE (double quote), HEXDIG (hexadecimal</text:p>
      <text:p>digits), LF (line feed), and SP (space).  The complete URI syntax is</text:p>
      <text:p>collected in Appendix A.</text:p>
      <text:p/>
      <text:h text:outline-level="2">2.  Characters</text:h>
      <text:p/>
      <text:p>The URI syntax provides a method of encoding data, presumably for the</text:p>
      <text:p>sake of identifying a resource, as a sequence of characters.  The URI</text:p>
      <text:p>characters are, in turn, frequently encoded as octets for transport</text:p>
      <text:p>or presentation.  This specification does not mandate any particular</text:p>
      <text:p>character encoding for mapping between URI characters and the octets</text:p>
      <text:p>used to store or transmit those characters.  When a URI appears in a</text:p>
      <text:p>protocol element, the character encoding is defined by that protocol;</text:p>
      <text:p>without such a definition, a URI is assumed to be in the same</text:p>
      <text:p>character encoding as the surrounding text.</text:p>
      <text:p/>
      <text:p>The ABNF notation defines its terminal values to be non-negative</text:p>
      <text:p>integers (codepoints) based on the US-ASCII coded character set</text:p>
      <text:p>[ASCII].  Because a URI is a sequence of characters, we must invert</text:p>
      <text:p>that relation in order to understand the URI syntax.  Therefore, the</text:p>
      <text:p/>
      <text:p/>
      <text:p/>
      <text:p/>
      <text:p/>
      <text:p>Berners-Lee, et al.         Standards Track                    [Page 11]</text:p>
      <text:p/>
      <text:p/>
      <text:p>RFC 3986                   URI Generic Syntax               January 2005</text:p>
      <text:p/>
      <text:p/>
      <text:p>integer values used by the ABNF must be mapped back to their</text:p>
      <text:p>corresponding characters via US-ASCII in order to complete the syntax</text:p>
      <text:p>rules.</text:p>
      <text:p/>
      <text:p>A URI is composed from a limited set of characters consisting of</text:p>
      <text:p>digits, letters, and a few graphic symbols.  A reserved subset of</text:p>
      <text:p>those characters may be used to delimit syntax components within a</text:p>
      <text:p>URI while the remaining characters, including both the unreserved set</text:p>
      <text:p>and those reserved characters not acting as delimiters, define each</text:p>
      <text:p>component's identifying data.</text:p>
      <text:p/>
      <text:h text:outline-level="2">2.1.  Percent-Encoding</text:h>
      <text:p/>
      <text:p>A percent-encoding mechanism is used to represent a data octet in a</text:p>
      <text:p>component when that octet's corresponding character is outside the</text:p>
      <text:p>allowed set or is being used as a delimiter of, or within, the</text:p>
      <text:p>component.  A percent-encoded octet is encoded as a character</text:p>
      <text:p>triplet, consisting of the percent character "%" followed by the two</text:p>
      <text:p>hexadecimal digits representing that octet's numeric value.  For</text:p>
      <text:p>example, "%20" is the percent-encoding for the binary octet</text:p>
      <text:p>"00100000" (ABNF: %x20), which in US-ASCII corresponds to the space</text:p>
      <text:p>character (SP).  Section 2.4 describes when percent-encoding and</text:p>
      <text:p>decoding is applied.</text:p>
      <text:p/>
      <text:p>pct-encoded = "%" HEXDIG HEXDIG</text:p>
      <text:p/>
      <text:p>The uppercase hexadecimal digits 'A' through 'F' are equivalent to</text:p>
      <text:p>the lowercase digits 'a' through 'f', respectively.  If two URIs</text:p>
      <text:p>differ only in the case of hexadecimal digits used in percent-encoded</text:p>
      <text:p>octets, they are equivalent.  For consistency, URI producers and</text:p>
      <text:p>normalizers should use uppercase hexadecimal digits for all percent-</text:p>
      <text:p>encodings.</text:p>
      <text:p/>
      <text:h text:outline-level="2">2.2.  Reserved Characters</text:h>
      <text:p/>
      <text:p>URIs include components and subcomponents that are delimited by</text:p>
      <text:p>characters in the "reserved" set.  These characters are called</text:p>
      <text:p>"reserved" because they may (or may not) be defined as delimiters by</text:p>
      <text:p>the generic syntax, by each scheme-specific syntax, or by the</text:p>
      <text:p>implementation-specific syntax of a URI's dereferencing algorithm.</text:p>
      <text:p>If data for a URI component would conflict with a reserved</text:p>
      <text:p>character's purpose as a delimiter, then the conflicting data must be</text:p>
      <text:p>percent-encoded before the URI is formed.</text:p>
      <text:p/>
      <text:p/>
      <text:p/>
      <text:p/>
      <text:p/>
      <text:p/>
      <text:p/>
      <text:p/>
      <text:p>Berners-Lee, et al.         Standards Track                    [Page 12]</text:p>
      <text:p/>
      <text:p/>
      <text:p>RFC 3986                   URI Generic Syntax               January 2005</text:p>
      <text:p/>
      <text:p/>
      <text:p>reserved    = gen-delims / sub-delims</text:p>
      <text:p/>
      <text:p>gen-delims  = ":" / "/" / "?" / "#" / "[" / "]" / "@"</text:p>
      <text:p/>
      <text:p>sub-delims  = "!" / "$" / "&amp;" / "'" / "(" / ")"</text:p>
      <text:p>/ "*" / "+" / "," / ";" / "="</text:p>
      <text:p/>
      <text:p>The purpose of reserved characters is to provide a set of delimiting</text:p>
      <text:p>characters that are distinguishable from other data within a URI.</text:p>
      <text:p>URIs that differ in the replacement of a reserved character with its</text:p>
      <text:p>corresponding percent-encoded octet are not equivalent.  Percent-</text:p>
      <text:p>encoding a reserved character, or decoding a percent-encoded octet</text:p>
      <text:p>that corresponds to a reserved character, will change how the URI is</text:p>
      <text:p>interpreted by most applications.  Thus, characters in the reserved</text:p>
      <text:p>set are protected from normalization and are therefore safe to be</text:p>
      <text:p>used by scheme-specific and producer-specific algorithms for</text:p>
      <text:p>delimiting data subcomponents within a URI.</text:p>
      <text:p/>
      <text:p>A subset of the reserved characters (gen-delims) is used as</text:p>
      <text:p>delimiters of the generic URI components described in Section 3.  A</text:p>
      <text:p>component's ABNF syntax rule will not use the reserved or gen-delims</text:p>
      <text:p>rule names directly; instead, each syntax rule lists the characters</text:p>
      <text:p>allowed within that component (i.e., not delimiting it), and any of</text:p>
      <text:p>those characters that are also in the reserved set are "reserved" for</text:p>
      <text:p>use as subcomponent delimiters within the component.  Only the most</text:p>
      <text:p>common subcomponents are defined by this specification; other</text:p>
      <text:p>subcomponents may be defined by a URI scheme's specification, or by</text:p>
      <text:p>the implementation-specific syntax of a URI's dereferencing</text:p>
      <text:p>algorithm, provided that such subcomponents are delimited by</text:p>
      <text:p>characters in the reserved set allowed within that component.</text:p>
      <text:p/>
      <text:p>URI producing applications should percent-encode data octets that</text:p>
      <text:p>correspond to characters in the reserved set unless these characters</text:p>
      <text:p>are specifically allowed by the URI scheme to represent data in that</text:p>
      <text:p>component.  If a reserved character is found in a URI component and</text:p>
      <text:p>no delimiting role is known for that character, then it must be</text:p>
      <text:p>interpreted as representing the data octet corresponding to that</text:p>
      <text:p>character's encoding in US-ASCII.</text:p>
      <text:p/>
      <text:h text:outline-level="2">2.3.  Unreserved Characters</text:h>
      <text:p/>
      <text:p>Characters that are allowed in a URI but do not have a reserved</text:p>
      <text:p>purpose are called unreserved.  These include uppercase and lowercase</text:p>
      <text:p>letters, decimal digits, hyphen, period, underscore, and tilde.</text:p>
      <text:p/>
      <text:p>unreserved  = ALPHA / DIGIT / "-" / "." / "_" / "~"</text:p>
      <text:p/>
      <text:p/>
      <text:p/>
      <text:p/>
      <text:p/>
      <text:p>Berners-Lee, et al.         Standards Track                    [Page 13]</text:p>
      <text:p/>
      <text:p/>
      <text:p>RFC 3986                   URI Generic Syntax               January 2005</text:p>
      <text:p/>
      <text:p/>
      <text:p>URIs that differ in the replacement of an unreserved character with</text:p>
      <text:p>its corresponding percent-encoded US-ASCII octet are equivalent: they</text:p>
      <text:p>identify the same resource.  However, URI comparison implementations</text:p>
      <text:p>do not always perform normalization prior to comparison (see Section</text:p>
      <text:p>6).  For consistency, percent-encoded octets in the ranges of ALPHA</text:p>
      <text:p>(%41-%5A and %61-%7A), DIGIT (%30-%39), hyphen (%2D), period (%2E),</text:p>
      <text:p>underscore (%5F), or tilde (%7E) should not be created by URI</text:p>
      <text:p>producers and, when found in a URI, should be decoded to their</text:p>
      <text:p>corresponding unreserved characters by URI normalizers.</text:p>
      <text:p/>
      <text:h text:outline-level="2">2.4.  When to Encode or Decode</text:h>
      <text:p/>
      <text:p>Under normal circumstances, the only time when octets within a URI</text:p>
      <text:p>are percent-encoded is during the process of producing the URI from</text:p>
      <text:p>its component parts.  This is when an implementation determines which</text:p>
      <text:p>of the reserved characters are to be used as subcomponent delimiters</text:p>
      <text:p>and which can be safely used as data.  Once produced, a URI is always</text:p>
      <text:p>in its percent-encoded form.</text:p>
      <text:p/>
      <text:p>When a URI is dereferenced, the components and subcomponents</text:p>
      <text:p>significant to the scheme-specific dereferencing process (if any)</text:p>
      <text:p>must be parsed and separated before the percent-encoded octets within</text:p>
      <text:p>those components can be safely decoded, as otherwise the data may be</text:p>
      <text:p>mistaken for component delimiters.  The only exception is for</text:p>
      <text:p>percent-encoded octets corresponding to characters in the unreserved</text:p>
      <text:p>set, which can be decoded at any time.  For example, the octet</text:p>
      <text:p>corresponding to the tilde ("~") character is often encoded as "%7E"</text:p>
      <text:p>by older URI processing implementations; the "%7E" can be replaced by</text:p>
      <text:p>"~" without changing its interpretation.</text:p>
      <text:p/>
      <text:p>Because the percent ("%") character serves as the indicator for</text:p>
      <text:p>percent-encoded octets, it must be percent-encoded as "%25" for that</text:p>
      <text:p>octet to be used as data within a URI.  Implementations must not</text:p>
      <text:p>percent-encode or decode the same string more than once, as decoding</text:p>
      <text:p>an already decoded string might lead to misinterpreting a percent</text:p>
      <text:p>data octet as the beginning of a percent-encoding, or vice versa in</text:p>
      <text:p>the case of percent-encoding an already percent-encoded string.</text:p>
      <text:p/>
      <text:h text:outline-level="2">2.5.  Identifying Data</text:h>
      <text:p/>
      <text:p>URI characters provide identifying data for each of the URI</text:p>
      <text:p>components, serving as an external interface for identification</text:p>
      <text:p>between systems.  Although the presence and nature of the URI</text:p>
      <text:p>production interface is hidden from clients that use its URIs (and is</text:p>
      <text:p>thus beyond the scope of the interoperability requirements defined by</text:p>
      <text:p>this specification), it is a frequent source of confusion and errors</text:p>
      <text:p>in the interpretation of URI character issues.  Implementers have to</text:p>
      <text:p>be aware that there are multiple character encodings involved in the</text:p>
      <text:p/>
      <text:p/>
      <text:p/>
      <text:p>Berners-Lee, et al.         Standards Track                    [Page 14]</text:p>
      <text:p/>
      <text:p/>
      <text:p>RFC 3986                   URI Generic Syntax               January 2005</text:p>
      <text:p/>
      <text:p/>
      <text:p>production and transmission of URIs: local name and data encoding,</text:p>
      <text:p>public interface encoding, URI character encoding, data format</text:p>
      <text:p>encoding, and protocol encoding.</text:p>
      <text:p/>
      <text:p>Local names, such as file system names, are stored with a local</text:p>
      <text:p>character encoding.  URI producing applications (e.g., origin</text:p>
      <text:p>servers) will typically use the local encoding as the basis for</text:p>
      <text:p>producing meaningful names.  The URI producer will transform the</text:p>
      <text:p>local encoding to one that is suitable for a public interface and</text:p>
      <text:p>then transform the public interface encoding into the restricted set</text:p>
      <text:p>of URI characters (reserved, unreserved, and percent-encodings).</text:p>
      <text:p>Those characters are, in turn, encoded as octets to be used as a</text:p>
      <text:p>reference within a data format (e.g., a document charset), and such</text:p>
      <text:p>data formats are often subsequently encoded for transmission over</text:p>
      <text:p>Internet protocols.</text:p>
      <text:p/>
      <text:p>For most systems, an unreserved character appearing within a URI</text:p>
      <text:p>component is interpreted as representing the data octet corresponding</text:p>
      <text:p>to that character's encoding in US-ASCII.  Consumers of URIs assume</text:p>
      <text:p>that the letter "X" corresponds to the octet "01011000", and even</text:p>
      <text:p>when that assumption is incorrect, there is no harm in making it.  A</text:p>
      <text:p>system that internally provides identifiers in the form of a</text:p>
      <text:p>different character encoding, such as EBCDIC, will generally perform</text:p>
      <text:p>character translation of textual identifiers to UTF-8 [STD63] (or</text:p>
      <text:p>some other superset of the US-ASCII character encoding) at an</text:p>
      <text:p>internal interface, thereby providing more meaningful identifiers</text:p>
      <text:p>than those resulting from simply percent-encoding the original</text:p>
      <text:p>octets.</text:p>
      <text:p/>
      <text:p>For example, consider an information service that provides data,</text:p>
      <text:p>stored locally using an EBCDIC-based file system, to clients on the</text:p>
      <text:p>Internet through an HTTP server.  When an author creates a file with</text:p>
      <text:p>the name "Laguna Beach" on that file system, the "http" URI</text:p>
      <text:p>corresponding to that resource is expected to contain the meaningful</text:p>
      <text:p>string "Laguna%20Beach".  If, however, that server produces URIs by</text:p>
      <text:p>using an overly simplistic raw octet mapping, then the result would</text:p>
      <text:p>be a URI containing "%D3%81%87%A4%95%81@%C2%85%81%83%88".  An</text:p>
      <text:p>internal transcoding interface fixes this problem by transcoding the</text:p>
      <text:p>local name to a superset of US-ASCII prior to producing the URI.</text:p>
      <text:p>Naturally, proper interpretation of an incoming URI on such an</text:p>
      <text:p>interface requires that percent-encoded octets be decoded (e.g.,</text:p>
      <text:p>"%20" to SP) before the reverse transcoding is applied to obtain the</text:p>
      <text:p>local name.</text:p>
      <text:p/>
      <text:p>In some cases, the internal interface between a URI component and the</text:p>
      <text:p>identifying data that it has been crafted to represent is much less</text:p>
      <text:p>direct than a character encoding translation.  For example, portions</text:p>
      <text:p>of a URI might reflect a query on non-ASCII data, or numeric</text:p>
      <text:p/>
      <text:p/>
      <text:p/>
      <text:p>Berners-Lee, et al.         Standards Track                    [Page 15]</text:p>
      <text:p/>
      <text:p/>
      <text:p>RFC 3986                   URI Generic Syntax               January 2005</text:p>
      <text:p/>
      <text:p/>
      <text:p>coordinates on a map.  Likewise, a URI scheme may define components</text:p>
      <text:p>with additional encoding requirements that are applied prior to</text:p>
      <text:p>forming the component and producing the URI.</text:p>
      <text:p/>
      <text:p>When a new URI scheme defines a component that represents textual</text:p>
      <text:p>data consisting of characters from the Universal Character Set [UCS],</text:p>
      <text:p>the data should first be encoded as octets according to the UTF-8</text:p>
      <text:p>character encoding [STD63]; then only those octets that do not</text:p>
      <text:p>correspond to characters in the unreserved set should be percent-</text:p>
      <text:p>encoded.  For example, the character A would be represented as "A",</text:p>
      <text:p>the character LATIN CAPITAL LETTER A WITH GRAVE would be represented</text:p>
      <text:p>as "%C3%80", and the character KATAKANA LETTER A would be represented</text:p>
      <text:p>as "%E3%82%A2".</text:p>
      <text:p/>
      <text:h text:outline-level="2">3.  Syntax Components</text:h>
      <text:p/>
      <text:p>The generic URI syntax consists of a hierarchical sequence of</text:p>
      <text:p>components referred to as the scheme, authority, path, query, and</text:p>
      <text:p>fragment.</text:p>
      <text:p/>
      <text:p>URI         = scheme ":" hier-part [ "?" query ] [ "#" fragment ]</text:p>
      <text:p/>
      <text:p>hier-part   = "//" authority path-abempty</text:p>
      <text:p>/ path-absolute</text:p>
      <text:p>/ path-rootless</text:p>
      <text:p>/ path-empty</text:p>
      <text:p/>
      <text:p>The scheme and path components are required, though the path may be</text:p>
      <text:p>empty (no characters).  When authority is present, the path must</text:p>
      <text:p>either be empty or begin with a slash ("/") character.  When</text:p>
      <text:p>authority is not present, the path cannot begin with two slash</text:p>
      <text:p>characters ("//").  These restrictions result in five different ABNF</text:p>
      <text:p>rules for a path (Section 3.3), only one of which will match any</text:p>
      <text:p>given URI reference.</text:p>
      <text:p/>
      <text:p>The following are two example URIs and their component parts:</text:p>
      <text:p/>
      <text:p>foo://example.com:8042/over/there?name=ferret#nose</text:p>
      <text:p>\_/   \______________/\_________/ \_________/ \__/</text:p>
      <text:p>|           |            |            |        |</text:p>
      <text:p>scheme     authority       path        query   fragment</text:p>
      <text:p>|   _____________________|__</text:p>
      <text:p>/ \ /                        \</text:p>
      <text:p>urn:example:animal:ferret:nose</text:p>
      <text:p/>
      <text:p/>
      <text:p/>
      <text:p/>
      <text:p/>
      <text:p/>
      <text:p/>
      <text:p>Berners-Lee, et al.         Standards Track                    [Page 16]</text:p>
      <text:p/>
      <text:p/>
      <text:p>RFC 3986                   URI Generic Syntax               January 2005</text:p>
      <text:p/>
      <text:p/>
      <text:h text:outline-level="2">3.1.  Scheme</text:h>
      <text:p/>
      <text:p>Each URI begins with a scheme name that refers to a specification for</text:p>
      <text:p>assigning identifiers within that scheme.  As such, the URI syntax is</text:p>
      <text:p>a federated and extensible naming system wherein each scheme's</text:p>
      <text:p>specification may further restrict the syntax and semantics of</text:p>
      <text:p>identifiers using that scheme.</text:p>
      <text:p/>
      <text:p>Scheme names consist of a sequence of characters beginning with a</text:p>
      <text:p>letter and followed by any combination of letters, digits, plus</text:p>
      <text:p>("+"), period ("."), or hyphen ("-").  Although schemes are case-</text:p>
      <text:p>insensitive, the canonical form is lowercase and documents that</text:p>
      <text:p>specify schemes must do so with lowercase letters.  An implementation</text:p>
      <text:p>should accept uppercase letters as equivalent to lowercase in scheme</text:p>
      <text:p>names (e.g., allow "HTTP" as well as "http") for the sake of</text:p>
      <text:p>robustness but should only produce lowercase scheme names for</text:p>
      <text:p>consistency.</text:p>
      <text:p/>
      <text:p>scheme      = ALPHA *( ALPHA / DIGIT / "+" / "-" / "." )</text:p>
      <text:p/>
      <text:p>Individual schemes are not specified by this document.  The process</text:p>
      <text:p>for registration of new URI schemes is defined separately by [BCP35].</text:p>
      <text:p>The scheme registry maintains the mapping between scheme names and</text:p>
      <text:p>their specifications.  Advice for designers of new URI schemes can be</text:p>
      <text:p>found in [RFC2718].  URI scheme specifications must define their own</text:p>
      <text:p>syntax so that all strings matching their scheme-specific syntax will</text:p>
      <text:p>also match the &lt;absolute-URI&gt; grammar, as described in Section 4.3.</text:p>
      <text:p/>
      <text:p>When presented with a URI that violates one or more scheme-specific</text:p>
      <text:p>restrictions, the scheme-specific resolution process should flag the</text:p>
      <text:p>reference as an error rather than ignore the unused parts; doing so</text:p>
      <text:p>reduces the number of equivalent URIs and helps detect abuses of the</text:p>
      <text:p>generic syntax, which might indicate that the URI has been</text:p>
      <text:p>constructed to mislead the user (Section 7.6).</text:p>
      <text:p/>
      <text:h text:outline-level="2">3.2.  Authority</text:h>
      <text:p/>
      <text:p>Many URI schemes include a hierarchical element for a naming</text:p>
      <text:p>authority so that governance of the name space defined by the</text:p>
      <text:p>remainder of the URI is delegated to that authority (which may, in</text:p>
      <text:p>turn, delegate it further).  The generic syntax provides a common</text:p>
      <text:p>means for distinguishing an authority based on a registered name or</text:p>
      <text:p>server address, along with optional port and user information.</text:p>
      <text:p/>
      <text:p>The authority component is preceded by a double slash ("//") and is</text:p>
      <text:p>terminated by the next slash ("/"), question mark ("?"), or number</text:p>
      <text:p>sign ("#") character, or by the end of the URI.</text:p>
      <text:p/>
      <text:p/>
      <text:p/>
      <text:p/>
      <text:p>Berners-Lee, et al.         Standards Track                    [Page 17]</text:p>
      <text:p/>
      <text:p/>
      <text:p>RFC 3986                   URI Generic Syntax               January 2005</text:p>
      <text:p/>
      <text:p/>
      <text:p>authority   = [ userinfo "@" ] host [ ":" port ]</text:p>
      <text:p/>
      <text:p>URI producers and normalizers should omit the ":" delimiter that</text:p>
      <text:p>separates host from port if the port component is empty.  Some</text:p>
      <text:p>schemes do not allow the userinfo and/or port subcomponents.</text:p>
      <text:p/>
      <text:p>If a URI contains an authority component, then the path component</text:p>
      <text:p>must either be empty or begin with a slash ("/") character.  Non-</text:p>
      <text:p>validating parsers (those that merely separate a URI reference into</text:p>
      <text:p>its major components) will often ignore the subcomponent structure of</text:p>
      <text:p>authority, treating it as an opaque string from the double-slash to</text:p>
      <text:p>the first terminating delimiter, until such time as the URI is</text:p>
      <text:p>dereferenced.</text:p>
      <text:p/>
      <text:h text:outline-level="2">3.2.1.  User Information</text:h>
      <text:p/>
      <text:p>The userinfo subcomponent may consist of a user name and, optionally,</text:p>
      <text:p>scheme-specific information about how to gain authorization to access</text:p>
      <text:p>the resource.  The user information, if present, is followed by a</text:p>
      <text:p>commercial at-sign ("@") that delimits it from the host.</text:p>
      <text:p/>
      <text:p>userinfo    = *( unreserved / pct-encoded / sub-delims / ":" )</text:p>
      <text:p/>
      <text:p>Use of the format "user:password" in the userinfo field is</text:p>
      <text:p>deprecated.  Applications should not render as clear text any data</text:p>
      <text:p>after the first colon (":") character found within a userinfo</text:p>
      <text:p>subcomponent unless the data after the colon is the empty string</text:p>
      <text:p>(indicating no password).  Applications may choose to ignore or</text:p>
      <text:p>reject such data when it is received as part of a reference and</text:p>
      <text:p>should reject the storage of such data in unencrypted form.  The</text:p>
      <text:p>passing of authentication information in clear text has proven to be</text:p>
      <text:p>a security risk in almost every case where it has been used.</text:p>
      <text:p/>
      <text:p>Applications that render a URI for the sake of user feedback, such as</text:p>
      <text:p>in graphical hypertext browsing, should render userinfo in a way that</text:p>
      <text:p>is distinguished from the rest of a URI, when feasible.  Such</text:p>
      <text:p>rendering will assist the user in cases where the userinfo has been</text:p>
      <text:p>misleadingly crafted to look like a trusted domain name</text:p>
      <text:p>(Section 7.6).</text:p>
      <text:p/>
      <text:h text:outline-level="2">3.2.2.  Host</text:h>
      <text:p/>
      <text:p>The host subcomponent of authority is identified by an IP literal</text:p>
      <text:p>encapsulated within square brackets, an IPv4 address in dotted-</text:p>
      <text:p>decimal form, or a registered name.  The host subcomponent is case-</text:p>
      <text:p>insensitive.  The presence of a host subcomponent within a URI does</text:p>
      <text:p>not imply that the scheme requires access to the given host on the</text:p>
      <text:p>Internet.  In many cases, the host syntax is used only for the sake</text:p>
      <text:p/>
      <text:p/>
      <text:p/>
      <text:p>Berners-Lee, et al.         Standards Track                    [Page 18]</text:p>
      <text:p/>
      <text:p/>
      <text:p>RFC 3986                   URI Generic Syntax               January 2005</text:p>
      <text:p/>
      <text:p/>
      <text:p>of reusing the existing registration process created and deployed for</text:p>
      <text:p>DNS, thus obtaining a globally unique name without the cost of</text:p>
      <text:p>deploying another registry.  However, such use comes with its own</text:p>
      <text:p>costs: domain name ownership may change over time for reasons not</text:p>
      <text:p>anticipated by the URI producer.  In other cases, the data within the</text:p>
      <text:p>host component identifies a registered name that has nothing to do</text:p>
      <text:p>with an Internet host.  We use the name "host" for the ABNF rule</text:p>
      <text:p>because that is its most common purpose, not its only purpose.</text:p>
      <text:p/>
      <text:p>host        = IP-literal / IPv4address / reg-name</text:p>
      <text:p/>
      <text:p>The syntax rule for host is ambiguous because it does not completely</text:p>
      <text:p>distinguish between an IPv4address and a reg-name.  In order to</text:p>
      <text:p>disambiguate the syntax, we apply the "first-match-wins" algorithm:</text:p>
      <text:p>If host matches the rule for IPv4address, then it should be</text:p>
      <text:p>considered an IPv4 address literal and not a reg-name.  Although host</text:p>
      <text:p>is case-insensitive, producers and normalizers should use lowercase</text:p>
      <text:p>for registered names and hexadecimal addresses for the sake of</text:p>
      <text:p>uniformity, while only using uppercase letters for percent-encodings.</text:p>
      <text:p/>
      <text:p>A host identified by an Internet Protocol literal address, version 6</text:p>
      <text:p>[RFC3513] or later, is distinguished by enclosing the IP literal</text:p>
      <text:p>within square brackets ("[" and "]").  This is the only place where</text:p>
      <text:p>square bracket characters are allowed in the URI syntax.  In</text:p>
      <text:p>anticipation of future, as-yet-undefined IP literal address formats,</text:p>
      <text:p>an implementation may use an optional version flag to indicate such a</text:p>
      <text:p>format explicitly rather than rely on heuristic determination.</text:p>
      <text:p/>
      <text:p>IP-literal = "[" ( IPv6address / IPvFuture  ) "]"</text:p>
      <text:p/>
      <text:p>IPvFuture  = "v" 1*HEXDIG "." 1*( unreserved / sub-delims / ":" )</text:p>
      <text:p/>
      <text:p>The version flag does not indicate the IP version; rather, it</text:p>
      <text:p>indicates future versions of the literal format.  As such,</text:p>
      <text:p>implementations must not provide the version flag for the existing</text:p>
      <text:p>IPv4 and IPv6 literal address forms described below.  If a URI</text:p>
      <text:p>containing an IP-literal that starts with "v" (case-insensitive),</text:p>
      <text:p>indicating that the version flag is present, is dereferenced by an</text:p>
      <text:p>application that does not know the meaning of that version flag, then</text:p>
      <text:p>the application should return an appropriate error for "address</text:p>
      <text:p>mechanism not supported".</text:p>
      <text:p/>
      <text:p>A host identified by an IPv6 literal address is represented inside</text:p>
      <text:p>the square brackets without a preceding version flag.  The ABNF</text:p>
      <text:p>provided here is a translation of the text definition of an IPv6</text:p>
      <text:p>literal address provided in [RFC3513].  This syntax does not support</text:p>
      <text:p>IPv6 scoped addressing zone identifiers.</text:p>
      <text:p/>
      <text:p/>
      <text:p/>
      <text:p/>
      <text:p>Berners-Lee, et al.         Standards Track                    [Page 19]</text:p>
      <text:p/>
      <text:p/>
      <text:p>RFC 3986                   URI Generic Syntax               January 2005</text:p>
      <text:p/>
      <text:p/>
      <text:p>A 128-bit IPv6 address is divided into eight 16-bit pieces.  Each</text:p>
      <text:p>piece is represented numerically in case-insensitive hexadecimal,</text:p>
      <text:p>using one to four hexadecimal digits (leading zeroes are permitted).</text:p>
      <text:p>The eight encoded pieces are given most-significant first, separated</text:p>
      <text:p>by colon characters.  Optionally, the least-significant two pieces</text:p>
      <text:p>may instead be represented in IPv4 address textual format.  A</text:p>
      <text:p>sequence of one or more consecutive zero-valued 16-bit pieces within</text:p>
      <text:p>the address may be elided, omitting all their digits and leaving</text:p>
      <text:p>exactly two consecutive colons in their place to mark the elision.</text:p>
      <text:p/>
      <text:p>IPv6address =                            6( h16 ":" ) ls32</text:p>
      <text:p>/                       "::" 5( h16 ":" ) ls32</text:p>
      <text:p>/ [               h16 ] "::" 4( h16 ":" ) ls32</text:p>
      <text:p>/ [ *1( h16 ":" ) h16 ] "::" 3( h16 ":" ) ls32</text:p>
      <text:p>/ [ *2( h16 ":" ) h16 ] "::" 2( h16 ":" ) ls32</text:p>
      <text:p>/ [ *3( h16 ":" ) h16 ] "::"    h16 ":"   ls32</text:p>
      <text:p>/ [ *4( h16 ":" ) h16 ] "::"              ls32</text:p>
      <text:p>/ [ *5( h16 ":" ) h16 ] "::"              h16</text:p>
      <text:p>/ [ *6( h16 ":" ) h16 ] "::"</text:p>
      <text:p/>
      <text:p>ls32        = ( h16 ":" h16 ) / IPv4address</text:p>
      <text:p>; least-significant 32 bits of address</text:p>
      <text:p/>
      <text:p>h16         = 1*4HEXDIG</text:p>
      <text:p>; 16 bits of address represented in hexadecimal</text:p>
      <text:p/>
      <text:p>A host identified by an IPv4 literal address is represented in</text:p>
      <text:p>dotted-decimal notation (a sequence of four decimal numbers in the</text:p>
      <text:p>range 0 to 255, separated by "."), as described in [RFC1123] by</text:p>
      <text:p>reference to [RFC0952].  Note that other forms of dotted notation may</text:p>
      <text:p>be interpreted on some platforms, as described in Section 7.4, but</text:p>
      <text:p>only the dotted-decimal form of four octets is allowed by this</text:p>
      <text:p>grammar.</text:p>
      <text:p/>
      <text:p>IPv4address = dec-octet "." dec-octet "." dec-octet "." dec-octet</text:p>
      <text:p/>
      <text:p>dec-octet   = DIGIT                 ; 0-9</text:p>
      <text:p>/ %x31-39 DIGIT         ; 10-99</text:p>
      <text:p>/ "1" 2DIGIT            ; 100-199</text:p>
      <text:p>/ "2" %x30-34 DIGIT     ; 200-249</text:p>
      <text:p>/ "25" %x30-35          ; 250-255</text:p>
      <text:p/>
      <text:p>A host identified by a registered name is a sequence of characters</text:p>
      <text:p>usually intended for lookup within a locally defined host or service</text:p>
      <text:p>name registry, though the URI's scheme-specific semantics may require</text:p>
      <text:p>that a specific registry (or fixed name table) be used instead.  The</text:p>
      <text:p>most common name registry mechanism is the Domain Name System (DNS).</text:p>
      <text:p>A registered name intended for lookup in the DNS uses the syntax</text:p>
      <text:p/>
      <text:p/>
      <text:p/>
      <text:p>Berners-Lee, et al.         Standards Track                    [Page 20]</text:p>
      <text:p/>
      <text:p/>
      <text:p>RFC 3986                   URI Generic Syntax               January 2005</text:p>
      <text:p/>
      <text:p/>
      <text:p>defined in Section 3.5 of [RFC1034] and Section 2.1 of [RFC1123].</text:p>
      <text:p>Such a name consists of a sequence of domain labels separated by ".",</text:p>
      <text:p>each domain label starting and ending with an alphanumeric character</text:p>
      <text:p>and possibly also containing "-" characters.  The rightmost domain</text:p>
      <text:p>label of a fully qualified domain name in DNS may be followed by a</text:p>
      <text:p>single "." and should be if it is necessary to distinguish between</text:p>
      <text:p>the complete domain name and some local domain.</text:p>
      <text:p/>
      <text:p>reg-name    = *( unreserved / pct-encoded / sub-delims )</text:p>
      <text:p/>
      <text:p>If the URI scheme defines a default for host, then that default</text:p>
      <text:p>applies when the host subcomponent is undefined or when the</text:p>
      <text:p>registered name is empty (zero length).  For example, the "file" URI</text:p>
      <text:p>scheme is defined so that no authority, an empty host, and</text:p>
      <text:p>"localhost" all mean the end-user's machine, whereas the "http"</text:p>
      <text:p>scheme considers a missing authority or empty host invalid.</text:p>
      <text:p/>
      <text:p>This specification does not mandate a particular registered name</text:p>
      <text:p>lookup technology and therefore does not restrict the syntax of reg-</text:p>
      <text:p>name beyond what is necessary for interoperability.  Instead, it</text:p>
      <text:p>delegates the issue of registered name syntax conformance to the</text:p>
      <text:p>operating system of each application performing URI resolution, and</text:p>
      <text:p>that operating system decides what it will allow for the purpose of</text:p>
      <text:p>host identification.  A URI resolution implementation might use DNS,</text:p>
      <text:p>host tables, yellow pages, NetInfo, WINS, or any other system for</text:p>
      <text:p>lookup of registered names.  However, a globally scoped naming</text:p>
      <text:p>system, such as DNS fully qualified domain names, is necessary for</text:p>
      <text:p>URIs intended to have global scope.  URI producers should use names</text:p>
      <text:p>that conform to the DNS syntax, even when use of DNS is not</text:p>
      <text:p>immediately apparent, and should limit these names to no more than</text:p>
      <text:h text:outline-level="2">255 characters in length.</text:h>
      <text:p/>
      <text:p>The reg-name syntax allows percent-encoded octets in order to</text:p>
      <text:p>represent non-ASCII registered names in a uniform way that is</text:p>
      <text:p>independent of the underlying name resolution technology.  Non-ASCII</text:p>
      <text:p>characters must first be encoded according to UTF-8 [STD63], and then</text:p>
      <text:p>each octet of the corresponding UTF-8 sequence must be percent-</text:p>
      <text:p>encoded to be represented as URI characters.  URI producing</text:p>
      <text:p>applications must not use percent-encoding in host unless it is used</text:p>
      <text:p>to represent a UTF-8 character sequence.  When a non-ASCII registered</text:p>
      <text:p>name represents an internationalized domain name intended for</text:p>
      <text:p>resolution via the DNS, the name must be transformed to the IDNA</text:p>
      <text:p>encoding [RFC3490] prior to name lookup.  URI producers should</text:p>
      <text:p>provide these registered names in the IDNA encoding, rather than a</text:p>
      <text:p>percent-encoding, if they wish to maximize interoperability with</text:p>
      <text:p>legacy URI resolvers.</text:p>
      <text:p/>
      <text:p/>
      <text:p/>
      <text:p/>
      <text:p/>
      <text:p>Berners-Lee, et al.         Standards Track                    [Page 21]</text:p>
      <text:p/>
      <text:p/>
      <text:p>RFC 3986                   URI Generic Syntax               January 2005</text:p>
      <text:p/>
      <text:p/>
      <text:h text:outline-level="2">3.2.3.  Port</text:h>
      <text:p/>
      <text:p>The port subcomponent of authority is designated by an optional port</text:p>
      <text:p>number in decimal following the host and delimited from it by a</text:p>
      <text:p>single colon (":") character.</text:p>
      <text:p/>
      <text:p>port        = *DIGIT</text:p>
      <text:p/>
      <text:p>A scheme may define a default port.  For example, the "http" scheme</text:p>
      <text:p>defines a default port of "80", corresponding to its reserved TCP</text:p>
      <text:p>port number.  The type of port designated by the port number (e.g.,</text:p>
      <text:p>TCP, UDP, SCTP) is defined by the URI scheme.  URI producers and</text:p>
      <text:p>normalizers should omit the port component and its ":" delimiter if</text:p>
      <text:p>port is empty or if its value would be the same as that of the</text:p>
      <text:p>scheme's default.</text:p>
      <text:p/>
      <text:h text:outline-level="2">3.3.  Path</text:h>
      <text:p/>
      <text:p>The path component contains data, usually organized in hierarchical</text:p>
      <text:p>form, that, along with data in the non-hierarchical query component</text:p>
      <text:p>(Section 3.4), serves to identify a resource within the scope of the</text:p>
      <text:p>URI's scheme and naming authority (if any).  The path is terminated</text:p>
      <text:p>by the first question mark ("?") or number sign ("#") character, or</text:p>
      <text:p>by the end of the URI.</text:p>
      <text:p/>
      <text:p>If a URI contains an authority component, then the path component</text:p>
      <text:p>must either be empty or begin with a slash ("/") character.  If a URI</text:p>
      <text:p>does not contain an authority component, then the path cannot begin</text:p>
      <text:p>with two slash characters ("//").  In addition, a URI reference</text:p>
      <text:p>(Section 4.1) may be a relative-path reference, in which case the</text:p>
      <text:p>first path segment cannot contain a colon (":") character.  The ABNF</text:p>
      <text:p>requires five separate rules to disambiguate these cases, only one of</text:p>
      <text:p>which will match the path substring within a given URI reference.  We</text:p>
      <text:p>use the generic term "path component" to describe the URI substring</text:p>
      <text:p>matched by the parser to one of these rules.</text:p>
      <text:p/>
      <text:p>path          = path-abempty    ; begins with "/" or is empty</text:p>
      <text:p>/ path-absolute   ; begins with "/" but not "//"</text:p>
      <text:p>/ path-noscheme   ; begins with a non-colon segment</text:p>
      <text:p>/ path-rootless   ; begins with a segment</text:p>
      <text:p>/ path-empty      ; zero characters</text:p>
      <text:p/>
      <text:p>path-abempty  = *( "/" segment )</text:p>
      <text:p>path-absolute = "/" [ segment-nz *( "/" segment ) ]</text:p>
      <text:p>path-noscheme = segment-nz-nc *( "/" segment )</text:p>
      <text:p>path-rootless = segment-nz *( "/" segment )</text:p>
      <text:p>path-empty    = 0&lt;pchar&gt;</text:p>
      <text:p/>
      <text:p/>
      <text:p/>
      <text:p/>
      <text:p>Berners-Lee, et al.         Standards Track                    [Page 22]</text:p>
      <text:p/>
      <text:p/>
      <text:p>RFC 3986                   URI Generic Syntax               January 2005</text:p>
      <text:p/>
      <text:p/>
      <text:p>segment       = *pchar</text:p>
      <text:p>segment-nz    = 1*pchar</text:p>
      <text:p>segment-nz-nc = 1*( unreserved / pct-encoded / sub-delims / "@" )</text:p>
      <text:p>; non-zero-length segment without any colon ":"</text:p>
      <text:p/>
      <text:p>pchar         = unreserved / pct-encoded / sub-delims / ":" / "@"</text:p>
      <text:p/>
      <text:p>A path consists of a sequence of path segments separated by a slash</text:p>
      <text:p>("/") character.  A path is always defined for a URI, though the</text:p>
      <text:p>defined path may be empty (zero length).  Use of the slash character</text:p>
      <text:p>to indicate hierarchy is only required when a URI will be used as the</text:p>
      <text:p>context for relative references.  For example, the URI</text:p>
      <text:p>&lt;mailto:fred@example.com&gt; has a path of "fred@example.com", whereas</text:p>
      <text:p>the URI &lt;foo://info.example.com?fred&gt; has an empty path.</text:p>
      <text:p/>
      <text:p>The path segments "." and "..", also known as dot-segments, are</text:p>
      <text:p>defined for relative reference within the path name hierarchy.  They</text:p>
      <text:p>are intended for use at the beginning of a relative-path reference</text:p>
      <text:p>(Section 4.2) to indicate relative position within the hierarchical</text:p>
      <text:p>tree of names.  This is similar to their role within some operating</text:p>
      <text:p>systems' file directory structures to indicate the current directory</text:p>
      <text:p>and parent directory, respectively.  However, unlike in a file</text:p>
      <text:p>system, these dot-segments are only interpreted within the URI path</text:p>
      <text:p>hierarchy and are removed as part of the resolution process (Section</text:p>
      <text:p>5.2).</text:p>
      <text:p/>
      <text:p>Aside from dot-segments in hierarchical paths, a path segment is</text:p>
      <text:p>considered opaque by the generic syntax.  URI producing applications</text:p>
      <text:p>often use the reserved characters allowed in a segment to delimit</text:p>
      <text:p>scheme-specific or dereference-handler-specific subcomponents.  For</text:p>
      <text:p>example, the semicolon (";") and equals ("=") reserved characters are</text:p>
      <text:p>often used to delimit parameters and parameter values applicable to</text:p>
      <text:p>that segment.  The comma (",") reserved character is often used for</text:p>
      <text:p>similar purposes.  For example, one URI producer might use a segment</text:p>
      <text:p>such as "name;v=1.1" to indicate a reference to version 1.1 of</text:p>
      <text:p>"name", whereas another might use a segment such as "name,1.1" to</text:p>
      <text:p>indicate the same.  Parameter types may be defined by scheme-specific</text:p>
      <text:p>semantics, but in most cases the syntax of a parameter is specific to</text:p>
      <text:p>the implementation of the URI's dereferencing algorithm.</text:p>
      <text:p/>
      <text:h text:outline-level="2">3.4.  Query</text:h>
      <text:p/>
      <text:p>The query component contains non-hierarchical data that, along with</text:p>
      <text:p>data in the path component (Section 3.3), serves to identify a</text:p>
      <text:p>resource within the scope of the URI's scheme and naming authority</text:p>
      <text:p>(if any).  The query component is indicated by the first question</text:p>
      <text:p>mark ("?") character and terminated by a number sign ("#") character</text:p>
      <text:p>or by the end of the URI.</text:p>
      <text:p/>
      <text:p/>
      <text:p/>
      <text:p>Berners-Lee, et al.         Standards Track                    [Page 23]</text:p>
      <text:p/>
      <text:p/>
      <text:p>RFC 3986                   URI Generic Syntax               January 2005</text:p>
      <text:p/>
      <text:p/>
      <text:p>query       = *( pchar / "/" / "?" )</text:p>
      <text:p/>
      <text:p>The characters slash ("/") and question mark ("?") may represent data</text:p>
      <text:p>within the query component.  Beware that some older, erroneous</text:p>
      <text:p>implementations may not handle such data correctly when it is used as</text:p>
      <text:p>the base URI for relative references (Section 5.1), apparently</text:p>
      <text:p>because they fail to distinguish query data from path data when</text:p>
      <text:p>looking for hierarchical separators.  However, as query components</text:p>
      <text:p>are often used to carry identifying information in the form of</text:p>
      <text:p>"key=value" pairs and one frequently used value is a reference to</text:p>
      <text:p>another URI, it is sometimes better for usability to avoid percent-</text:p>
      <text:p>encoding those characters.</text:p>
      <text:p/>
      <text:h text:outline-level="2">3.5.  Fragment</text:h>
      <text:p/>
      <text:p>The fragment identifier component of a URI allows indirect</text:p>
      <text:p>identification of a secondary resource by reference to a primary</text:p>
      <text:p>resource and additional identifying information.  The identified</text:p>
      <text:p>secondary resource may be some portion or subset of the primary</text:p>
      <text:p>resource, some view on representations of the primary resource, or</text:p>
      <text:p>some other resource defined or described by those representations.  A</text:p>
      <text:p>fragment identifier component is indicated by the presence of a</text:p>
      <text:p>number sign ("#") character and terminated by the end of the URI.</text:p>
      <text:p/>
      <text:p>fragment    = *( pchar / "/" / "?" )</text:p>
      <text:p/>
      <text:p>The semantics of a fragment identifier are defined by the set of</text:p>
      <text:p>representations that might result from a retrieval action on the</text:p>
      <text:p>primary resource.  The fragment's format and resolution is therefore</text:p>
      <text:p>dependent on the media type [RFC2046] of a potentially retrieved</text:p>
      <text:p>representation, even though such a retrieval is only performed if the</text:p>
      <text:p>URI is dereferenced.  If no such representation exists, then the</text:p>
      <text:p>semantics of the fragment are considered unknown and are effectively</text:p>
      <text:p>unconstrained.  Fragment identifier semantics are independent of the</text:p>
      <text:p>URI scheme and thus cannot be redefined by scheme specifications.</text:p>
      <text:p/>
      <text:p>Individual media types may define their own restrictions on or</text:p>
      <text:p>structures within the fragment identifier syntax for specifying</text:p>
      <text:p>different types of subsets, views, or external references that are</text:p>
      <text:p>identifiable as secondary resources by that media type.  If the</text:p>
      <text:p>primary resource has multiple representations, as is often the case</text:p>
      <text:p>for resources whose representation is selected based on attributes of</text:p>
      <text:p>the retrieval request (a.k.a., content negotiation), then whatever is</text:p>
      <text:p>identified by the fragment should be consistent across all of those</text:p>
      <text:p>representations.  Each representation should either define the</text:p>
      <text:p>fragment so that it corresponds to the same secondary resource,</text:p>
      <text:p>regardless of how it is represented, or should leave the fragment</text:p>
      <text:p>undefined (i.e., not found).</text:p>
      <text:p/>
      <text:p/>
      <text:p/>
      <text:p>Berners-Lee, et al.         Standards Track                    [Page 24]</text:p>
      <text:p/>
      <text:p/>
      <text:p>RFC 3986                   URI Generic Syntax               January 2005</text:p>
      <text:p/>
      <text:p/>
      <text:p>As with any URI, use of a fragment identifier component does not</text:p>
      <text:p>imply that a retrieval action will take place.  A URI with a fragment</text:p>
      <text:p>identifier may be used to refer to the secondary resource without any</text:p>
      <text:p>implication that the primary resource is accessible or will ever be</text:p>
      <text:p>accessed.</text:p>
      <text:p/>
      <text:p>Fragment identifiers have a special role in information retrieval</text:p>
      <text:p>systems as the primary form of client-side indirect referencing,</text:p>
      <text:p>allowing an author to specifically identify aspects of an existing</text:p>
      <text:p>resource that are only indirectly provided by the resource owner.  As</text:p>
      <text:p>such, the fragment identifier is not used in the scheme-specific</text:p>
      <text:p>processing of a URI; instead, the fragment identifier is separated</text:p>
      <text:p>from the rest of the URI prior to a dereference, and thus the</text:p>
      <text:p>identifying information within the fragment itself is dereferenced</text:p>
      <text:p>solely by the user agent, regardless of the URI scheme.  Although</text:p>
      <text:p>this separate handling is often perceived to be a loss of</text:p>
      <text:p>information, particularly for accurate redirection of references as</text:p>
      <text:p>resources move over time, it also serves to prevent information</text:p>
      <text:p>providers from denying reference authors the right to refer to</text:p>
      <text:p>information within a resource selectively.  Indirect referencing also</text:p>
      <text:p>provides additional flexibility and extensibility to systems that use</text:p>
      <text:p>URIs, as new media types are easier to define and deploy than new</text:p>
      <text:p>schemes of identification.</text:p>
      <text:p/>
      <text:p>The characters slash ("/") and question mark ("?") are allowed to</text:p>
      <text:p>represent data within the fragment identifier.  Beware that some</text:p>
      <text:p>older, erroneous implementations may not handle this data correctly</text:p>
      <text:p>when it is used as the base URI for relative references (Section</text:p>
      <text:p>5.1).</text:p>
      <text:p/>
      <text:h text:outline-level="2">4.  Usage</text:h>
      <text:p/>
      <text:p>When applications make reference to a URI, they do not always use the</text:p>
      <text:p>full form of reference defined by the "URI" syntax rule.  To save</text:p>
      <text:p>space and take advantage of hierarchical locality, many Internet</text:p>
      <text:p>protocol elements and media type formats allow an abbreviation of a</text:p>
      <text:p>URI, whereas others restrict the syntax to a particular form of URI.</text:p>
      <text:p>We define the most common forms of reference syntax in this</text:p>
      <text:p>specification because they impact and depend upon the design of the</text:p>
      <text:p>generic syntax, requiring a uniform parsing algorithm in order to be</text:p>
      <text:p>interpreted consistently.</text:p>
      <text:p/>
      <text:h text:outline-level="2">4.1.  URI Reference</text:h>
      <text:p/>
      <text:p>URI-reference is used to denote the most common usage of a resource</text:p>
      <text:p>identifier.</text:p>
      <text:p/>
      <text:p>URI-reference = URI / relative-ref</text:p>
      <text:p/>
      <text:p/>
      <text:p/>
      <text:p>Berners-Lee, et al.         Standards Track                    [Page 25]</text:p>
      <text:p/>
      <text:p/>
      <text:p>RFC 3986                   URI Generic Syntax               January 2005</text:p>
      <text:p/>
      <text:p/>
      <text:p>A URI-reference is either a URI or a relative reference.  If the</text:p>
      <text:p>URI-reference's prefix does not match the syntax of a scheme followed</text:p>
      <text:p>by its colon separator, then the URI-reference is a relative</text:p>
      <text:p>reference.</text:p>
      <text:p/>
      <text:p>A URI-reference is typically parsed first into the five URI</text:p>
      <text:p>components, in order to determine what components are present and</text:p>
      <text:p>whether the reference is relative.  Then, each component is parsed</text:p>
      <text:p>for its subparts and their validation.  The ABNF of URI-reference,</text:p>
      <text:p>along with the "first-match-wins" disambiguation rule, is sufficient</text:p>
      <text:p>to define a validating parser for the generic syntax.  Readers</text:p>
      <text:p>familiar with regular expressions should see Appendix B for an</text:p>
      <text:p>example of a non-validating URI-reference parser that will take any</text:p>
      <text:p>given string and extract the URI components.</text:p>
      <text:p/>
      <text:h text:outline-level="2">4.2.  Relative Reference</text:h>
      <text:p/>
      <text:p>A relative reference takes advantage of the hierarchical syntax</text:p>
      <text:p>(Section 1.2.3) to express a URI reference relative to the name space</text:p>
      <text:p>of another hierarchical URI.</text:p>
      <text:p/>
      <text:p>relative-ref  = relative-part [ "?" query ] [ "#" fragment ]</text:p>
      <text:p/>
      <text:p>relative-part = "//" authority path-abempty</text:p>
      <text:p>/ path-absolute</text:p>
      <text:p>/ path-noscheme</text:p>
      <text:p>/ path-empty</text:p>
      <text:p/>
      <text:p>The URI referred to by a relative reference, also known as the target</text:p>
      <text:p>URI, is obtained by applying the reference resolution algorithm of</text:p>
      <text:p>Section 5.</text:p>
      <text:p/>
      <text:p>A relative reference that begins with two slash characters is termed</text:p>
      <text:p>a network-path reference; such references are rarely used.  A</text:p>
      <text:p>relative reference that begins with a single slash character is</text:p>
      <text:p>termed an absolute-path reference.  A relative reference that does</text:p>
      <text:p>not begin with a slash character is termed a relative-path reference.</text:p>
      <text:p/>
      <text:p>A path segment that contains a colon character (e.g., "this:that")</text:p>
      <text:p>cannot be used as the first segment of a relative-path reference, as</text:p>
      <text:p>it would be mistaken for a scheme name.  Such a segment must be</text:p>
      <text:p>preceded by a dot-segment (e.g., "./this:that") to make a relative-</text:p>
      <text:p>path reference.</text:p>
      <text:p/>
      <text:p/>
      <text:p/>
      <text:p/>
      <text:p/>
      <text:p/>
      <text:p/>
      <text:p/>
      <text:p>Berners-Lee, et al.         Standards Track                    [Page 26]</text:p>
      <text:p/>
      <text:p/>
      <text:p>RFC 3986                   URI Generic Syntax               January 2005</text:p>
      <text:p/>
      <text:p/>
      <text:h text:outline-level="2">4.3.  Absolute URI</text:h>
      <text:p/>
      <text:p>Some protocol elements allow only the absolute form of a URI without</text:p>
      <text:p>a fragment identifier.  For example, defining a base URI for later</text:p>
      <text:p>use by relative references calls for an absolute-URI syntax rule that</text:p>
      <text:p>does not allow a fragment.</text:p>
      <text:p/>
      <text:p>absolute-URI  = scheme ":" hier-part [ "?" query ]</text:p>
      <text:p/>
      <text:p>URI scheme specifications must define their own syntax so that all</text:p>
      <text:p>strings matching their scheme-specific syntax will also match the</text:p>
      <text:p>&lt;absolute-URI&gt; grammar.  Scheme specifications will not define</text:p>
      <text:p>fragment identifier syntax or usage, regardless of its applicability</text:p>
      <text:p>to resources identifiable via that scheme, as fragment identification</text:p>
      <text:p>is orthogonal to scheme definition.  However, scheme specifications</text:p>
      <text:p>are encouraged to include a wide range of examples, including</text:p>
      <text:p>examples that show use of the scheme's URIs with fragment identifiers</text:p>
      <text:p>when such usage is appropriate.</text:p>
      <text:p/>
      <text:h text:outline-level="2">4.4.  Same-Document Reference</text:h>
      <text:p/>
      <text:p>When a URI reference refers to a URI that is, aside from its fragment</text:p>
      <text:p>component (if any), identical to the base URI (Section 5.1), that</text:p>
      <text:p>reference is called a "same-document" reference.  The most frequent</text:p>
      <text:p>examples of same-document references are relative references that are</text:p>
      <text:p>empty or include only the number sign ("#") separator followed by a</text:p>
      <text:p>fragment identifier.</text:p>
      <text:p/>
      <text:p>When a same-document reference is dereferenced for a retrieval</text:p>
      <text:p>action, the target of that reference is defined to be within the same</text:p>
      <text:p>entity (representation, document, or message) as the reference;</text:p>
      <text:p>therefore, a dereference should not result in a new retrieval action.</text:p>
      <text:p/>
      <text:p>Normalization of the base and target URIs prior to their comparison,</text:p>
      <text:p>as described in Sections 6.2.2 and 6.2.3, is allowed but rarely</text:p>
      <text:p>performed in practice.  Normalization may increase the set of same-</text:p>
      <text:p>document references, which may be of benefit to some caching</text:p>
      <text:p>applications.  As such, reference authors should not assume that a</text:p>
      <text:p>slightly different, though equivalent, reference URI will (or will</text:p>
      <text:p>not) be interpreted as a same-document reference by any given</text:p>
      <text:p>application.</text:p>
      <text:p/>
      <text:h text:outline-level="2">4.5.  Suffix Reference</text:h>
      <text:p/>
      <text:p>The URI syntax is designed for unambiguous reference to resources and</text:p>
      <text:p>extensibility via the URI scheme.  However, as URI identification and</text:p>
      <text:p>usage have become commonplace, traditional media (television, radio,</text:p>
      <text:p>newspapers, billboards, etc.) have increasingly used a suffix of the</text:p>
      <text:p/>
      <text:p/>
      <text:p/>
      <text:p>Berners-Lee, et al.         Standards Track                    [Page 27]</text:p>
      <text:p/>
      <text:p/>
      <text:p>RFC 3986                   URI Generic Syntax               January 2005</text:p>
      <text:p/>
      <text:p/>
      <text:p>URI as a reference, consisting of only the authority and path</text:p>
      <text:p>portions of the URI, such as</text:p>
      <text:p/>
      <text:p>www.w3.org/Addressing/</text:p>
      <text:p/>
      <text:p>or simply a DNS registered name on its own.  Such references are</text:p>
      <text:p>primarily intended for human interpretation rather than for machines,</text:p>
      <text:p>with the assumption that context-based heuristics are sufficient to</text:p>
      <text:p>complete the URI (e.g., most registered names beginning with "www"</text:p>
      <text:p>are likely to have a URI prefix of "http://").  Although there is no</text:p>
      <text:p>standard set of heuristics for disambiguating a URI suffix, many</text:p>
      <text:p>client implementations allow them to be entered by the user and</text:p>
      <text:p>heuristically resolved.</text:p>
      <text:p/>
      <text:p>Although this practice of using suffix references is common, it</text:p>
      <text:p>should be avoided whenever possible and should never be used in</text:p>
      <text:p>situations where long-term references are expected.  The heuristics</text:p>
      <text:p>noted above will change over time, particularly when a new URI scheme</text:p>
      <text:p>becomes popular, and are often incorrect when used out of context.</text:p>
      <text:p>Furthermore, they can lead to security issues along the lines of</text:p>
      <text:p>those described in [RFC1535].</text:p>
      <text:p/>
      <text:p>As a URI suffix has the same syntax as a relative-path reference, a</text:p>
      <text:p>suffix reference cannot be used in contexts where a relative</text:p>
      <text:p>reference is expected.  As a result, suffix references are limited to</text:p>
      <text:p>places where there is no defined base URI, such as dialog boxes and</text:p>
      <text:p>off-line advertisements.</text:p>
      <text:p/>
      <text:h text:outline-level="2">5.  Reference Resolution</text:h>
      <text:p/>
      <text:p>This section defines the process of resolving a URI reference within</text:p>
      <text:p>a context that allows relative references so that the result is a</text:p>
      <text:p>string matching the &lt;URI&gt; syntax rule of Section 3.</text:p>
      <text:p/>
      <text:h text:outline-level="2">5.1.  Establishing a Base URI</text:h>
      <text:p/>
      <text:p>The term "relative" implies that a "base URI" exists against which</text:p>
      <text:p>the relative reference is applied.  Aside from fragment-only</text:p>
      <text:p>references (Section 4.4), relative references are only usable when a</text:p>
      <text:p>base URI is known.  A base URI must be established by the parser</text:p>
      <text:p>prior to parsing URI references that might be relative.  A base URI</text:p>
      <text:p>must conform to the &lt;absolute-URI&gt; syntax rule (Section 4.3).  If the</text:p>
      <text:p>base URI is obtained from a URI reference, then that reference must</text:p>
      <text:p>be converted to absolute form and stripped of any fragment component</text:p>
      <text:p>prior to its use as a base URI.</text:p>
      <text:p/>
      <text:p/>
      <text:p/>
      <text:p/>
      <text:p/>
      <text:p/>
      <text:p>Berners-Lee, et al.         Standards Track                    [Page 28]</text:p>
      <text:p/>
      <text:p/>
      <text:p>RFC 3986                   URI Generic Syntax               January 2005</text:p>
      <text:p/>
      <text:p/>
      <text:p>The base URI of a reference can be established in one of four ways,</text:p>
      <text:p>discussed below in order of precedence.  The order of precedence can</text:p>
      <text:p>be thought of in terms of layers, where the innermost defined base</text:p>
      <text:p>URI has the highest precedence.  This can be visualized graphically</text:p>
      <text:p>as follows:</text:p>
      <text:p/>
      <text:p>.----------------------------------------------------------.</text:p>
      <text:p>|  .----------------------------------------------------.  |</text:p>
      <text:p>|  |  .----------------------------------------------.  |  |</text:p>
      <text:p>|  |  |  .----------------------------------------.  |  |  |</text:p>
      <text:p>|  |  |  |  .----------------------------------.  |  |  |  |</text:p>
      <text:p>|  |  |  |  |       &lt;relative-reference&gt;       |  |  |  |  |</text:p>
      <text:p>|  |  |  |  `----------------------------------'  |  |  |  |</text:p>
      <text:p>|  |  |  | (5.1.1) Base URI embedded in content   |  |  |  |</text:p>
      <text:p>|  |  |  `----------------------------------------'  |  |  |</text:p>
      <text:p>|  |  | (5.1.2) Base URI of the encapsulating entity |  |  |</text:p>
      <text:p>|  |  |         (message, representation, or none)   |  |  |</text:p>
      <text:p>|  |  `----------------------------------------------'  |  |</text:p>
      <text:p>|  | (5.1.3) URI used to retrieve the entity            |  |</text:p>
      <text:p>|  `----------------------------------------------------'  |</text:p>
      <text:p>| (5.1.4) Default Base URI (application-dependent)         |</text:p>
      <text:p>`----------------------------------------------------------'</text:p>
      <text:p/>
      <text:h text:outline-level="2">5.1.1.  Base URI Embedded in Content</text:h>
      <text:p/>
      <text:p>Within certain media types, a base URI for relative references can be</text:p>
      <text:p>embedded within the content itself so that it can be readily obtained</text:p>
      <text:p>by a parser.  This can be useful for descriptive documents, such as</text:p>
      <text:p>tables of contents, which may be transmitted to others through</text:p>
      <text:p>protocols other than their usual retrieval context (e.g., email or</text:p>
      <text:p>USENET news).</text:p>
      <text:p/>
      <text:p>It is beyond the scope of this specification to specify how, for each</text:p>
      <text:p>media type, a base URI can be embedded.  The appropriate syntax, when</text:p>
      <text:p>available, is described by the data format specification associated</text:p>
      <text:p>with each media type.</text:p>
      <text:p/>
      <text:h text:outline-level="2">5.1.2.  Base URI from the Encapsulating Entity</text:h>
      <text:p/>
      <text:p>If no base URI is embedded, the base URI is defined by the</text:p>
      <text:p>representation's retrieval context.  For a document that is enclosed</text:p>
      <text:p>within another entity, such as a message or archive, the retrieval</text:p>
      <text:p>context is that entity.  Thus, the default base URI of a</text:p>
      <text:p>representation is the base URI of the entity in which the</text:p>
      <text:p>representation is encapsulated.</text:p>
      <text:p/>
      <text:p/>
      <text:p/>
      <text:p/>
      <text:p/>
      <text:p/>
      <text:p>Berners-Lee, et al.         Standards Track                    [Page 29]</text:p>
      <text:p/>
      <text:p/>
      <text:p>RFC 3986                   URI Generic Syntax               January 2005</text:p>
      <text:p/>
      <text:p/>
      <text:p>A mechanism for embedding a base URI within MIME container types</text:p>
      <text:p>(e.g., the message and multipart types) is defined by MHTML</text:p>
      <text:p>[RFC2557].  Protocols that do not use the MIME message header syntax,</text:p>
      <text:p>but that do allow some form of tagged metadata to be included within</text:p>
      <text:p>messages, may define their own syntax for defining a base URI as part</text:p>
      <text:p>of a message.</text:p>
      <text:p/>
      <text:h text:outline-level="2">5.1.3.  Base URI from the Retrieval URI</text:h>
      <text:p/>
      <text:p>If no base URI is embedded and the representation is not encapsulated</text:p>
      <text:p>within some other entity, then, if a URI was used to retrieve the</text:p>
      <text:p>representation, that URI shall be considered the base URI.  Note that</text:p>
      <text:p>if the retrieval was the result of a redirected request, the last URI</text:p>
      <text:p>used (i.e., the URI that resulted in the actual retrieval of the</text:p>
      <text:p>representation) is the base URI.</text:p>
      <text:p/>
      <text:h text:outline-level="2">5.1.4.  Default Base URI</text:h>
      <text:p/>
      <text:p>If none of the conditions described above apply, then the base URI is</text:p>
      <text:p>defined by the context of the application.  As this definition is</text:p>
      <text:p>necessarily application-dependent, failing to define a base URI by</text:p>
      <text:p>using one of the other methods may result in the same content being</text:p>
      <text:p>interpreted differently by different types of applications.</text:p>
      <text:p/>
      <text:p>A sender of a representation containing relative references is</text:p>
      <text:p>responsible for ensuring that a base URI for those references can be</text:p>
      <text:p>established.  Aside from fragment-only references, relative</text:p>
      <text:p>references can only be used reliably in situations where the base URI</text:p>
      <text:p>is well defined.</text:p>
      <text:p/>
      <text:h text:outline-level="2">5.2.  Relative Resolution</text:h>
      <text:p/>
      <text:p>This section describes an algorithm for converting a URI reference</text:p>
      <text:p>that might be relative to a given base URI into the parsed components</text:p>
      <text:p>of the reference's target.  The components can then be recomposed, as</text:p>
      <text:p>described in Section 5.3, to form the target URI.  This algorithm</text:p>
      <text:p>provides definitive results that can be used to test the output of</text:p>
      <text:p>other implementations.  Applications may implement relative reference</text:p>
      <text:p>resolution by using some other algorithm, provided that the results</text:p>
      <text:p>match what would be given by this one.</text:p>
      <text:p/>
      <text:p/>
      <text:p/>
      <text:p/>
      <text:p/>
      <text:p/>
      <text:p/>
      <text:p/>
      <text:p/>
      <text:p/>
      <text:p/>
      <text:p>Berners-Lee, et al.         Standards Track                    [Page 30]</text:p>
      <text:p/>
      <text:p/>
      <text:p>RFC 3986                   URI Generic Syntax               January 2005</text:p>
      <text:p/>
      <text:p/>
      <text:h text:outline-level="2">5.2.1.  Pre-parse the Base URI</text:h>
      <text:p/>
      <text:p>The base URI (Base) is established according to the procedure of</text:p>
      <text:p>Section 5.1 and parsed into the five main components described in</text:p>
      <text:p>Section 3.  Note that only the scheme component is required to be</text:p>
      <text:p>present in a base URI; the other components may be empty or</text:p>
      <text:p>undefined.  A component is undefined if its associated delimiter does</text:p>
      <text:p>not appear in the URI reference; the path component is never</text:p>
      <text:p>undefined, though it may be empty.</text:p>
      <text:p/>
      <text:p>Normalization of the base URI, as described in Sections 6.2.2 and</text:p>
      <text:p>6.2.3, is optional.  A URI reference must be transformed to its</text:p>
      <text:p>target URI before it can be normalized.</text:p>
      <text:p/>
      <text:h text:outline-level="2">5.2.2.  Transform References</text:h>
      <text:p/>
      <text:p>For each URI reference (R), the following pseudocode describes an</text:p>
      <text:p>algorithm for transforming R into its target URI (T):</text:p>
      <text:p/>
      <text:p>-- The URI reference is parsed into the five URI components</text:p>
      <text:p>--</text:p>
      <text:p>(R.scheme, R.authority, R.path, R.query, R.fragment) = parse(R);</text:p>
      <text:p/>
      <text:p>-- A non-strict parser may ignore a scheme in the reference</text:p>
      <text:p>-- if it is identical to the base URI's scheme.</text:p>
      <text:p>--</text:p>
      <text:p>if ((not strict) and (R.scheme == Base.scheme)) then</text:p>
      <text:p>undefine(R.scheme);</text:p>
      <text:p>endif;</text:p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>Berners-Lee, et al.         Standards Track                    [Page 31]</text:p>
      <text:p/>
      <text:p/>
      <text:p>RFC 3986                   URI Generic Syntax               January 2005</text:p>
      <text:p/>
      <text:p/>
      <text:p>if defined(R.scheme) then</text:p>
      <text:p>T.scheme    = R.scheme;</text:p>
      <text:p>T.authority = R.authority;</text:p>
      <text:p>T.path      = remove_dot_segments(R.path);</text:p>
      <text:p>T.query     = R.query;</text:p>
      <text:p>else</text:p>
      <text:p>if defined(R.authority) then</text:p>
      <text:p>T.authority = R.authority;</text:p>
      <text:p>T.path      = remove_dot_segments(R.path);</text:p>
      <text:p>T.query     = R.query;</text:p>
      <text:p>else</text:p>
      <text:p>if (R.path == "") then</text:p>
      <text:p>T.path = Base.path;</text:p>
      <text:p>if defined(R.query) then</text:p>
      <text:p>T.query = R.query;</text:p>
      <text:p>else</text:p>
      <text:p>T.query = Base.query;</text:p>
      <text:p>endif;</text:p>
      <text:p>else</text:p>
      <text:p>if (R.path starts-with "/") then</text:p>
      <text:p>T.path = remove_dot_segments(R.path);</text:p>
      <text:p>else</text:p>
      <text:p>T.path = merge(Base.path, R.path);</text:p>
      <text:p>T.path = remove_dot_segments(T.path);</text:p>
      <text:p>endif;</text:p>
      <text:p>T.query = R.query;</text:p>
      <text:p>endif;</text:p>
      <text:p>T.authority = Base.authority;</text:p>
      <text:p>endif;</text:p>
      <text:p>T.scheme = Base.scheme;</text:p>
      <text:p>endif;</text:p>
      <text:p/>
      <text:p>T.fragment = R.fragment;</text:p>
      <text:p/>
      <text:h text:outline-level="2">5.2.3.  Merge Paths</text:h>
      <text:p/>
      <text:p>The pseudocode above refers to a "merge" routine for merging a</text:p>
      <text:p>relative-path reference with the path of the base URI.  This is</text:p>
      <text:p>accomplished as follows:</text:p>
      <text:p/>
      <text:p>o  If the base URI has a defined authority component and an empty</text:p>
      <text:p>path, then return a string consisting of "/" concatenated with the</text:p>
      <text:p>reference's path; otherwise,</text:p>
      <text:p/>
      <text:p/>
      <text:p/>
      <text:p/>
      <text:p/>
      <text:p/>
      <text:p/>
      <text:p/>
      <text:p>Berners-Lee, et al.         Standards Track                    [Page 32]</text:p>
      <text:p/>
      <text:p/>
      <text:p>RFC 3986                   URI Generic Syntax               January 2005</text:p>
      <text:p/>
      <text:p/>
      <text:p>o  return a string consisting of the reference's path component</text:p>
      <text:p>appended to all but the last segment of the base URI's path (i.e.,</text:p>
      <text:p>excluding any characters after the right-most "/" in the base URI</text:p>
      <text:p>path, or excluding the entire base URI path if it does not contain</text:p>
      <text:p>any "/" characters).</text:p>
      <text:p/>
      <text:h text:outline-level="2">5.2.4.  Remove Dot Segments</text:h>
      <text:p/>
      <text:p>The pseudocode also refers to a "remove_dot_segments" routine for</text:p>
      <text:p>interpreting and removing the special "." and ".." complete path</text:p>
      <text:p>segments from a referenced path.  This is done after the path is</text:p>
      <text:p>extracted from a reference, whether or not the path was relative, in</text:p>
      <text:p>order to remove any invalid or extraneous dot-segments prior to</text:p>
      <text:p>forming the target URI.  Although there are many ways to accomplish</text:p>
      <text:p>this removal process, we describe a simple method using two string</text:p>
      <text:p>buffers.</text:p>
      <text:p/>
      <text:h text:outline-level="2">1.  The input buffer is initialized with the now-appended path</text:h>
      <text:p>components and the output buffer is initialized to the empty</text:p>
      <text:p>string.</text:p>
      <text:p/>
      <text:h text:outline-level="2">2.  While the input buffer is not empty, loop as follows:</text:h>
      <text:p/>
      <text:p>A.  If the input buffer begins with a prefix of "../" or "./",</text:p>
      <text:p>then remove that prefix from the input buffer; otherwise,</text:p>
      <text:p/>
      <text:p>B.  if the input buffer begins with a prefix of "/./" or "/.",</text:p>
      <text:p>where "." is a complete path segment, then replace that</text:p>
      <text:p>prefix with "/" in the input buffer; otherwise,</text:p>
      <text:p/>
      <text:p>C.  if the input buffer begins with a prefix of "/../" or "/..",</text:p>
      <text:p>where ".." is a complete path segment, then replace that</text:p>
      <text:p>prefix with "/" in the input buffer and remove the last</text:p>
      <text:p>segment and its preceding "/" (if any) from the output</text:p>
      <text:p>buffer; otherwise,</text:p>
      <text:p/>
      <text:p>D.  if the input buffer consists only of "." or "..", then remove</text:p>
      <text:p>that from the input buffer; otherwise,</text:p>
      <text:p/>
      <text:p>E.  move the first path segment in the input buffer to the end of</text:p>
      <text:p>the output buffer, including the initial "/" character (if</text:p>
      <text:p>any) and any subsequent characters up to, but not including,</text:p>
      <text:p>the next "/" character or the end of the input buffer.</text:p>
      <text:p/>
      <text:h text:outline-level="2">3.  Finally, the output buffer is returned as the result of</text:h>
      <text:p>remove_dot_segments.</text:p>
      <text:p/>
      <text:p/>
      <text:p/>
      <text:p/>
      <text:p/>
      <text:p>Berners-Lee, et al.         Standards Track                    [Page 33]</text:p>
      <text:p/>
      <text:p/>
      <text:p>RFC 3986                   URI Generic Syntax               January 2005</text:p>
      <text:p/>
      <text:p/>
      <text:p>Note that dot-segments are intended for use in URI references to</text:p>
      <text:p>express an identifier relative to the hierarchy of names in the base</text:p>
      <text:p>URI.  The remove_dot_segments algorithm respects that hierarchy by</text:p>
      <text:p>removing extra dot-segments rather than treat them as an error or</text:p>
      <text:p>leaving them to be misinterpreted by dereference implementations.</text:p>
      <text:p/>
      <text:p>The following illustrates how the above steps are applied for two</text:p>
      <text:p>examples of merged paths, showing the state of the two buffers after</text:p>
      <text:p>each step.</text:p>
      <text:p/>
      <text:p>STEP   OUTPUT BUFFER         INPUT BUFFER</text:p>
      <text:p/>
      <text:h text:outline-level="2">1 :                         /a/b/c/./../../g</text:h>
      <text:p>2E:   /a                    /b/c/./../../g</text:p>
      <text:p>2E:   /a/b                  /c/./../../g</text:p>
      <text:p>2E:   /a/b/c                /./../../g</text:p>
      <text:p>2B:   /a/b/c                /../../g</text:p>
      <text:p>2C:   /a/b                  /../g</text:p>
      <text:p>2C:   /a                    /g</text:p>
      <text:p>2E:   /a/g</text:p>
      <text:p/>
      <text:p>STEP   OUTPUT BUFFER         INPUT BUFFER</text:p>
      <text:p/>
      <text:h text:outline-level="2">1 :                         mid/content=5/../6</text:h>
      <text:p>2E:   mid                   /content=5/../6</text:p>
      <text:p>2E:   mid/content=5         /../6</text:p>
      <text:p>2C:   mid                   /6</text:p>
      <text:p>2E:   mid/6</text:p>
      <text:p/>
      <text:p>Some applications may find it more efficient to implement the</text:p>
      <text:p>remove_dot_segments algorithm by using two segment stacks rather than</text:p>
      <text:p>strings.</text:p>
      <text:p/>
      <text:p>Note: Beware that some older, erroneous implementations will fail</text:p>
      <text:p>to separate a reference's query component from its path component</text:p>
      <text:p>prior to merging the base and reference paths, resulting in an</text:p>
      <text:p>interoperability failure if the query component contains the</text:p>
      <text:p>strings "/../" or "/./".</text:p>
      <text:p/>
      <text:p/>
      <text:p/>
      <text:p/>
      <text:p/>
      <text:p/>
      <text:p/>
      <text:p/>
      <text:p/>
      <text:p/>
      <text:p/>
      <text:p/>
      <text:p/>
      <text:p>Berners-Lee, et al.         Standards Track                    [Page 34]</text:p>
      <text:p/>
      <text:p/>
      <text:p>RFC 3986                   URI Generic Syntax               January 2005</text:p>
      <text:p/>
      <text:p/>
      <text:h text:outline-level="2">5.3.  Component Recomposition</text:h>
      <text:p/>
      <text:p>Parsed URI components can be recomposed to obtain the corresponding</text:p>
      <text:p>URI reference string.  Using pseudocode, this would be:</text:p>
      <text:p/>
      <text:p>result = ""</text:p>
      <text:p/>
      <text:p>if defined(scheme) then</text:p>
      <text:p>append scheme to result;</text:p>
      <text:p>append ":" to result;</text:p>
      <text:p>endif;</text:p>
      <text:p/>
      <text:p>if defined(authority) then</text:p>
      <text:p>append "//" to result;</text:p>
      <text:p>append authority to result;</text:p>
      <text:p>endif;</text:p>
      <text:p/>
      <text:p>append path to result;</text:p>
      <text:p/>
      <text:p>if defined(query) then</text:p>
      <text:p>append "?" to result;</text:p>
      <text:p>append query to result;</text:p>
      <text:p>endif;</text:p>
      <text:p/>
      <text:p>if defined(fragment) then</text:p>
      <text:p>append "#" to result;</text:p>
      <text:p>append fragment to result;</text:p>
      <text:p>endif;</text:p>
      <text:p/>
      <text:p>return result;</text:p>
      <text:p/>
      <text:p>Note that we are careful to preserve the distinction between a</text:p>
      <text:p>component that is undefined, meaning that its separator was not</text:p>
      <text:p>present in the reference, and a component that is empty, meaning that</text:p>
      <text:p>the separator was present and was immediately followed by the next</text:p>
      <text:p>component separator or the end of the reference.</text:p>
      <text:p/>
      <text:h text:outline-level="2">5.4.  Reference Resolution Examples</text:h>
      <text:p/>
      <text:p>Within a representation with a well defined base URI of</text:p>
      <text:p/>
      <text:p>http://a/b/c/d;p?q</text:p>
      <text:p/>
      <text:p>a relative reference is transformed to its target URI as follows.</text:p>
      <text:p/>
      <text:p/>
      <text:p/>
      <text:p/>
      <text:p/>
      <text:p/>
      <text:p/>
      <text:p>Berners-Lee, et al.         Standards Track                    [Page 35]</text:p>
      <text:p/>
      <text:p/>
      <text:p>RFC 3986                   URI Generic Syntax               January 2005</text:p>
      <text:p/>
      <text:p/>
      <text:h text:outline-level="2">5.4.1.  Normal Examples</text:h>
      <text:p/>
      <text:p>"g:h"           =  "g:h"</text:p>
      <text:p>"g"             =  "http://a/b/c/g"</text:p>
      <text:p>"./g"           =  "http://a/b/c/g"</text:p>
      <text:p>"g/"            =  "http://a/b/c/g/"</text:p>
      <text:p>"/g"            =  "http://a/g"</text:p>
      <text:p>"//g"           =  "http://g"</text:p>
      <text:p>"?y"            =  "http://a/b/c/d;p?y"</text:p>
      <text:p>"g?y"           =  "http://a/b/c/g?y"</text:p>
      <text:p>"#s"            =  "http://a/b/c/d;p?q#s"</text:p>
      <text:p>"g#s"           =  "http://a/b/c/g#s"</text:p>
      <text:p>"g?y#s"         =  "http://a/b/c/g?y#s"</text:p>
      <text:p>";x"            =  "http://a/b/c/;x"</text:p>
      <text:p>"g;x"           =  "http://a/b/c/g;x"</text:p>
      <text:p>"g;x?y#s"       =  "http://a/b/c/g;x?y#s"</text:p>
      <text:p>""              =  "http://a/b/c/d;p?q"</text:p>
      <text:p>"."             =  "http://a/b/c/"</text:p>
      <text:p>"./"            =  "http://a/b/c/"</text:p>
      <text:p>".."            =  "http://a/b/"</text:p>
      <text:p>"../"           =  "http://a/b/"</text:p>
      <text:p>"../g"          =  "http://a/b/g"</text:p>
      <text:p>"../.."         =  "http://a/"</text:p>
      <text:p>"../../"        =  "http://a/"</text:p>
      <text:p>"../../g"       =  "http://a/g"</text:p>
      <text:p/>
      <text:h text:outline-level="2">5.4.2.  Abnormal Examples</text:h>
      <text:p/>
      <text:p>Although the following abnormal examples are unlikely to occur in</text:p>
      <text:p>normal practice, all URI parsers should be capable of resolving them</text:p>
      <text:p>consistently.  Each example uses the same base as that above.</text:p>
      <text:p/>
      <text:p>Parsers must be careful in handling cases where there are more ".."</text:p>
      <text:p>segments in a relative-path reference than there are hierarchical</text:p>
      <text:p>levels in the base URI's path.  Note that the ".." syntax cannot be</text:p>
      <text:p>used to change the authority component of a URI.</text:p>
      <text:p/>
      <text:p>"../../../g"    =  "http://a/g"</text:p>
      <text:p>"../../../../g" =  "http://a/g"</text:p>
      <text:p/>
      <text:p/>
      <text:p/>
      <text:p/>
      <text:p/>
      <text:p/>
      <text:p/>
      <text:p/>
      <text:p/>
      <text:p/>
      <text:p/>
      <text:p/>
      <text:p>Berners-Lee, et al.         Standards Track                    [Page 36]</text:p>
      <text:p/>
      <text:p/>
      <text:p>RFC 3986                   URI Generic Syntax               January 2005</text:p>
      <text:p/>
      <text:p/>
      <text:p>Similarly, parsers must remove the dot-segments "." and ".." when</text:p>
      <text:p>they are complete components of a path, but not when they are only</text:p>
      <text:p>part of a segment.</text:p>
      <text:p/>
      <text:p>"/./g"          =  "http://a/g"</text:p>
      <text:p>"/../g"         =  "http://a/g"</text:p>
      <text:p>"g."            =  "http://a/b/c/g."</text:p>
      <text:p>".g"            =  "http://a/b/c/.g"</text:p>
      <text:p>"g.."           =  "http://a/b/c/g.."</text:p>
      <text:p>"..g"           =  "http://a/b/c/..g"</text:p>
      <text:p/>
      <text:p>Less likely are cases where the relative reference uses unnecessary</text:p>
      <text:p>or nonsensical forms of the "." and ".." complete path segments.</text:p>
      <text:p/>
      <text:p>"./../g"        =  "http://a/b/g"</text:p>
      <text:p>"./g/."         =  "http://a/b/c/g/"</text:p>
      <text:p>"g/./h"         =  "http://a/b/c/g/h"</text:p>
      <text:p>"g/../h"        =  "http://a/b/c/h"</text:p>
      <text:p>"g;x=1/./y"     =  "http://a/b/c/g;x=1/y"</text:p>
      <text:p>"g;x=1/../y"    =  "http://a/b/c/y"</text:p>
      <text:p/>
      <text:p>Some applications fail to separate the reference's query and/or</text:p>
      <text:p>fragment components from the path component before merging it with</text:p>
      <text:p>the base path and removing dot-segments.  This error is rarely</text:p>
      <text:p>noticed, as typical usage of a fragment never includes the hierarchy</text:p>
      <text:p>("/") character and the query component is not normally used within</text:p>
      <text:p>relative references.</text:p>
      <text:p/>
      <text:p>"g?y/./x"       =  "http://a/b/c/g?y/./x"</text:p>
      <text:p>"g?y/../x"      =  "http://a/b/c/g?y/../x"</text:p>
      <text:p>"g#s/./x"       =  "http://a/b/c/g#s/./x"</text:p>
      <text:p>"g#s/../x"      =  "http://a/b/c/g#s/../x"</text:p>
      <text:p/>
      <text:p>Some parsers allow the scheme name to be present in a relative</text:p>
      <text:p>reference if it is the same as the base URI scheme.  This is</text:p>
      <text:p>considered to be a loophole in prior specifications of partial URI</text:p>
      <text:p>[RFC1630].  Its use should be avoided but is allowed for backward</text:p>
      <text:p>compatibility.</text:p>
      <text:p/>
      <text:p>"http:g"        =  "http:g"         ; for strict parsers</text:p>
      <text:p>/  "http://a/b/c/g" ; for backward compatibility</text:p>
      <text:p/>
      <text:p/>
      <text:p/>
      <text:p/>
      <text:p/>
      <text:p/>
      <text:p/>
      <text:p/>
      <text:p/>
      <text:p/>
      <text:p>Berners-Lee, et al.         Standards Track                    [Page 37]</text:p>
      <text:p/>
      <text:p/>
      <text:p>RFC 3986                   URI Generic Syntax               January 2005</text:p>
      <text:p/>
      <text:p/>
      <text:h text:outline-level="2">6.  Normalization and Comparison</text:h>
      <text:p/>
      <text:p>One of the most common operations on URIs is simple comparison:</text:p>
      <text:p>determining whether two URIs are equivalent without using the URIs to</text:p>
      <text:p>access their respective resource(s).  A comparison is performed every</text:p>
      <text:p>time a response cache is accessed, a browser checks its history to</text:p>
      <text:p>color a link, or an XML parser processes tags within a namespace.</text:p>
      <text:p>Extensive normalization prior to comparison of URIs is often used by</text:p>
      <text:p>spiders and indexing engines to prune a search space or to reduce</text:p>
      <text:p>duplication of request actions and response storage.</text:p>
      <text:p/>
      <text:p>URI comparison is performed for some particular purpose.  Protocols</text:p>
      <text:p>or implementations that compare URIs for different purposes will</text:p>
      <text:p>often be subject to differing design trade-offs in regards to how</text:p>
      <text:p>much effort should be spent in reducing aliased identifiers.  This</text:p>
      <text:p>section describes various methods that may be used to compare URIs,</text:p>
      <text:p>the trade-offs between them, and the types of applications that might</text:p>
      <text:p>use them.</text:p>
      <text:p/>
      <text:h text:outline-level="2">6.1.  Equivalence</text:h>
      <text:p/>
      <text:p>Because URIs exist to identify resources, presumably they should be</text:p>
      <text:p>considered equivalent when they identify the same resource.  However,</text:p>
      <text:p>this definition of equivalence is not of much practical use, as there</text:p>
      <text:p>is no way for an implementation to compare two resources unless it</text:p>
      <text:p>has full knowledge or control of them.  For this reason,</text:p>
      <text:p>determination of equivalence or difference of URIs is based on string</text:p>
      <text:p>comparison, perhaps augmented by reference to additional rules</text:p>
      <text:p>provided by URI scheme definitions.  We use the terms "different" and</text:p>
      <text:p>"equivalent" to describe the possible outcomes of such comparisons,</text:p>
      <text:p>but there are many application-dependent versions of equivalence.</text:p>
      <text:p/>
      <text:p>Even though it is possible to determine that two URIs are equivalent,</text:p>
      <text:p>URI comparison is not sufficient to determine whether two URIs</text:p>
      <text:p>identify different resources.  For example, an owner of two different</text:p>
      <text:p>domain names could decide to serve the same resource from both,</text:p>
      <text:p>resulting in two different URIs.  Therefore, comparison methods are</text:p>
      <text:p>designed to minimize false negatives while strictly avoiding false</text:p>
      <text:p>positives.</text:p>
      <text:p/>
      <text:p>In testing for equivalence, applications should not directly compare</text:p>
      <text:p>relative references; the references should be converted to their</text:p>
      <text:p>respective target URIs before comparison.  When URIs are compared to</text:p>
      <text:p>select (or avoid) a network action, such as retrieval of a</text:p>
      <text:p>representation, fragment components (if any) should be excluded from</text:p>
      <text:p>the comparison.</text:p>
      <text:p/>
      <text:p/>
      <text:p/>
      <text:p/>
      <text:p/>
      <text:p>Berners-Lee, et al.         Standards Track                    [Page 38]</text:p>
      <text:p/>
      <text:p/>
      <text:p>RFC 3986                   URI Generic Syntax               January 2005</text:p>
      <text:p/>
      <text:p/>
      <text:h text:outline-level="2">6.2.  Comparison Ladder</text:h>
      <text:p/>
      <text:p>A variety of methods are used in practice to test URI equivalence.</text:p>
      <text:p>These methods fall into a range, distinguished by the amount of</text:p>
      <text:p>processing required and the degree to which the probability of false</text:p>
      <text:p>negatives is reduced.  As noted above, false negatives cannot be</text:p>
      <text:p>eliminated.  In practice, their probability can be reduced, but this</text:p>
      <text:p>reduction requires more processing and is not cost-effective for all</text:p>
      <text:p>applications.</text:p>
      <text:p/>
      <text:p>If this range of comparison practices is considered as a ladder, the</text:p>
      <text:p>following discussion will climb the ladder, starting with practices</text:p>
      <text:p>that are cheap but have a relatively higher chance of producing false</text:p>
      <text:p>negatives, and proceeding to those that have higher computational</text:p>
      <text:p>cost and lower risk of false negatives.</text:p>
      <text:p/>
      <text:h text:outline-level="2">6.2.1.  Simple String Comparison</text:h>
      <text:p/>
      <text:p>If two URIs, when considered as character strings, are identical,</text:p>
      <text:p>then it is safe to conclude that they are equivalent.  This type of</text:p>
      <text:p>equivalence test has very low computational cost and is in wide use</text:p>
      <text:p>in a variety of applications, particularly in the domain of parsing.</text:p>
      <text:p/>
      <text:p>Testing strings for equivalence requires some basic precautions.</text:p>
      <text:p>This procedure is often referred to as "bit-for-bit" or</text:p>
      <text:p>"byte-for-byte" comparison, which is potentially misleading.  Testing</text:p>
      <text:p>strings for equality is normally based on pair comparison of the</text:p>
      <text:p>characters that make up the strings, starting from the first and</text:p>
      <text:p>proceeding until both strings are exhausted and all characters are</text:p>
      <text:p>found to be equal, until a pair of characters compares unequal, or</text:p>
      <text:p>until one of the strings is exhausted before the other.</text:p>
      <text:p/>
      <text:p>This character comparison requires that each pair of characters be</text:p>
      <text:p>put in comparable form.  For example, should one URI be stored in a</text:p>
      <text:p>byte array in EBCDIC encoding and the second in a Java String object</text:p>
      <text:p>(UTF-16), bit-for-bit comparisons applied naively will produce</text:p>
      <text:p>errors.  It is better to speak of equality on a character-for-</text:p>
      <text:p>character basis rather than on a byte-for-byte or bit-for-bit basis.</text:p>
      <text:p>In practical terms, character-by-character comparisons should be done</text:p>
      <text:p>codepoint-by-codepoint after conversion to a common character</text:p>
      <text:p>encoding.</text:p>
      <text:p/>
      <text:p>False negatives are caused by the production and use of URI aliases.</text:p>
      <text:p>Unnecessary aliases can be reduced, regardless of the comparison</text:p>
      <text:p>method, by consistently providing URI references in an already-</text:p>
      <text:p>normalized form (i.e., a form identical to what would be produced</text:p>
      <text:p>after normalization is applied, as described below).</text:p>
      <text:p/>
      <text:p/>
      <text:p/>
      <text:p/>
      <text:p>Berners-Lee, et al.         Standards Track                    [Page 39]</text:p>
      <text:p/>
      <text:p/>
      <text:p>RFC 3986                   URI Generic Syntax               January 2005</text:p>
      <text:p/>
      <text:p/>
      <text:p>Protocols and data formats often limit some URI comparisons to simple</text:p>
      <text:p>string comparison, based on the theory that people and</text:p>
      <text:p>implementations will, in their own best interest, be consistent in</text:p>
      <text:p>providing URI references, or at least consistent enough to negate any</text:p>
      <text:p>efficiency that might be obtained from further normalization.</text:p>
      <text:p/>
      <text:h text:outline-level="2">6.2.2.  Syntax-Based Normalization</text:h>
      <text:p/>
      <text:p>Implementations may use logic based on the definitions provided by</text:p>
      <text:p>this specification to reduce the probability of false negatives.</text:p>
      <text:p>This processing is moderately higher in cost than character-for-</text:p>
      <text:p>character string comparison.  For example, an application using this</text:p>
      <text:p>approach could reasonably consider the following two URIs equivalent:</text:p>
      <text:p/>
      <text:p>example://a/b/c/%7Bfoo%7D</text:p>
      <text:p>eXAMPLE://a/./b/../b/%63/%7bfoo%7d</text:p>
      <text:p/>
      <text:p>Web user agents, such as browsers, typically apply this type of URI</text:p>
      <text:p>normalization when determining whether a cached response is</text:p>
      <text:p>available.  Syntax-based normalization includes such techniques as</text:p>
      <text:p>case normalization, percent-encoding normalization, and removal of</text:p>
      <text:p>dot-segments.</text:p>
      <text:p/>
      <text:h text:outline-level="2">6.2.2.1.  Case Normalization</text:h>
      <text:p/>
      <text:p>For all URIs, the hexadecimal digits within a percent-encoding</text:p>
      <text:p>triplet (e.g., "%3a" versus "%3A") are case-insensitive and therefore</text:p>
      <text:p>should be normalized to use uppercase letters for the digits A-F.</text:p>
      <text:p/>
      <text:p>When a URI uses components of the generic syntax, the component</text:p>
      <text:p>syntax equivalence rules always apply; namely, that the scheme and</text:p>
      <text:p>host are case-insensitive and therefore should be normalized to</text:p>
      <text:p>lowercase.  For example, the URI &lt;HTTP://www.EXAMPLE.com/&gt; is</text:p>
      <text:p>equivalent to &lt;http://www.example.com/&gt;.  The other generic syntax</text:p>
      <text:p>components are assumed to be case-sensitive unless specifically</text:p>
      <text:p>defined otherwise by the scheme (see Section 6.2.3).</text:p>
      <text:p/>
      <text:h text:outline-level="2">6.2.2.2.  Percent-Encoding Normalization</text:h>
      <text:p/>
      <text:p>The percent-encoding mechanism (Section 2.1) is a frequent source of</text:p>
      <text:p>variance among otherwise identical URIs.  In addition to the case</text:p>
      <text:p>normalization issue noted above, some URI producers percent-encode</text:p>
      <text:p>octets that do not require percent-encoding, resulting in URIs that</text:p>
      <text:p>are equivalent to their non-encoded counterparts.  These URIs should</text:p>
      <text:p>be normalized by decoding any percent-encoded octet that corresponds</text:p>
      <text:p>to an unreserved character, as described in Section 2.3.</text:p>
      <text:p/>
      <text:p/>
      <text:p/>
      <text:p/>
      <text:p/>
      <text:p>Berners-Lee, et al.         Standards Track                    [Page 40]</text:p>
      <text:p/>
      <text:p/>
      <text:p>RFC 3986                   URI Generic Syntax               January 2005</text:p>
      <text:p/>
      <text:p/>
      <text:h text:outline-level="2">6.2.2.3.  Path Segment Normalization</text:h>
      <text:p/>
      <text:p>The complete path segments "." and ".." are intended only for use</text:p>
      <text:p>within relative references (Section 4.1) and are removed as part of</text:p>
      <text:p>the reference resolution process (Section 5.2).  However, some</text:p>
      <text:p>deployed implementations incorrectly assume that reference resolution</text:p>
      <text:p>is not necessary when the reference is already a URI and thus fail to</text:p>
      <text:p>remove dot-segments when they occur in non-relative paths.  URI</text:p>
      <text:p>normalizers should remove dot-segments by applying the</text:p>
      <text:p>remove_dot_segments algorithm to the path, as described in</text:p>
      <text:p>Section 5.2.4.</text:p>
      <text:p/>
      <text:h text:outline-level="2">6.2.3.  Scheme-Based Normalization</text:h>
      <text:p/>
      <text:p>The syntax and semantics of URIs vary from scheme to scheme, as</text:p>
      <text:p>described by the defining specification for each scheme.</text:p>
      <text:p>Implementations may use scheme-specific rules, at further processing</text:p>
      <text:p>cost, to reduce the probability of false negatives.  For example,</text:p>
      <text:p>because the "http" scheme makes use of an authority component, has a</text:p>
      <text:p>default port of "80", and defines an empty path to be equivalent to</text:p>
      <text:p>"/", the following four URIs are equivalent:</text:p>
      <text:p/>
      <text:p>http://example.com</text:p>
      <text:p>http://example.com/</text:p>
      <text:p>http://example.com:/</text:p>
      <text:p>http://example.com:80/</text:p>
      <text:p/>
      <text:p>In general, a URI that uses the generic syntax for authority with an</text:p>
      <text:p>empty path should be normalized to a path of "/".  Likewise, an</text:p>
      <text:p>explicit ":port", for which the port is empty or the default for the</text:p>
      <text:p>scheme, is equivalent to one where the port and its ":" delimiter are</text:p>
      <text:p>elided and thus should be removed by scheme-based normalization.  For</text:p>
      <text:p>example, the second URI above is the normal form for the "http"</text:p>
      <text:p>scheme.</text:p>
      <text:p/>
      <text:p>Another case where normalization varies by scheme is in the handling</text:p>
      <text:p>of an empty authority component or empty host subcomponent.  For many</text:p>
      <text:p>scheme specifications, an empty authority or host is considered an</text:p>
      <text:p>error; for others, it is considered equivalent to "localhost" or the</text:p>
      <text:p>end-user's host.  When a scheme defines a default for authority and a</text:p>
      <text:p>URI reference to that default is desired, the reference should be</text:p>
      <text:p>normalized to an empty authority for the sake of uniformity, brevity,</text:p>
      <text:p>and internationalization.  If, however, either the userinfo or port</text:p>
      <text:p>subcomponents are non-empty, then the host should be given explicitly</text:p>
      <text:p>even if it matches the default.</text:p>
      <text:p/>
      <text:p>Normalization should not remove delimiters when their associated</text:p>
      <text:p>component is empty unless licensed to do so by the scheme</text:p>
      <text:p/>
      <text:p/>
      <text:p/>
      <text:p>Berners-Lee, et al.         Standards Track                    [Page 41]</text:p>
      <text:p/>
      <text:p/>
      <text:p>RFC 3986                   URI Generic Syntax               January 2005</text:p>
      <text:p/>
      <text:p/>
      <text:p>specification.  For example, the URI "http://example.com/?" cannot be</text:p>
      <text:p>assumed to be equivalent to any of the examples above.  Likewise, the</text:p>
      <text:p>presence or absence of delimiters within a userinfo subcomponent is</text:p>
      <text:p>usually significant to its interpretation.  The fragment component is</text:p>
      <text:p>not subject to any scheme-based normalization; thus, two URIs that</text:p>
      <text:p>differ only by the suffix "#" are considered different regardless of</text:p>
      <text:p>the scheme.</text:p>
      <text:p/>
      <text:p>Some schemes define additional subcomponents that consist of case-</text:p>
      <text:p>insensitive data, giving an implicit license to normalizers to</text:p>
      <text:p>convert this data to a common case (e.g., all lowercase).  For</text:p>
      <text:p>example, URI schemes that define a subcomponent of path to contain an</text:p>
      <text:p>Internet hostname, such as the "mailto" URI scheme, cause that</text:p>
      <text:p>subcomponent to be case-insensitive and thus subject to case</text:p>
      <text:p>normalization (e.g., "mailto:Joe@Example.COM" is equivalent to</text:p>
      <text:p>"mailto:Joe@example.com", even though the generic syntax considers</text:p>
      <text:p>the path component to be case-sensitive).</text:p>
      <text:p/>
      <text:p>Other scheme-specific normalizations are possible.</text:p>
      <text:p/>
      <text:h text:outline-level="2">6.2.4.  Protocol-Based Normalization</text:h>
      <text:p/>
      <text:p>Substantial effort to reduce the incidence of false negatives is</text:p>
      <text:p>often cost-effective for web spiders.  Therefore, they implement even</text:p>
      <text:p>more aggressive techniques in URI comparison.  For example, if they</text:p>
      <text:p>observe that a URI such as</text:p>
      <text:p/>
      <text:p>http://example.com/data</text:p>
      <text:p/>
      <text:p>redirects to a URI differing only in the trailing slash</text:p>
      <text:p/>
      <text:p>http://example.com/data/</text:p>
      <text:p/>
      <text:p>they will likely regard the two as equivalent in the future.  This</text:p>
      <text:p>kind of technique is only appropriate when equivalence is clearly</text:p>
      <text:p>indicated by both the result of accessing the resources and the</text:p>
      <text:p>common conventions of their scheme's dereference algorithm (in this</text:p>
      <text:p>case, use of redirection by HTTP origin servers to avoid problems</text:p>
      <text:p>with relative references).</text:p>
      <text:p/>
      <text:p/>
      <text:p/>
      <text:p/>
      <text:p/>
      <text:p/>
      <text:p/>
      <text:p/>
      <text:p/>
      <text:p/>
      <text:p/>
      <text:p/>
      <text:p>Berners-Lee, et al.         Standards Track                    [Page 42]</text:p>
      <text:p/>
      <text:p/>
      <text:p>RFC 3986                   URI Generic Syntax               January 2005</text:p>
      <text:p/>
      <text:p/>
      <text:h text:outline-level="2">7.  Security Considerations</text:h>
      <text:p/>
      <text:p>A URI does not in itself pose a security threat.  However, as URIs</text:p>
      <text:p>are often used to provide a compact set of instructions for access to</text:p>
      <text:p>network resources, care must be taken to properly interpret the data</text:p>
      <text:p>within a URI, to prevent that data from causing unintended access,</text:p>
      <text:p>and to avoid including data that should not be revealed in plain</text:p>
      <text:p>text.</text:p>
      <text:p/>
      <text:h text:outline-level="2">7.1.  Reliability and Consistency</text:h>
      <text:p/>
      <text:p>There is no guarantee that once a URI has been used to retrieve</text:p>
      <text:p>information, the same information will be retrievable by that URI in</text:p>
      <text:p>the future.  Nor is there any guarantee that the information</text:p>
      <text:p>retrievable via that URI in the future will be observably similar to</text:p>
      <text:p>that retrieved in the past.  The URI syntax does not constrain how a</text:p>
      <text:p>given scheme or authority apportions its namespace or maintains it</text:p>
      <text:p>over time.  Such guarantees can only be obtained from the person(s)</text:p>
      <text:p>controlling that namespace and the resource in question.  A specific</text:p>
      <text:p>URI scheme may define additional semantics, such as name persistence,</text:p>
      <text:p>if those semantics are required of all naming authorities for that</text:p>
      <text:p>scheme.</text:p>
      <text:p/>
      <text:h text:outline-level="2">7.2.  Malicious Construction</text:h>
      <text:p/>
      <text:p>It is sometimes possible to construct a URI so that an attempt to</text:p>
      <text:p>perform a seemingly harmless, idempotent operation, such as the</text:p>
      <text:p>retrieval of a representation, will in fact cause a possibly damaging</text:p>
      <text:p>remote operation.  The unsafe URI is typically constructed by</text:p>
      <text:p>specifying a port number other than that reserved for the network</text:p>
      <text:p>protocol in question.  The client unwittingly contacts a site running</text:p>
      <text:p>a different protocol service, and data within the URI contains</text:p>
      <text:p>instructions that, when interpreted according to this other protocol,</text:p>
      <text:p>cause an unexpected operation.  A frequent example of such abuse has</text:p>
      <text:p>been the use of a protocol-based scheme with a port component of</text:p>
      <text:p>"25", thereby fooling user agent software into sending an unintended</text:p>
      <text:p>or impersonating message via an SMTP server.</text:p>
      <text:p/>
      <text:p>Applications should prevent dereference of a URI that specifies a TCP</text:p>
      <text:p>port number within the "well-known port" range (0 - 1023) unless the</text:p>
      <text:p>protocol being used to dereference that URI is compatible with the</text:p>
      <text:p>protocol expected on that well-known port.  Although IANA maintains a</text:p>
      <text:p>registry of well-known ports, applications should make such</text:p>
      <text:p>restrictions user-configurable to avoid preventing the deployment of</text:p>
      <text:p>new services.</text:p>
      <text:p/>
      <text:p/>
      <text:p/>
      <text:p/>
      <text:p/>
      <text:p/>
      <text:p>Berners-Lee, et al.         Standards Track                    [Page 43]</text:p>
      <text:p/>
      <text:p/>
      <text:p>RFC 3986                   URI Generic Syntax               January 2005</text:p>
      <text:p/>
      <text:p/>
      <text:p>When a URI contains percent-encoded octets that match the delimiters</text:p>
      <text:p>for a given resolution or dereference protocol (for example, CR and</text:p>
      <text:p>LF characters for the TELNET protocol), these percent-encodings must</text:p>
      <text:p>not be decoded before transmission across that protocol.  Transfer of</text:p>
      <text:p>the percent-encoding, which might violate the protocol, is less</text:p>
      <text:p>harmful than allowing decoded octets to be interpreted as additional</text:p>
      <text:p>operations or parameters, perhaps triggering an unexpected and</text:p>
      <text:p>possibly harmful remote operation.</text:p>
      <text:p/>
      <text:h text:outline-level="2">7.3.  Back-End Transcoding</text:h>
      <text:p/>
      <text:p>When a URI is dereferenced, the data within it is often parsed by</text:p>
      <text:p>both the user agent and one or more servers.  In HTTP, for example, a</text:p>
      <text:p>typical user agent will parse a URI into its five major components,</text:p>
      <text:p>access the authority's server, and send it the data within the</text:p>
      <text:p>authority, path, and query components.  A typical server will take</text:p>
      <text:p>that information, parse the path into segments and the query into</text:p>
      <text:p>key/value pairs, and then invoke implementation-specific handlers to</text:p>
      <text:p>respond to the request.  As a result, a common security concern for</text:p>
      <text:p>server implementations that handle a URI, either as a whole or split</text:p>
      <text:p>into separate components, is proper interpretation of the octet data</text:p>
      <text:p>represented by the characters and percent-encodings within that URI.</text:p>
      <text:p/>
      <text:p>Percent-encoded octets must be decoded at some point during the</text:p>
      <text:p>dereference process.  Applications must split the URI into its</text:p>
      <text:p>components and subcomponents prior to decoding the octets, as</text:p>
      <text:p>otherwise the decoded octets might be mistaken for delimiters.</text:p>
      <text:p>Security checks of the data within a URI should be applied after</text:p>
      <text:p>decoding the octets.  Note, however, that the "%00" percent-encoding</text:p>
      <text:p>(NUL) may require special handling and should be rejected if the</text:p>
      <text:p>application is not expecting to receive raw data within a component.</text:p>
      <text:p/>
      <text:p>Special care should be taken when the URI path interpretation process</text:p>
      <text:p>involves the use of a back-end file system or related system</text:p>
      <text:p>functions.  File systems typically assign an operational meaning to</text:p>
      <text:p>special characters, such as the "/", "\", ":", "[", and "]"</text:p>
      <text:p>characters, and to special device names like ".", "..", "...", "aux",</text:p>
      <text:p>"lpt", etc.  In some cases, merely testing for the existence of such</text:p>
      <text:p>a name will cause the operating system to pause or invoke unrelated</text:p>
      <text:p>system calls, leading to significant security concerns regarding</text:p>
      <text:p>denial of service and unintended data transfer.  It would be</text:p>
      <text:p>impossible for this specification to list all such significant</text:p>
      <text:p>characters and device names.  Implementers should research the</text:p>
      <text:p>reserved names and characters for the types of storage device that</text:p>
      <text:p>may be attached to their applications and restrict the use of data</text:p>
      <text:p>obtained from URI components accordingly.</text:p>
      <text:p/>
      <text:p/>
      <text:p/>
      <text:p/>
      <text:p/>
      <text:p>Berners-Lee, et al.         Standards Track                    [Page 44]</text:p>
      <text:p/>
      <text:p/>
      <text:p>RFC 3986                   URI Generic Syntax               January 2005</text:p>
      <text:p/>
      <text:p/>
      <text:h text:outline-level="2">7.4.  Rare IP Address Formats</text:h>
      <text:p/>
      <text:p>Although the URI syntax for IPv4address only allows the common</text:p>
      <text:p>dotted-decimal form of IPv4 address literal, many implementations</text:p>
      <text:p>that process URIs make use of platform-dependent system routines,</text:p>
      <text:p>such as gethostbyname() and inet_aton(), to translate the string</text:p>
      <text:p>literal to an actual IP address.  Unfortunately, such system routines</text:p>
      <text:p>often allow and process a much larger set of formats than those</text:p>
      <text:p>described in Section 3.2.2.</text:p>
      <text:p/>
      <text:p>For example, many implementations allow dotted forms of three</text:p>
      <text:p>numbers, wherein the last part is interpreted as a 16-bit quantity</text:p>
      <text:p>and placed in the right-most two bytes of the network address (e.g.,</text:p>
      <text:p>a Class B network).  Likewise, a dotted form of two numbers means</text:p>
      <text:p>that the last part is interpreted as a 24-bit quantity and placed in</text:p>
      <text:p>the right-most three bytes of the network address (Class A), and a</text:p>
      <text:p>single number (without dots) is interpreted as a 32-bit quantity and</text:p>
      <text:p>stored directly in the network address.  Adding further to the</text:p>
      <text:p>confusion, some implementations allow each dotted part to be</text:p>
      <text:p>interpreted as decimal, octal, or hexadecimal, as specified in the C</text:p>
      <text:p>language (i.e., a leading 0x or 0X implies hexadecimal; a leading 0</text:p>
      <text:p>implies octal; otherwise, the number is interpreted as decimal).</text:p>
      <text:p/>
      <text:p>These additional IP address formats are not allowed in the URI syntax</text:p>
      <text:p>due to differences between platform implementations.  However, they</text:p>
      <text:p>can become a security concern if an application attempts to filter</text:p>
      <text:p>access to resources based on the IP address in string literal format.</text:p>
      <text:p>If this filtering is performed, literals should be converted to</text:p>
      <text:p>numeric form and filtered based on the numeric value, and not on a</text:p>
      <text:p>prefix or suffix of the string form.</text:p>
      <text:p/>
      <text:h text:outline-level="2">7.5.  Sensitive Information</text:h>
      <text:p/>
      <text:p>URI producers should not provide a URI that contains a username or</text:p>
      <text:p>password that is intended to be secret.  URIs are frequently</text:p>
      <text:p>displayed by browsers, stored in clear text bookmarks, and logged by</text:p>
      <text:p>user agent history and intermediary applications (proxies).  A</text:p>
      <text:p>password appearing within the userinfo component is deprecated and</text:p>
      <text:p>should be considered an error (or simply ignored) except in those</text:p>
      <text:p>rare cases where the 'password' parameter is intended to be public.</text:p>
      <text:p/>
      <text:h text:outline-level="2">7.6.  Semantic Attacks</text:h>
      <text:p/>
      <text:p>Because the userinfo subcomponent is rarely used and appears before</text:p>
      <text:p>the host in the authority component, it can be used to construct a</text:p>
      <text:p>URI intended to mislead a human user by appearing to identify one</text:p>
      <text:p>(trusted) naming authority while actually identifying a different</text:p>
      <text:p>authority hidden behind the noise.  For example</text:p>
      <text:p/>
      <text:p/>
      <text:p/>
      <text:p>Berners-Lee, et al.         Standards Track                    [Page 45]</text:p>
      <text:p/>
      <text:p/>
      <text:p>RFC 3986                   URI Generic Syntax               January 2005</text:p>
      <text:p/>
      <text:p/>
      <text:p>ftp://cnn.example.com&amp;story=breaking_news@10.0.0.1/top_story.htm</text:p>
      <text:p/>
      <text:p>might lead a human user to assume that the host is 'cnn.example.com',</text:p>
      <text:p>whereas it is actually '10.0.0.1'.  Note that a misleading userinfo</text:p>
      <text:p>subcomponent could be much longer than the example above.</text:p>
      <text:p/>
      <text:p>A misleading URI, such as that above, is an attack on the user's</text:p>
      <text:p>preconceived notions about the meaning of a URI rather than an attack</text:p>
      <text:p>on the software itself.  User agents may be able to reduce the impact</text:p>
      <text:p>of such attacks by distinguishing the various components of the URI</text:p>
      <text:p>when they are rendered, such as by using a different color or tone to</text:p>
      <text:p>render userinfo if any is present, though there is no panacea.  More</text:p>
      <text:p>information on URI-based semantic attacks can be found in [Siedzik].</text:p>
      <text:p/>
      <text:h text:outline-level="2">8.  IANA Considerations</text:h>
      <text:p/>
      <text:p>URI scheme names, as defined by &lt;scheme&gt; in Section 3.1, form a</text:p>
      <text:p>registered namespace that is managed by IANA according to the</text:p>
      <text:p>procedures defined in [BCP35].  No IANA actions are required by this</text:p>
      <text:p>document.</text:p>
      <text:p/>
      <text:h text:outline-level="2">9.  Acknowledgements</text:h>
      <text:p/>
      <text:p>This specification is derived from RFC 2396 [RFC2396], RFC 1808</text:p>
      <text:p>[RFC1808], and RFC 1738 [RFC1738]; the acknowledgements in those</text:p>
      <text:p>documents still apply.  It also incorporates the update (with</text:p>
      <text:p>corrections) for IPv6 literals in the host syntax, as defined by</text:p>
      <text:p>Robert M. Hinden, Brian E. Carpenter, and Larry Masinter in</text:p>
      <text:p>[RFC2732].  In addition, contributions by Gisle Aas, Reese Anschultz,</text:p>
      <text:p>Daniel Barclay, Tim Bray, Mike Brown, Rob Cameron, Jeremy Carroll,</text:p>
      <text:p>Dan Connolly, Adam M. Costello, John Cowan, Jason Diamond, Martin</text:p>
      <text:p>Duerst, Stefan Eissing, Clive D.W. Feather, Al Gilman, Tony Hammond,</text:p>
      <text:p>Elliotte Harold, Pat Hayes, Henry Holtzman, Ian B. Jacobs, Michael</text:p>
      <text:p>Kay, John C. Klensin, Graham Klyne, Dan Kohn, Bruce Lilly, Andrew</text:p>
      <text:p>Main, Dave McAlpin, Ira McDonald, Michael Mealling, Ray Merkert,</text:p>
      <text:p>Stephen Pollei, Julian Reschke, Tomas Rokicki, Miles Sabin, Kai</text:p>
      <text:p>Schaetzl, Mark Thomson, Ronald Tschalaer, Norm Walsh, Marc Warne,</text:p>
      <text:p>Stuart Williams, and Henry Zongaro are gratefully acknowledged.</text:p>
      <text:p/>
      <text:h text:outline-level="2">10.  References</text:h>
      <text:p/>
      <text:h text:outline-level="2">10.1.  Normative References</text:h>
      <text:p/>
      <text:p>[ASCII]    American National Standards Institute, "Coded Character</text:p>
      <text:p>Set -- 7-bit American Standard Code for Information</text:p>
      <text:p>Interchange", ANSI X3.4, 1986.</text:p>
      <text:p/>
      <text:p/>
      <text:p/>
      <text:p/>
      <text:p/>
      <text:p>Berners-Lee, et al.         Standards Track                    [Page 46]</text:p>
      <text:p/>
      <text:p/>
      <text:p>RFC 3986                   URI Generic Syntax               January 2005</text:p>
      <text:p/>
      <text:p/>
      <text:p>[RFC2234]  Crocker, D. and P. Overell, "Augmented BNF for Syntax</text:p>
      <text:p>Specifications: ABNF", RFC 2234, November 1997.</text:p>
      <text:p/>
      <text:p>[STD63]    Yergeau, F., "UTF-8, a transformation format of</text:p>
      <text:p>ISO 10646", STD 63, RFC 3629, November 2003.</text:p>
      <text:p/>
      <text:p>[UCS]      International Organization for Standardization,</text:p>
      <text:p>"Information Technology - Universal Multiple-Octet Coded</text:p>
      <text:p>Character Set (UCS)", ISO/IEC 10646:2003, December 2003.</text:p>
      <text:p/>
      <text:h text:outline-level="2">10.2.  Informative References</text:h>
      <text:p/>
      <text:p>[BCP19]    Freed, N. and J. Postel, "IANA Charset Registration</text:p>
      <text:p>Procedures", BCP 19, RFC 2978, October 2000.</text:p>
      <text:p/>
      <text:p>[BCP35]    Petke, R. and I. King, "Registration Procedures for URL</text:p>
      <text:p>Scheme Names", BCP 35, RFC 2717, November 1999.</text:p>
      <text:p/>
      <text:p>[RFC0952]  Harrenstien, K., Stahl, M., and E. Feinler, "DoD Internet</text:p>
      <text:p>host table specification", RFC 952, October 1985.</text:p>
      <text:p/>
      <text:p>[RFC1034]  Mockapetris, P., "Domain names - concepts and facilities",</text:p>
      <text:p>STD 13, RFC 1034, November 1987.</text:p>
      <text:p/>
      <text:p>[RFC1123]  Braden, R., "Requirements for Internet Hosts - Application</text:p>
      <text:p>and Support", STD 3, RFC 1123, October 1989.</text:p>
      <text:p/>
      <text:p>[RFC1535]  Gavron, E., "A Security Problem and Proposed Correction</text:p>
      <text:p>With Widely Deployed DNS Software", RFC 1535,</text:p>
      <text:p>October 1993.</text:p>
      <text:p/>
      <text:p>[RFC1630]  Berners-Lee, T., "Universal Resource Identifiers in WWW: A</text:p>
      <text:p>Unifying Syntax for the Expression of Names and Addresses</text:p>
      <text:p>of Objects on the Network as used in the World-Wide Web",</text:p>
      <text:p>RFC 1630, June 1994.</text:p>
      <text:p/>
      <text:p>[RFC1736]  Kunze, J., "Functional Recommendations for Internet</text:p>
      <text:p>Resource Locators", RFC 1736, February 1995.</text:p>
      <text:p/>
      <text:p>[RFC1737]  Sollins, K. and L. Masinter, "Functional Requirements for</text:p>
      <text:p>Uniform Resource Names", RFC 1737, December 1994.</text:p>
      <text:p/>
      <text:p>[RFC1738]  Berners-Lee, T., Masinter, L., and M. McCahill, "Uniform</text:p>
      <text:p>Resource Locators (URL)", RFC 1738, December 1994.</text:p>
      <text:p/>
      <text:p>[RFC1808]  Fielding, R., "Relative Uniform Resource Locators",</text:p>
      <text:p>RFC 1808, June 1995.</text:p>
      <text:p/>
      <text:p/>
      <text:p/>
      <text:p/>
      <text:p>Berners-Lee, et al.         Standards Track                    [Page 47]</text:p>
      <text:p/>
      <text:p/>
      <text:p>RFC 3986                   URI Generic Syntax               January 2005</text:p>
      <text:p/>
      <text:p/>
      <text:p>[RFC2046]  Freed, N. and N. Borenstein, "Multipurpose Internet Mail</text:p>
      <text:p>Extensions (MIME) Part Two: Media Types", RFC 2046,</text:p>
      <text:p>November 1996.</text:p>
      <text:p/>
      <text:p>[RFC2141]  Moats, R., "URN Syntax", RFC 2141, May 1997.</text:p>
      <text:p/>
      <text:p>[RFC2396]  Berners-Lee, T., Fielding, R., and L. Masinter, "Uniform</text:p>
      <text:p>Resource Identifiers (URI): Generic Syntax", RFC 2396,</text:p>
      <text:p>August 1998.</text:p>
      <text:p/>
      <text:p>[RFC2518]  Goland, Y., Whitehead, E., Faizi, A., Carter, S., and D.</text:p>
      <text:p>Jensen, "HTTP Extensions for Distributed Authoring --</text:p>
      <text:p>WEBDAV", RFC 2518, February 1999.</text:p>
      <text:p/>
      <text:p>[RFC2557]  Palme, J., Hopmann, A., and N. Shelness, "MIME</text:p>
      <text:p>Encapsulation of Aggregate Documents, such as HTML</text:p>
      <text:p>(MHTML)", RFC 2557, March 1999.</text:p>
      <text:p/>
      <text:p>[RFC2718]  Masinter, L., Alvestrand, H., Zigmond, D., and R. Petke,</text:p>
      <text:p>"Guidelines for new URL Schemes", RFC 2718, November 1999.</text:p>
      <text:p/>
      <text:p>[RFC2732]  Hinden, R., Carpenter, B., and L. Masinter, "Format for</text:p>
      <text:p>Literal IPv6 Addresses in URL's", RFC 2732, December 1999.</text:p>
      <text:p/>
      <text:p>[RFC3305]  Mealling, M. and R. Denenberg, "Report from the Joint</text:p>
      <text:p>W3C/IETF URI Planning Interest Group: Uniform Resource</text:p>
      <text:p>Identifiers (URIs), URLs, and Uniform Resource Names</text:p>
      <text:p>(URNs): Clarifications and Recommendations", RFC 3305,</text:p>
      <text:p>August 2002.</text:p>
      <text:p/>
      <text:p>[RFC3490]  Faltstrom, P., Hoffman, P., and A. Costello,</text:p>
      <text:p>"Internationalizing Domain Names in Applications (IDNA)",</text:p>
      <text:p>RFC 3490, March 2003.</text:p>
      <text:p/>
      <text:p>[RFC3513]  Hinden, R. and S. Deering, "Internet Protocol Version 6</text:p>
      <text:p>(IPv6) Addressing Architecture", RFC 3513, April 2003.</text:p>
      <text:p/>
      <text:p>[Siedzik]  Siedzik, R., "Semantic Attacks: What's in a URL?",</text:p>
      <text:p>April 2001, &lt;http://www.giac.org/practical/gsec/</text:p>
      <text:p>Richard_Siedzik_GSEC.pdf&gt;.</text:p>
      <text:p/>
      <text:p/>
      <text:p/>
      <text:p/>
      <text:p/>
      <text:p/>
      <text:p/>
      <text:p/>
      <text:p/>
      <text:p/>
      <text:p/>
      <text:p>Berners-Lee, et al.         Standards Track                    [Page 48]</text:p>
      <text:p/>
      <text:p/>
      <text:p>RFC 3986                   URI Generic Syntax               January 2005</text:p>
      <text:p/>
      <text:p/>
      <text:p>Appendix A.  Collected ABNF for URI</text:p>
      <text:p/>
      <text:p>URI           = scheme ":" hier-part [ "?" query ] [ "#" fragment ]</text:p>
      <text:p/>
      <text:p>hier-part     = "//" authority path-abempty</text:p>
      <text:p>/ path-absolute</text:p>
      <text:p>/ path-rootless</text:p>
      <text:p>/ path-empty</text:p>
      <text:p/>
      <text:p>URI-reference = URI / relative-ref</text:p>
      <text:p/>
      <text:p>absolute-URI  = scheme ":" hier-part [ "?" query ]</text:p>
      <text:p/>
      <text:p>relative-ref  = relative-part [ "?" query ] [ "#" fragment ]</text:p>
      <text:p/>
      <text:p>relative-part = "//" authority path-abempty</text:p>
      <text:p>/ path-absolute</text:p>
      <text:p>/ path-noscheme</text:p>
      <text:p>/ path-empty</text:p>
      <text:p/>
      <text:p>scheme        = ALPHA *( ALPHA / DIGIT / "+" / "-" / "." )</text:p>
      <text:p/>
      <text:p>authority     = [ userinfo "@" ] host [ ":" port ]</text:p>
      <text:p>userinfo      = *( unreserved / pct-encoded / sub-delims / ":" )</text:p>
      <text:p>host          = IP-literal / IPv4address / reg-name</text:p>
      <text:p>port          = *DIGIT</text:p>
      <text:p/>
      <text:p>IP-literal    = "[" ( IPv6address / IPvFuture  ) "]"</text:p>
      <text:p/>
      <text:p>IPvFuture     = "v" 1*HEXDIG "." 1*( unreserved / sub-delims / ":" )</text:p>
      <text:p/>
      <text:p>IPv6address   =                            6( h16 ":" ) ls32</text:p>
      <text:p>/                       "::" 5( h16 ":" ) ls32</text:p>
      <text:p>/ [               h16 ] "::" 4( h16 ":" ) ls32</text:p>
      <text:p>/ [ *1( h16 ":" ) h16 ] "::" 3( h16 ":" ) ls32</text:p>
      <text:p>/ [ *2( h16 ":" ) h16 ] "::" 2( h16 ":" ) ls32</text:p>
      <text:p>/ [ *3( h16 ":" ) h16 ] "::"    h16 ":"   ls32</text:p>
      <text:p>/ [ *4( h16 ":" ) h16 ] "::"              ls32</text:p>
      <text:p>/ [ *5( h16 ":" ) h16 ] "::"              h16</text:p>
      <text:p>/ [ *6( h16 ":" ) h16 ] "::"</text:p>
      <text:p/>
      <text:p>h16           = 1*4HEXDIG</text:p>
      <text:p>ls32          = ( h16 ":" h16 ) / IPv4address</text:p>
      <text:p>IPv4address   = dec-octet "." dec-octet "." dec-octet "." dec-octet</text:p>
      <text:p/>
      <text:p/>
      <text:p/>
      <text:p/>
      <text:p/>
      <text:p/>
      <text:p/>
      <text:p>Berners-Lee, et al.         Standards Track                    [Page 49]</text:p>
      <text:p/>
      <text:p/>
      <text:p>RFC 3986                   URI Generic Syntax               January 2005</text:p>
      <text:p/>
      <text:p/>
      <text:p>dec-octet     = DIGIT                 ; 0-9</text:p>
      <text:p>/ %x31-39 DIGIT         ; 10-99</text:p>
      <text:p>/ "1" 2DIGIT            ; 100-199</text:p>
      <text:p>/ "2" %x30-34 DIGIT     ; 200-249</text:p>
      <text:p>/ "25" %x30-35          ; 250-255</text:p>
      <text:p/>
      <text:p>reg-name      = *( unreserved / pct-encoded / sub-delims )</text:p>
      <text:p/>
      <text:p>path          = path-abempty    ; begins with "/" or is empty</text:p>
      <text:p>/ path-absolute   ; begins with "/" but not "//"</text:p>
      <text:p>/ path-noscheme   ; begins with a non-colon segment</text:p>
      <text:p>/ path-rootless   ; begins with a segment</text:p>
      <text:p>/ path-empty      ; zero characters</text:p>
      <text:p/>
      <text:p>path-abempty  = *( "/" segment )</text:p>
      <text:p>path-absolute = "/" [ segment-nz *( "/" segment ) ]</text:p>
      <text:p>path-noscheme = segment-nz-nc *( "/" segment )</text:p>
      <text:p>path-rootless = segment-nz *( "/" segment )</text:p>
      <text:p>path-empty    = 0&lt;pchar&gt;</text:p>
      <text:p/>
      <text:p>segment       = *pchar</text:p>
      <text:p>segment-nz    = 1*pchar</text:p>
      <text:p>segment-nz-nc = 1*( unreserved / pct-encoded / sub-delims / "@" )</text:p>
      <text:p>; non-zero-length segment without any colon ":"</text:p>
      <text:p/>
      <text:p>pchar         = unreserved / pct-encoded / sub-delims / ":" / "@"</text:p>
      <text:p/>
      <text:p>query         = *( pchar / "/" / "?" )</text:p>
      <text:p/>
      <text:p>fragment      = *( pchar / "/" / "?" )</text:p>
      <text:p/>
      <text:p>pct-encoded   = "%" HEXDIG HEXDIG</text:p>
      <text:p/>
      <text:p>unreserved    = ALPHA / DIGIT / "-" / "." / "_" / "~"</text:p>
      <text:p>reserved      = gen-delims / sub-delims</text:p>
      <text:p>gen-delims    = ":" / "/" / "?" / "#" / "[" / "]" / "@"</text:p>
      <text:p>sub-delims    = "!" / "$" / "&amp;" / "'" / "(" / ")"</text:p>
      <text:p>/ "*" / "+" / "," / ";" / "="</text:p>
      <text:p/>
      <text:p>Appendix B.  Parsing a URI Reference with a Regular Expression</text:p>
      <text:p/>
      <text:p>As the "first-match-wins" algorithm is identical to the "greedy"</text:p>
      <text:p>disambiguation method used by POSIX regular expressions, it is</text:p>
      <text:p>natural and commonplace to use a regular expression for parsing the</text:p>
      <text:p>potential five components of a URI reference.</text:p>
      <text:p/>
      <text:p>The following line is the regular expression for breaking-down a</text:p>
      <text:p>well-formed URI reference into its components.</text:p>
      <text:p/>
      <text:p/>
      <text:p/>
      <text:p>Berners-Lee, et al.         Standards Track                    [Page 50]</text:p>
      <text:p/>
      <text:p/>
      <text:p>RFC 3986                   URI Generic Syntax               January 2005</text:p>
      <text:p/>
      <text:p/>
      <text:p>^(([^:/?#]+):)?(//([^/?#]*))?([^?#]*)(\?([^#]*))?(#(.*))?</text:p>
      <text:h text:outline-level="2">12            3  4          5       6  7        8 9</text:h>
      <text:p/>
      <text:p>The numbers in the second line above are only to assist readability;</text:p>
      <text:p>they indicate the reference points for each subexpression (i.e., each</text:p>
      <text:p>paired parenthesis).  We refer to the value matched for subexpression</text:p>
      <text:p>&lt;n&gt; as $&lt;n&gt;.  For example, matching the above expression to</text:p>
      <text:p/>
      <text:p>http://www.ics.uci.edu/pub/ietf/uri/#Related</text:p>
      <text:p/>
      <text:p>results in the following subexpression matches:</text:p>
      <text:p/>
      <text:p>$1 = http:</text:p>
      <text:p>$2 = http</text:p>
      <text:p>$3 = //www.ics.uci.edu</text:p>
      <text:p>$4 = www.ics.uci.edu</text:p>
      <text:p>$5 = /pub/ietf/uri/</text:p>
      <text:p>$6 = &lt;undefined&gt;</text:p>
      <text:p>$7 = &lt;undefined&gt;</text:p>
      <text:p>$8 = #Related</text:p>
      <text:p>$9 = Related</text:p>
      <text:p/>
      <text:p>where &lt;undefined&gt; indicates that the component is not present, as is</text:p>
      <text:p>the case for the query component in the above example.  Therefore, we</text:p>
      <text:p>can determine the value of the five components as</text:p>
      <text:p/>
      <text:p>scheme    = $2</text:p>
      <text:p>authority = $4</text:p>
      <text:p>path      = $5</text:p>
      <text:p>query     = $7</text:p>
      <text:p>fragment  = $9</text:p>
      <text:p/>
      <text:p>Going in the opposite direction, we can recreate a URI reference from</text:p>
      <text:p>its components by using the algorithm of Section 5.3.</text:p>
      <text:p/>
      <text:p>Appendix C.  Delimiting a URI in Context</text:p>
      <text:p/>
      <text:p>URIs are often transmitted through formats that do not provide a</text:p>
      <text:p>clear context for their interpretation.  For example, there are many</text:p>
      <text:p>occasions when a URI is included in plain text; examples include text</text:p>
      <text:p>sent in email, USENET news, and on printed paper.  In such cases, it</text:p>
      <text:p>is important to be able to delimit the URI from the rest of the text,</text:p>
      <text:p>and in particular from punctuation marks that might be mistaken for</text:p>
      <text:p>part of the URI.</text:p>
      <text:p/>
      <text:p>In practice, URIs are delimited in a variety of ways, but usually</text:p>
      <text:p>within double-quotes "http://example.com/", angle brackets</text:p>
      <text:p>&lt;http://example.com/&gt;, or just by using whitespace:</text:p>
      <text:p/>
      <text:p/>
      <text:p/>
      <text:p>Berners-Lee, et al.         Standards Track                    [Page 51]</text:p>
      <text:p/>
      <text:p/>
      <text:p>RFC 3986                   URI Generic Syntax               January 2005</text:p>
      <text:p/>
      <text:p/>
      <text:p>http://example.com/</text:p>
      <text:p/>
      <text:p>These wrappers do not form part of the URI.</text:p>
      <text:p/>
      <text:p>In some cases, extra whitespace (spaces, line-breaks, tabs, etc.) may</text:p>
      <text:p>have to be added to break a long URI across lines.  The whitespace</text:p>
      <text:p>should be ignored when the URI is extracted.</text:p>
      <text:p/>
      <text:p>No whitespace should be introduced after a hyphen ("-") character.</text:p>
      <text:p>Because some typesetters and printers may (erroneously) introduce a</text:p>
      <text:p>hyphen at the end of line when breaking it, the interpreter of a URI</text:p>
      <text:p>containing a line break immediately after a hyphen should ignore all</text:p>
      <text:p>whitespace around the line break and should be aware that the hyphen</text:p>
      <text:p>may or may not actually be part of the URI.</text:p>
      <text:p/>
      <text:p>Using &lt;&gt; angle brackets around each URI is especially recommended as</text:p>
      <text:p>a delimiting style for a reference that contains embedded whitespace.</text:p>
      <text:p/>
      <text:p>The prefix "URL:" (with or without a trailing space) was formerly</text:p>
      <text:p>recommended as a way to help distinguish a URI from other bracketed</text:p>
      <text:p>designators, though it is not commonly used in practice and is no</text:p>
      <text:p>longer recommended.</text:p>
      <text:p/>
      <text:p>For robustness, software that accepts user-typed URI should attempt</text:p>
      <text:p>to recognize and strip both delimiters and embedded whitespace.</text:p>
      <text:p/>
      <text:p>For example, the text</text:p>
      <text:p/>
      <text:p>Yes, Jim, I found it under "http://www.w3.org/Addressing/",</text:p>
      <text:p>but you can probably pick it up from &lt;ftp://foo.example.</text:p>
      <text:p>com/rfc/&gt;.  Note the warning in &lt;http://www.ics.uci.edu/pub/</text:p>
      <text:p>ietf/uri/historical.html#WARNING&gt;.</text:p>
      <text:p/>
      <text:p>contains the URI references</text:p>
      <text:p/>
      <text:p>http://www.w3.org/Addressing/</text:p>
      <text:p>ftp://foo.example.com/rfc/</text:p>
      <text:p>http://www.ics.uci.edu/pub/ietf/uri/historical.html#WARNING</text:p>
      <text:p/>
      <text:p/>
      <text:p/>
      <text:p/>
      <text:p/>
      <text:p/>
      <text:p/>
      <text:p/>
      <text:p/>
      <text:p/>
      <text:p/>
      <text:p/>
      <text:p/>
      <text:p>Berners-Lee, et al.         Standards Track                    [Page 52]</text:p>
      <text:p/>
      <text:p/>
      <text:p>RFC 3986                   URI Generic Syntax               January 2005</text:p>
      <text:p/>
      <text:p/>
      <text:p>Appendix D.  Changes from RFC 2396</text:p>
      <text:p/>
      <text:p>D.1.  Additions</text:p>
      <text:p/>
      <text:p>An ABNF rule for URI has been introduced to correspond to one common</text:p>
      <text:p>usage of the term: an absolute URI with optional fragment.</text:p>
      <text:p/>
      <text:p>IPv6 (and later) literals have been added to the list of possible</text:p>
      <text:p>identifiers for the host portion of an authority component, as</text:p>
      <text:p>described by [RFC2732], with the addition of "[" and "]" to the</text:p>
      <text:p>reserved set and a version flag to anticipate future versions of IP</text:p>
      <text:p>literals.  Square brackets are now specified as reserved within the</text:p>
      <text:p>authority component and are not allowed outside their use as</text:p>
      <text:p>delimiters for an IP literal within host.  In order to make this</text:p>
      <text:p>change without changing the technical definition of the path, query,</text:p>
      <text:p>and fragment components, those rules were redefined to directly</text:p>
      <text:p>specify the characters allowed.</text:p>
      <text:p/>
      <text:p>As [RFC2732] defers to [RFC3513] for definition of an IPv6 literal</text:p>
      <text:p>address, which, unfortunately, lacks an ABNF description of</text:p>
      <text:p>IPv6address, we created a new ABNF rule for IPv6address that matches</text:p>
      <text:p>the text representations defined by Section 2.2 of [RFC3513].</text:p>
      <text:p>Likewise, the definition of IPv4address has been improved in order to</text:p>
      <text:p>limit each decimal octet to the range 0-255.</text:p>
      <text:p/>
      <text:p>Section 6, on URI normalization and comparison, has been completely</text:p>
      <text:p>rewritten and extended by using input from Tim Bray and discussion</text:p>
      <text:p>within the W3C Technical Architecture Group.</text:p>
      <text:p/>
      <text:p>D.2.  Modifications</text:p>
      <text:p/>
      <text:p>The ad-hoc BNF syntax of RFC 2396 has been replaced with the ABNF of</text:p>
      <text:p>[RFC2234].  This change required all rule names that formerly</text:p>
      <text:p>included underscore characters to be renamed with a dash instead.  In</text:p>
      <text:p>addition, a number of syntax rules have been eliminated or simplified</text:p>
      <text:p>to make the overall grammar more comprehensible.  Specifications that</text:p>
      <text:p>refer to the obsolete grammar rules may be understood by replacing</text:p>
      <text:p>those rules according to the following table:</text:p>
      <text:p/>
      <text:p/>
      <text:p/>
      <text:p/>
      <text:p/>
      <text:p/>
      <text:p/>
      <text:p/>
      <text:p/>
      <text:p/>
      <text:p/>
      <text:p/>
      <text:p/>
      <text:p>Berners-Lee, et al.         Standards Track                    [Page 53]</text:p>
      <text:p/>
      <text:p/>
      <text:p>RFC 3986                   URI Generic Syntax               January 2005</text:p>
      <text:p/>
      <text:p/>
      <text:p>+----------------+--------------------------------------------------+</text:p>
      <text:p>| obsolete rule  | translation                                      |</text:p>
      <text:p>+----------------+--------------------------------------------------+</text:p>
      <text:p>| absoluteURI    | absolute-URI                                     |</text:p>
      <text:p>| relativeURI    | relative-part [ "?" query ]                      |</text:p>
      <text:p>| hier_part      | ( "//" authority path-abempty /                  |</text:p>
      <text:p>|                | path-absolute ) [ "?" query ]                    |</text:p>
      <text:p>|                |                                                  |</text:p>
      <text:p>| opaque_part    | path-rootless [ "?" query ]                      |</text:p>
      <text:p>| net_path       | "//" authority path-abempty                      |</text:p>
      <text:p>| abs_path       | path-absolute                                    |</text:p>
      <text:p>| rel_path       | path-rootless                                    |</text:p>
      <text:p>| rel_segment    | segment-nz-nc                                    |</text:p>
      <text:p>| reg_name       | reg-name                                         |</text:p>
      <text:p>| server         | authority                                        |</text:p>
      <text:p>| hostport       | host [ ":" port ]                                |</text:p>
      <text:p>| hostname       | reg-name                                         |</text:p>
      <text:p>| path_segments  | path-abempty                                     |</text:p>
      <text:p>| param          | *&lt;pchar excluding ";"&gt;                           |</text:p>
      <text:p>|                |                                                  |</text:p>
      <text:p>| uric           | unreserved / pct-encoded / ";" / "?" / ":"       |</text:p>
      <text:p>|                |  / "@" / "&amp;" / "=" / "+" / "$" / "," / "/"       |</text:p>
      <text:p>|                |                                                  |</text:p>
      <text:p>| uric_no_slash  | unreserved / pct-encoded / ";" / "?" / ":"       |</text:p>
      <text:p>|                |  / "@" / "&amp;" / "=" / "+" / "$" / ","             |</text:p>
      <text:p>|                |                                                  |</text:p>
      <text:p>| mark           | "-" / "_" / "." / "!" / "~" / "*" / "'"          |</text:p>
      <text:p>|                |  / "(" / ")"                                     |</text:p>
      <text:p>|                |                                                  |</text:p>
      <text:p>| escaped        | pct-encoded                                      |</text:p>
      <text:p>| hex            | HEXDIG                                           |</text:p>
      <text:p>| alphanum       | ALPHA / DIGIT                                    |</text:p>
      <text:p>+----------------+--------------------------------------------------+</text:p>
      <text:p/>
      <text:p>Use of the above obsolete rules for the definition of scheme-specific</text:p>
      <text:p>syntax is deprecated.</text:p>
      <text:p/>
      <text:p>Section 2, on characters, has been rewritten to explain what</text:p>
      <text:p>characters are reserved, when they are reserved, and why they are</text:p>
      <text:p>reserved, even when they are not used as delimiters by the generic</text:p>
      <text:p>syntax.  The mark characters that are typically unsafe to decode,</text:p>
      <text:p>including the exclamation mark ("!"), asterisk ("*"), single-quote</text:p>
      <text:p>("'"), and open and close parentheses ("(" and ")"), have been moved</text:p>
      <text:p>to the reserved set in order to clarify the distinction between</text:p>
      <text:p>reserved and unreserved and, hopefully, to answer the most common</text:p>
      <text:p>question of scheme designers.  Likewise, the section on</text:p>
      <text:p>percent-encoded characters has been rewritten, and URI normalizers</text:p>
      <text:p>are now given license to decode any percent-encoded octets</text:p>
      <text:p/>
      <text:p/>
      <text:p/>
      <text:p>Berners-Lee, et al.         Standards Track                    [Page 54]</text:p>
      <text:p/>
      <text:p/>
      <text:p>RFC 3986                   URI Generic Syntax               January 2005</text:p>
      <text:p/>
      <text:p/>
      <text:p>corresponding to unreserved characters.  In general, the terms</text:p>
      <text:p>"escaped" and "unescaped" have been replaced with "percent-encoded"</text:p>
      <text:p>and "decoded", respectively, to reduce confusion with other forms of</text:p>
      <text:p>escape mechanisms.</text:p>
      <text:p/>
      <text:p>The ABNF for URI and URI-reference has been redesigned to make them</text:p>
      <text:p>more friendly to LALR parsers and to reduce complexity.  As a result,</text:p>
      <text:p>the layout form of syntax description has been removed, along with</text:p>
      <text:p>the uric, uric_no_slash, opaque_part, net_path, abs_path, rel_path,</text:p>
      <text:p>path_segments, rel_segment, and mark rules.  All references to</text:p>
      <text:p>"opaque" URIs have been replaced with a better description of how the</text:p>
      <text:p>path component may be opaque to hierarchy.  The relativeURI rule has</text:p>
      <text:p>been replaced with relative-ref to avoid unnecessary confusion over</text:p>
      <text:p>whether they are a subset of URI.  The ambiguity regarding the</text:p>
      <text:p>parsing of URI-reference as a URI or a relative-ref with a colon in</text:p>
      <text:p>the first segment has been eliminated through the use of five</text:p>
      <text:p>separate path matching rules.</text:p>
      <text:p/>
      <text:p>The fragment identifier has been moved back into the section on</text:p>
      <text:p>generic syntax components and within the URI and relative-ref rules,</text:p>
      <text:p>though it remains excluded from absolute-URI.  The number sign ("#")</text:p>
      <text:p>character has been moved back to the reserved set as a result of</text:p>
      <text:p>reintegrating the fragment syntax.</text:p>
      <text:p/>
      <text:p>The ABNF has been corrected to allow the path component to be empty.</text:p>
      <text:p>This also allows an absolute-URI to consist of nothing after the</text:p>
      <text:p>"scheme:", as is present in practice with the "dav:" namespace</text:p>
      <text:p>[RFC2518] and with the "about:" scheme used internally by many WWW</text:p>
      <text:p>browser implementations.  The ambiguity regarding the boundary</text:p>
      <text:p>between authority and path has been eliminated through the use of</text:p>
      <text:p>five separate path matching rules.</text:p>
      <text:p/>
      <text:p>Registry-based naming authorities that use the generic syntax are now</text:p>
      <text:p>defined within the host rule.  This change allows current</text:p>
      <text:p>implementations, where whatever name provided is simply fed to the</text:p>
      <text:p>local name resolution mechanism, to be consistent with the</text:p>
      <text:p>specification.  It also removes the need to re-specify DNS name</text:p>
      <text:p>formats here.  Furthermore, it allows the host component to contain</text:p>
      <text:p>percent-encoded octets, which is necessary to enable</text:p>
      <text:p>internationalized domain names to be provided in URIs, processed in</text:p>
      <text:p>their native character encodings at the application layers above URI</text:p>
      <text:p>processing, and passed to an IDNA library as a registered name in the</text:p>
      <text:p>UTF-8 character encoding.  The server, hostport, hostname,</text:p>
      <text:p>domainlabel, toplabel, and alphanum rules have been removed.</text:p>
      <text:p/>
      <text:p>The resolving relative references algorithm of [RFC2396] has been</text:p>
      <text:p>rewritten with pseudocode for this revision to improve clarity and</text:p>
      <text:p>fix the following issues:</text:p>
      <text:p/>
      <text:p/>
      <text:p/>
      <text:p>Berners-Lee, et al.         Standards Track                    [Page 55]</text:p>
      <text:p/>
      <text:p/>
      <text:p>RFC 3986                   URI Generic Syntax               January 2005</text:p>
      <text:p/>
      <text:p/>
      <text:p>o  [RFC2396] section 5.2, step 6a, failed to account for a base URI</text:p>
      <text:p>with no path.</text:p>
      <text:p/>
      <text:p>o  Restored the behavior of [RFC1808] where, if the reference</text:p>
      <text:p>contains an empty path and a defined query component, the target</text:p>
      <text:p>URI inherits the base URI's path component.</text:p>
      <text:p/>
      <text:p>o  The determination of whether a URI reference is a same-document</text:p>
      <text:p>reference has been decoupled from the URI parser, simplifying the</text:p>
      <text:p>URI processing interface within applications in a way consistent</text:p>
      <text:p>with the internal architecture of deployed URI processing</text:p>
      <text:p>implementations.  The determination is now based on comparison to</text:p>
      <text:p>the base URI after transforming a reference to absolute form,</text:p>
      <text:p>rather than on the format of the reference itself.  This change</text:p>
      <text:p>may result in more references being considered "same-document"</text:p>
      <text:p>under this specification than there would be under the rules given</text:p>
      <text:p>in RFC 2396, especially when normalization is used to reduce</text:p>
      <text:p>aliases.  However, it does not change the status of existing</text:p>
      <text:p>same-document references.</text:p>
      <text:p/>
      <text:p>o  Separated the path merge routine into two routines: merge, for</text:p>
      <text:p>describing combination of the base URI path with a relative-path</text:p>
      <text:p>reference, and remove_dot_segments, for describing how to remove</text:p>
      <text:p>the special "." and ".." segments from a composed path.  The</text:p>
      <text:p>remove_dot_segments algorithm is now applied to all URI reference</text:p>
      <text:p>paths in order to match common implementations and to improve the</text:p>
      <text:p>normalization of URIs in practice.  This change only impacts the</text:p>
      <text:p>parsing of abnormal references and same-scheme references wherein</text:p>
      <text:p>the base URI has a non-hierarchical path.</text:p>
      <text:p/>
      <text:p>Index</text:p>
      <text:p/>
      <text:p>A</text:p>
      <text:p>ABNF  11</text:p>
      <text:p>absolute  27</text:p>
      <text:p>absolute-path  26</text:p>
      <text:p>absolute-URI  27</text:p>
      <text:p>access  9</text:p>
      <text:p>authority  17, 18</text:p>
      <text:p/>
      <text:p>B</text:p>
      <text:p>base URI  28</text:p>
      <text:p/>
      <text:p>C</text:p>
      <text:p>character encoding  4</text:p>
      <text:p>character  4</text:p>
      <text:p>characters  8, 11</text:p>
      <text:p>coded character set  4</text:p>
      <text:p/>
      <text:p/>
      <text:p/>
      <text:p>Berners-Lee, et al.         Standards Track                    [Page 56]</text:p>
      <text:p/>
      <text:p/>
      <text:p>RFC 3986                   URI Generic Syntax               January 2005</text:p>
      <text:p/>
      <text:p/>
      <text:p>D</text:p>
      <text:p>dec-octet  20</text:p>
      <text:p>dereference  9</text:p>
      <text:p>dot-segments  23</text:p>
      <text:p/>
      <text:p>F</text:p>
      <text:p>fragment  16, 24</text:p>
      <text:p/>
      <text:p>G</text:p>
      <text:p>gen-delims  13</text:p>
      <text:p>generic syntax  6</text:p>
      <text:p/>
      <text:p>H</text:p>
      <text:p>h16  20</text:p>
      <text:p>hier-part  16</text:p>
      <text:p>hierarchical  10</text:p>
      <text:p>host  18</text:p>
      <text:p/>
      <text:p>I</text:p>
      <text:p>identifier  5</text:p>
      <text:p>IP-literal  19</text:p>
      <text:p>IPv4  20</text:p>
      <text:p>IPv4address  19, 20</text:p>
      <text:p>IPv6  19</text:p>
      <text:p>IPv6address  19, 20</text:p>
      <text:p>IPvFuture  19</text:p>
      <text:p/>
      <text:p>L</text:p>
      <text:p>locator  7</text:p>
      <text:p>ls32  20</text:p>
      <text:p/>
      <text:p>M</text:p>
      <text:p>merge  32</text:p>
      <text:p/>
      <text:p>N</text:p>
      <text:p>name  7</text:p>
      <text:p>network-path  26</text:p>
      <text:p/>
      <text:p>P</text:p>
      <text:p>path  16, 22, 26</text:p>
      <text:p>path-abempty  22</text:p>
      <text:p>path-absolute  22</text:p>
      <text:p>path-empty  22</text:p>
      <text:p>path-noscheme  22</text:p>
      <text:p>path-rootless  22</text:p>
      <text:p>path-abempty  16, 22, 26</text:p>
      <text:p>path-absolute  16, 22, 26</text:p>
      <text:p>path-empty  16, 22, 26</text:p>
      <text:p/>
      <text:p/>
      <text:p/>
      <text:p>Berners-Lee, et al.         Standards Track                    [Page 57]</text:p>
      <text:p/>
      <text:p/>
      <text:p>RFC 3986                   URI Generic Syntax               January 2005</text:p>
      <text:p/>
      <text:p/>
      <text:p>path-rootless  16, 22</text:p>
      <text:p>pchar  23</text:p>
      <text:p>pct-encoded  12</text:p>
      <text:p>percent-encoding  12</text:p>
      <text:p>port  22</text:p>
      <text:p/>
      <text:p>Q</text:p>
      <text:p>query  16, 23</text:p>
      <text:p/>
      <text:p>R</text:p>
      <text:p>reg-name  21</text:p>
      <text:p>registered name  20</text:p>
      <text:p>relative  10, 28</text:p>
      <text:p>relative-path  26</text:p>
      <text:p>relative-ref  26</text:p>
      <text:p>remove_dot_segments  33</text:p>
      <text:p>representation  9</text:p>
      <text:p>reserved  12</text:p>
      <text:p>resolution  9, 28</text:p>
      <text:p>resource  5</text:p>
      <text:p>retrieval  9</text:p>
      <text:p/>
      <text:p>S</text:p>
      <text:p>same-document  27</text:p>
      <text:p>sameness  9</text:p>
      <text:p>scheme  16, 17</text:p>
      <text:p>segment  22, 23</text:p>
      <text:p>segment-nz  23</text:p>
      <text:p>segment-nz-nc  23</text:p>
      <text:p>sub-delims  13</text:p>
      <text:p>suffix  27</text:p>
      <text:p/>
      <text:p>T</text:p>
      <text:p>transcription  8</text:p>
      <text:p/>
      <text:p>U</text:p>
      <text:p>uniform  4</text:p>
      <text:p>unreserved  13</text:p>
      <text:p>URI grammar</text:p>
      <text:p>absolute-URI  27</text:p>
      <text:p>ALPHA  11</text:p>
      <text:p>authority  18</text:p>
      <text:p>CR  11</text:p>
      <text:p>dec-octet  20</text:p>
      <text:p>DIGIT  11</text:p>
      <text:p>DQUOTE  11</text:p>
      <text:p>fragment  24</text:p>
      <text:p>gen-delims  13</text:p>
      <text:p/>
      <text:p/>
      <text:p/>
      <text:p>Berners-Lee, et al.         Standards Track                    [Page 58]</text:p>
      <text:p/>
      <text:p/>
      <text:p>RFC 3986                   URI Generic Syntax               January 2005</text:p>
      <text:p/>
      <text:p/>
      <text:p>h16  20</text:p>
      <text:p>HEXDIG  11</text:p>
      <text:p>hier-part  16</text:p>
      <text:p>host  19</text:p>
      <text:p>IP-literal  19</text:p>
      <text:p>IPv4address  20</text:p>
      <text:p>IPv6address  20</text:p>
      <text:p>IPvFuture  19</text:p>
      <text:p>LF  11</text:p>
      <text:p>ls32  20</text:p>
      <text:p>OCTET  11</text:p>
      <text:p>path  22</text:p>
      <text:p>path-abempty  22</text:p>
      <text:p>path-absolute  22</text:p>
      <text:p>path-empty  22</text:p>
      <text:p>path-noscheme  22</text:p>
      <text:p>path-rootless  22</text:p>
      <text:p>pchar  23</text:p>
      <text:p>pct-encoded  12</text:p>
      <text:p>port  22</text:p>
      <text:p>query  24</text:p>
      <text:p>reg-name  21</text:p>
      <text:p>relative-ref  26</text:p>
      <text:p>reserved  13</text:p>
      <text:p>scheme  17</text:p>
      <text:p>segment  23</text:p>
      <text:p>segment-nz  23</text:p>
      <text:p>segment-nz-nc  23</text:p>
      <text:p>SP  11</text:p>
      <text:p>sub-delims  13</text:p>
      <text:p>unreserved  13</text:p>
      <text:p>URI  16</text:p>
      <text:p>URI-reference  25</text:p>
      <text:p>userinfo  18</text:p>
      <text:p>URI  16</text:p>
      <text:p>URI-reference  25</text:p>
      <text:p>URL  7</text:p>
      <text:p>URN  7</text:p>
      <text:p>userinfo  18</text:p>
      <text:p/>
      <text:p/>
      <text:p/>
      <text:p/>
      <text:p/>
      <text:p/>
      <text:p/>
      <text:p/>
      <text:p/>
      <text:p/>
      <text:p/>
      <text:p/>
      <text:p>Berners-Lee, et al.         Standards Track                    [Page 59]</text:p>
      <text:p/>
      <text:p/>
      <text:p>RFC 3986                   URI Generic Syntax               January 2005</text:p>
      <text:p/>
      <text:p/>
      <text:p>Authors' Addresses</text:p>
      <text:p/>
      <text:p>Tim Berners-Lee</text:p>
      <text:p>World Wide Web Consortium</text:p>
      <text:p>Massachusetts Institute of Technology</text:p>
      <text:h text:outline-level="2">77 Massachusetts Avenue</text:h>
      <text:p>Cambridge, MA  02139</text:p>
      <text:p>USA</text:p>
      <text:p/>
      <text:p>Phone: +1-617-253-5702</text:p>
      <text:p>Fax:   +1-617-258-5999</text:p>
      <text:p>EMail: timbl@w3.org</text:p>
      <text:p>URI:   http://www.w3.org/People/Berners-Lee/</text:p>
      <text:p/>
      <text:p/>
      <text:p>Roy T. Fielding</text:p>
      <text:p>Day Software</text:p>
      <text:h text:outline-level="2">5251 California Ave., Suite 110</text:h>
      <text:p>Irvine, CA  92617</text:p>
      <text:p>USA</text:p>
      <text:p/>
      <text:p>Phone: +1-949-679-2960</text:p>
      <text:p>Fax:   +1-949-679-2972</text:p>
      <text:p>EMail: fielding@gbiv.com</text:p>
      <text:p>URI:   http://roy.gbiv.com/</text:p>
      <text:p/>
      <text:p/>
      <text:p>Larry Masinter</text:p>
      <text:p>Adobe Systems Incorporated</text:p>
      <text:h text:outline-level="2">345 Park Ave</text:h>
      <text:p>San Jose, CA  95110</text:p>
      <text:p>USA</text:p>
      <text:p/>
      <text:p>Phone: +1-408-536-3024</text:p>
      <text:p>EMail: LMM@acm.org</text:p>
      <text:p>URI:   http://larry.masinter.net/</text:p>
      <text:p/>
      <text:p/>
      <text:p/>
      <text:p/>
      <text:p/>
      <text:p/>
      <text:p/>
      <text:p/>
      <text:p/>
      <text:p/>
      <text:p/>
      <text:p/>
      <text:p/>
      <text:p/>
      <text:p/>
      <text:p>Berners-Lee, et al.         Standards Track                    [Page 60]</text:p>
      <text:p/>
      <text:p/>
      <text:p>RFC 3986                   URI Generic Syntax               January 2005</text:p>
      <text:p/>
      <text:p/>
      <text:p>Full Copyright Statement</text:p>
      <text:p/>
      <text:p>Copyright (C) The Internet Society (2005).</text:p>
      <text:p/>
      <text:p>This document is subject to the rights, licenses and restrictions</text:p>
      <text:p>contained in BCP 78, and except as set forth therein, the authors</text:p>
      <text:p>retain all their rights.</text:p>
      <text:p/>
      <text:p>This document and the information contained herein are provided on an</text:p>
      <text:p>"AS IS" basis and THE CONTRIBUTOR, THE ORGANIZATION HE/SHE REPRESENTS</text:p>
      <text:p>OR IS SPONSORED BY (IF ANY), THE INTERNET SOCIETY AND THE INTERNET</text:p>
      <text:p>ENGINEERING TASK FORCE DISCLAIM ALL WARRANTIES, EXPRESS OR IMPLIED,</text:p>
      <text:p>INCLUDING BUT NOT LIMITED TO ANY WARRANTY THAT THE USE OF THE</text:p>
      <text:p>INFORMATION HEREIN WILL NOT INFRINGE ANY RIGHTS OR ANY IMPLIED</text:p>
      <text:p>WARRANTIES OF MERCHANTABILITY OR FITNESS FOR A PARTICULAR PURPOSE.</text:p>
      <text:p/>
      <text:p>Intellectual Property</text:p>
      <text:p/>
      <text:p>The IETF takes no position regarding the validity or scope of any</text:p>
      <text:p>Intellectual Property Rights or other rights that might be claimed to</text:p>
      <text:p>pertain to the implementation or use of the technology described in</text:p>
      <text:p>this document or the extent to which any license under such rights</text:p>
      <text:p>might or might not be available; nor does it represent that it has</text:p>
      <text:p>made any independent effort to identify any such rights.  Information</text:p>
      <text:p>on the IETF's procedures with respect to rights in IETF Documents can</text:p>
      <text:p>be found in BCP 78 and BCP 79.</text:p>
      <text:p/>
      <text:p>Copies of IPR disclosures made to the IETF Secretariat and any</text:p>
      <text:p>assurances of licenses to be made available, or the result of an</text:p>
      <text:p>attempt made to obtain a general license or permission for the use of</text:p>
      <text:p>such proprietary rights by implementers or users of this</text:p>
      <text:p>specification can be obtained from the IETF on-line IPR repository at</text:p>
      <text:p>http://www.ietf.org/ipr.</text:p>
      <text:p/>
      <text:p>The IETF invites any interested party to bring to its attention any</text:p>
      <text:p>copyrights, patents or patent applications, or other proprietary</text:p>
      <text:p>rights that may cover technology that may be required to implement</text:p>
      <text:p>this standard.  Please address the information to the IETF at ietf-</text:p>
      <text:p>ipr@ietf.org.</text:p>
      <text:p/>
      <text:p/>
      <text:p>Acknowledgement</text:p>
      <text:p/>
      <text:p>Funding for the RFC Editor function is currently provided by the</text:p>
      <text:p>Internet Society.</text:p>
      <text:p/>
      <text:p/>
      <text:p/>
      <text:p/>
      <text:p/>
      <text:p/>
      <text:p>Berners-Lee, et al.         Standards Track                    [Page 61]</text:p>
      <text:p/>
      <text:p/>
    </office:text>
  </office:body>
</office:document-content>
</file>

<file path=meta.xml><?xml version="1.0" encoding="utf-8"?>
<office:document-meta xmlns:office="urn:oasis:names:tc:opendocument:xmlns:office:1.0" xmlns:dc="http://purl.org/dc/elements/1.1/" office:version="1.3">
  <office:meta>
    <dc:title>RFC 3986: Uniform Resource Identifier Syntax</dc:title>
    <dc:creator>markitdown showcase deterministic derivative</dc:creator>
    <dc:source>https://www.rfc-editor.org/rfc/rfc3986.txt</dc:source>
    <dc:language>en</dc:language>
  </office:meta>
</office:document-meta>
</file>